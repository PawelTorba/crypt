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FA000003D11ECAF20F.jpg" manifest:media-type="image/jpeg"/>
  <manifest:file-entry manifest:full-path="Pictures/100000010000009A000000E29439C7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49cm" fo:border="0.05pt solid #000000" style:writing-mode="pag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Appendix">
      <style:text-properties fo:language="pl" fo:country="PL" officeooo:rsid="02b6cb7d" officeooo:paragraph-rsid="02b6cb7d"/>
    </style:style>
    <style:style style:name="P3" style:family="paragraph" style:parent-style-name="Appendix">
      <style:text-properties fo:language="pl" fo:country="PL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fo:font-weight="bold" officeooo:rsid="00182116" officeooo:paragraph-rsid="00182116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language="pl" fo:country="PL" fo:font-weight="normal" officeooo:rsid="004cd6be" officeooo:paragraph-rsid="004cd6be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language="pl" fo:country="PL" fo:font-style="italic" style:text-underline-style="solid" style:text-underline-width="auto" style:text-underline-color="font-color" fo:font-weight="normal" officeooo:rsid="02b80f28" officeooo:paragraph-rsid="02b80f28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fo:language="pl" fo:country="PL" fo:font-weight="normal" officeooo:rsid="00182116" officeooo:paragraph-rsid="00182116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language="pl" fo:country="PL" fo:font-weight="normal" officeooo:rsid="026ac3c5" officeooo:paragraph-rsid="026ac3c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fo:language="pl" fo:country="PL" fo:font-weight="normal" officeooo:rsid="00182116" officeooo:paragraph-rsid="026ac3c5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3pt" fo:language="pl" fo:country="PL" fo:font-weight="normal" officeooo:rsid="00182116" officeooo:paragraph-rsid="004cd6be" style:font-size-asian="13pt" style:font-weight-asian="normal" style:font-size-complex="13pt" style:font-weight-complex="normal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fo:font-size="15pt" fo:language="pl" fo:country="PL" fo:font-weight="bold" officeooo:rsid="00194efe" officeooo:paragraph-rsid="00194efe" style:font-size-asian="15pt" style:font-weight-asian="bold" style:font-size-complex="15pt" style:font-weight-complex="bold"/>
    </style:style>
    <style:style style:name="P14" style:family="paragraph" style:parent-style-name="Heading_20_1">
      <style:paragraph-properties fo:break-before="page"/>
      <style:text-properties officeooo:paragraph-rsid="002bba7c"/>
    </style:style>
    <style:style style:name="P15" style:family="paragraph" style:parent-style-name="Text_20_body">
      <style:text-properties officeooo:rsid="02b80f28" officeooo:paragraph-rsid="02b80f28"/>
    </style:style>
    <style:style style:name="P16" style:family="paragraph" style:parent-style-name="Text_20_body">
      <style:text-properties officeooo:rsid="02b80f28"/>
    </style:style>
    <style:style style:name="P17" style:family="paragraph" style:parent-style-name="Text_20_body">
      <style:text-properties officeooo:paragraph-rsid="02751de4"/>
    </style:style>
    <style:style style:name="P18" style:family="paragraph" style:parent-style-name="Text_20_body">
      <style:text-properties fo:language="pl" fo:country="PL"/>
    </style:style>
    <style:style style:name="P19" style:family="paragraph" style:parent-style-name="Heading_20_1" style:list-style-name="">
      <style:paragraph-properties>
        <style:tab-stops/>
      </style:paragraph-properties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text-properties fo:language="pl" fo:country="PL" officeooo:rsid="007a6cc8"/>
    </style:style>
    <style:style style:name="P22" style:family="paragraph" style:parent-style-name="Heading_20_2">
      <style:text-properties fo:color="#000000" loext:opacity="100%" officeooo:paragraph-rsid="02b80f28"/>
    </style:style>
    <style:style style:name="P23" style:family="paragraph" style:parent-style-name="Heading_20_2">
      <style:text-properties fo:color="#000000" loext:opacity="100%" officeooo:rsid="02b80f28" officeooo:paragraph-rsid="02b80f28"/>
    </style:style>
    <style:style style:name="P24" style:family="paragraph" style:parent-style-name="Heading_20_1">
      <style:paragraph-properties fo:break-before="page"/>
      <style:text-properties fo:language="pl" fo:country="PL" officeooo:paragraph-rsid="0278f4d1"/>
    </style:style>
    <style:style style:name="P25" style:family="paragraph" style:parent-style-name="Heading_20_2">
      <style:text-properties fo:color="#000000" loext:opacity="100%"/>
    </style:style>
    <style:style style:name="P26" style:family="paragraph" style:parent-style-name="Heading_20_2">
      <style:text-properties officeooo:paragraph-rsid="027bc5b5"/>
    </style:style>
    <style:style style:name="P27" style:family="paragraph" style:parent-style-name="Heading_20_2">
      <style:text-properties officeooo:paragraph-rsid="0289e063"/>
    </style:style>
    <style:style style:name="P28" style:family="paragraph" style:parent-style-name="Heading_20_1">
      <style:text-properties officeooo:paragraph-rsid="027d3aa7"/>
    </style:style>
    <style:style style:name="P29" style:family="paragraph" style:parent-style-name="Heading_20_2">
      <style:text-properties officeooo:paragraph-rsid="02b80f28"/>
    </style:style>
    <style:style style:name="P30" style:family="paragraph" style:parent-style-name="Heading_20_2">
      <style:text-properties officeooo:paragraph-rsid="02b97ecf"/>
    </style:style>
    <style:style style:name="P31" style:family="paragraph" style:parent-style-name="Heading_20_1">
      <style:text-properties officeooo:paragraph-rsid="02969661"/>
    </style:style>
    <style:style style:name="P32" style:family="paragraph" style:parent-style-name="Heading_20_1">
      <style:text-properties officeooo:paragraph-rsid="02b97ecf"/>
    </style:style>
    <style:style style:name="P33" style:family="paragraph" style:parent-style-name="Heading_20_1" style:list-style-name="">
      <style:paragraph-properties>
        <style:tab-stops/>
      </style:paragraph-properties>
      <style:text-properties officeooo:paragraph-rsid="028987e5"/>
    </style:style>
    <style:style style:name="P34" style:family="paragraph" style:parent-style-name="Heading_20_1">
      <style:paragraph-properties fo:break-before="page"/>
      <style:text-properties officeooo:paragraph-rsid="028987e5"/>
    </style:style>
    <style:style style:name="P35" style:family="paragraph" style:parent-style-name="Text_20_body">
      <style:text-properties officeooo:paragraph-rsid="02acffa1"/>
    </style:style>
    <style:style style:name="P36" style:family="paragraph" style:parent-style-name="Text_20_body">
      <style:paragraph-properties fo:break-before="page"/>
      <style:text-properties officeooo:paragraph-rsid="02920498"/>
    </style:style>
    <style:style style:name="P37" style:family="paragraph" style:parent-style-name="Text_20_body">
      <style:text-properties fo:font-size="8pt" fo:language="pl" fo:country="PL" officeooo:rsid="026d6fe8" officeooo:paragraph-rsid="02920498" style:font-size-asian="8pt" style:font-size-complex="8pt"/>
    </style:style>
    <style:style style:name="P38" style:family="paragraph" style:parent-style-name="Text_20_body">
      <style:text-properties fo:font-size="8pt" fo:language="pl" fo:country="PL" officeooo:rsid="011b8e69" officeooo:paragraph-rsid="02920498" style:font-size-asian="8pt" style:font-size-complex="8pt"/>
    </style:style>
    <style:style style:name="P39" style:family="paragraph" style:parent-style-name="Text_20_body">
      <style:text-properties officeooo:paragraph-rsid="02920498"/>
    </style:style>
    <style:style style:name="P40" style:family="paragraph" style:parent-style-name="Text_20_body">
      <style:paragraph-properties fo:text-align="center" style:justify-single-word="false"/>
      <style:text-properties officeooo:paragraph-rsid="02920498"/>
    </style:style>
    <style:style style:name="P41" style:family="paragraph" style:parent-style-name="Text_20_body">
      <style:paragraph-properties fo:text-align="center" style:justify-single-word="false"/>
      <style:text-properties fo:language="pl" fo:country="PL" officeooo:paragraph-rsid="02920498"/>
    </style:style>
    <style:style style:name="P42" style:family="paragraph" style:parent-style-name="code">
      <loext:graphic-properties draw:fill="solid" draw:fill-color="#ffffff" draw:opacity="100%"/>
      <style:paragraph-properties ch2_options="{'Style': 'xcode', 'Language': 'Python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pl" fo:country="PL" fo:font-style="normal" style:text-underline-style="none" fo:font-weight="normal" officeooo:paragraph-rsid="02920498" fo:background-color="transparent" style:font-size-asian="9pt" style:font-size-complex="9pt"/>
    </style:style>
    <style:style style:name="P43" style:family="paragraph" style:parent-style-name="Heading_20_1" style:list-style-name="">
      <style:paragraph-properties>
        <style:tab-stops/>
      </style:paragraph-properties>
      <style:text-properties officeooo:paragraph-rsid="02920498"/>
    </style:style>
    <style:style style:name="P44" style:family="paragraph" style:parent-style-name="Text_20_body">
      <style:text-properties officeooo:paragraph-rsid="02194651"/>
    </style:style>
    <style:style style:name="P45" style:family="paragraph" style:parent-style-name="Text_20_body">
      <style:text-properties officeooo:paragraph-rsid="027001c9"/>
    </style:style>
    <style:style style:name="P46" style:family="paragraph" style:parent-style-name="Text_20_body">
      <style:text-properties officeooo:paragraph-rsid="0299d937"/>
    </style:style>
    <style:style style:name="P47" style:family="paragraph" style:parent-style-name="Text_20_body">
      <style:text-properties fo:font-style="italic" officeooo:paragraph-rsid="02194651" style:font-style-asian="italic" style:font-style-complex="italic"/>
    </style:style>
    <style:style style:name="P48" style:family="paragraph" style:parent-style-name="Text_20_body">
      <style:text-properties fo:language="pl" fo:country="PL" officeooo:paragraph-rsid="005aabe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4ea5c7"/>
    </style:style>
    <style:style style:name="T3" style:family="text">
      <style:text-properties fo:language="pl" fo:country="PL" officeooo:rsid="00578e5f"/>
    </style:style>
    <style:style style:name="T4" style:family="text">
      <style:text-properties fo:language="pl" fo:country="PL" officeooo:rsid="02b80f28"/>
    </style:style>
    <style:style style:name="T5" style:family="text">
      <style:text-properties officeooo:rsid="02b80f28"/>
    </style:style>
    <style:style style:name="T6" style:family="text">
      <style:text-properties officeooo:rsid="02306df0"/>
    </style:style>
    <style:style style:name="T7" style:family="text">
      <style:text-properties officeooo:rsid="009e6b71"/>
    </style:style>
    <style:style style:name="T8" style:family="text">
      <style:text-properties officeooo:rsid="0289e063"/>
    </style:style>
    <style:style style:name="T9" style:family="text">
      <style:text-properties fo:language="pl" fo:country="PL" officeooo:rsid="027001c9"/>
    </style:style>
    <style:style style:name="T10" style:family="text">
      <style:text-properties fo:language="pl" fo:country="PL" officeooo:rsid="0111237a"/>
    </style:style>
    <style:style style:name="T11" style:family="text">
      <style:text-properties fo:language="pl" fo:country="PL" officeooo:rsid="028987e5"/>
    </style:style>
    <style:style style:name="T12" style:family="text">
      <style:text-properties officeooo:rsid="02b97ecf"/>
    </style:style>
    <style:style style:name="T13" style:family="text">
      <style:text-properties fo:language="pl" fo:country="PL" officeooo:rsid="027d3aa7"/>
    </style:style>
    <style:style style:name="T14" style:family="text">
      <style:text-properties fo:language="pl" fo:country="PL" officeooo:rsid="02b97ecf"/>
    </style:style>
    <style:style style:name="T15" style:family="text">
      <style:text-properties fo:language="pl" fo:country="PL" officeooo:rsid="02917667"/>
    </style:style>
    <style:style style:name="T16" style:family="text">
      <style:text-properties officeooo:rsid="02917667"/>
    </style:style>
    <style:style style:name="T17" style:family="text">
      <style:text-properties fo:language="pl" fo:country="PL" officeooo:rsid="02ab09b1"/>
    </style:style>
    <style:style style:name="T18" style:family="text">
      <style:text-properties fo:language="pl" fo:country="PL" officeooo:rsid="02899d16"/>
    </style:style>
    <style:style style:name="T19" style:family="text">
      <style:text-properties fo:color="#000000" loext:opacity="100%" fo:language="pl" fo:country="PL" officeooo:rsid="02acffa1"/>
    </style:style>
    <style:style style:name="T20" style:family="text">
      <style:text-properties fo:color="#000000" loext:opacity="100%" fo:language="pl" fo:country="PL" officeooo:rsid="02ad0769"/>
    </style:style>
    <style:style style:name="T21" style:family="text">
      <style:text-properties fo:font-size="8pt" fo:language="pl" fo:country="PL" officeooo:rsid="011b8e69" style:font-size-asian="8pt" style:font-size-complex="8pt"/>
    </style:style>
    <style:style style:name="T22" style:family="text">
      <style:text-properties fo:font-size="8pt" fo:language="pl" fo:country="PL" officeooo:rsid="026d6fe8" style:font-size-asian="8pt" style:font-size-complex="8pt"/>
    </style:style>
    <style:style style:name="T23" style:family="text">
      <style:text-properties fo:language="pl" fo:country="PL" fo:font-weight="normal" officeooo:rsid="008cf629" style:font-weight-asian="normal" style:font-weight-complex="normal"/>
    </style:style>
    <style:style style:name="T24" style:family="text">
      <style:text-properties fo:font-size="8pt" fo:language="pl" fo:country="PL" fo:font-weight="normal" officeooo:rsid="008bdd71" style:font-size-asian="8pt" style:font-weight-asian="normal" style:font-size-complex="8pt" style:font-weight-complex="normal"/>
    </style:style>
    <style:style style:name="T25" style:family="text">
      <style:text-properties fo:font-size="8pt" fo:language="pl" fo:country="PL" fo:font-weight="normal" officeooo:rsid="026d6fe8" style:font-size-asian="8pt" style:font-weight-asian="normal" style:font-size-complex="8pt" style:font-weight-complex="normal"/>
    </style:style>
    <style:style style:name="T26" style:family="text">
      <style:text-properties fo:font-size="8pt" fo:language="pl" fo:country="PL" fo:font-weight="normal" officeooo:rsid="00901582" style:font-size-asian="8pt" style:font-weight-asian="normal" style:font-size-complex="8pt" style:font-weight-complex="normal"/>
    </style:style>
    <style:style style:name="T27" style:family="text">
      <style:text-properties fo:font-size="8pt" fo:language="pl" fo:country="PL" fo:font-style="normal" officeooo:rsid="01ab3222" style:font-size-asian="8pt" style:font-style-asian="normal" style:font-size-complex="8pt" style:font-style-complex="normal"/>
    </style:style>
    <style:style style:name="T28" style:family="text">
      <style:text-properties fo:font-size="8pt" fo:language="pl" fo:country="PL" fo:font-style="normal" officeooo:rsid="027001c9" style:font-size-asian="8pt" style:font-style-asian="normal" style:font-size-complex="8pt" style:font-style-complex="normal"/>
    </style:style>
    <style:style style:name="T29" style:family="text">
      <style:text-properties fo:font-size="8pt" fo:language="pl" fo:country="PL" fo:font-style="normal" officeooo:rsid="027bc5b5" style:font-size-asian="8pt" style:font-style-asian="normal" style:font-size-complex="8pt" style:font-style-complex="normal"/>
    </style:style>
    <style:style style:name="T30" style:family="text">
      <style:text-properties fo:color="#a90d91" loext:opacity="100%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officeooo:rsid="0278f4d1"/>
    </style:style>
    <style:style style:name="T33" style:family="text">
      <style:text-properties fo:color="#000000" loext:opacity="100%" fo:font-size="8pt" fo:language="pl" fo:country="PL" fo:font-style="normal" officeooo:rsid="0111237a" style:font-size-asian="8pt" style:font-style-asian="normal" style:font-size-complex="8pt" style:font-style-complex="normal"/>
    </style:style>
    <style:style style:name="T34" style:family="text">
      <style:text-properties fo:language="pl" fo:country="PL" officeooo:rsid="011f1c97"/>
    </style:style>
    <style:style style:name="T35" style:family="text">
      <style:text-properties fo:language="pl" fo:country="PL" officeooo:rsid="0299d937"/>
    </style:style>
    <style:style style:name="T36" style:family="text">
      <style:text-properties fo:language="pl" fo:country="PL" officeooo:rsid="011d1e45"/>
    </style:style>
    <style:style style:name="T37" style:family="text">
      <style:text-properties fo:language="pl" fo:country="PL" fo:font-style="italic" style:text-underline-style="none" fo:font-weight="normal" officeooo:rsid="011d1e45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y="0.307cm" svg:width="14.063cm" svg:height="4.136cm" draw:z-index="0"><draw:image xlink:href="Pictures/1000000000000CFA000003D11ECAF20F.jpg" xlink:type="simple" xlink:show="embed" xlink:actuate="onLoad" draw:mime-type="image/jpeg"/></draw:frame></text:p>
      <text:p text:style-name="P1"/>
      <text:p text:style-name="P2">Cyberbezpieczeństwo</text:p>
      <text:p text:style-name="P3">Projekt</text:p>
      <text:p text:style-name="P4"/>
      <text:p text:style-name="P4"/>
      <text:p text:style-name="P4"/>
      <text:p text:style-name="P3">Temat projektu</text:p>
      <text:p text:style-name="P5">Szyfrowanie plików i bezpieczna wymiana kluczy </text:p>
      <text:p text:style-name="P6">(alt: System bezpiecznej wymiany plików z wykorzystaniem kryptografii symetrycznej i asymetrycznej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Jakub Lewandowski</text:p>
      <text:p text:style-name="P9">3EF-ZI</text:p>
      <text:p text:style-name="P8">178746</text:p>
      <text:p text:style-name="P7"/>
      <text:p text:style-name="P8">i</text:p>
      <text:p text:style-name="P8"/>
      <text:p text:style-name="P10">Paweł Torba</text:p>
      <text:p text:style-name="P10">3EF-ZI</text:p>
      <text:p text:style-name="P7">178763</text:p>
      <text:p text:style-name="P7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pis treści</text:p>
          </text:index-title>
          <text:p text:style-name="P11"><text:a xlink:type="simple" xlink:href="#__RefHeading___Toc3534_2443504791" text:style-name="Index_20_Link" text:visited-style-name="Index_20_Link">1. Cel projektu<text:tab/>3</text:a></text:p>
          <text:p text:style-name="P11"><text:a xlink:type="simple" xlink:href="#__RefHeading___Toc419_2443504791" text:style-name="Index_20_Link" text:visited-style-name="Index_20_Link">2. Główne funkcje i zakres systemu<text:tab/>4</text:a></text:p>
          <text:p text:style-name="P11"><text:a xlink:type="simple" xlink:href="#__RefHeading___Toc421_2443504791" text:style-name="Index_20_Link" text:visited-style-name="Index_20_Link">3. Podstawy teoretyczne kryptografii<text:tab/>4</text:a></text:p>
          <text:p text:style-name="P12"><text:a xlink:type="simple" xlink:href="#__RefHeading___Toc11890_3356077753%20kopia%203" text:style-name="Index_20_Link" text:visited-style-name="Index_20_Link">3.1. Kryptografia symetryczna<text:tab/>4</text:a></text:p>
          <text:p text:style-name="P12"><text:a xlink:type="simple" xlink:href="#__RefHeading___Toc11890_3356077753%20kopia%204" text:style-name="Index_20_Link" text:visited-style-name="Index_20_Link">3.2. Kryptografia asymetryczna<text:tab/>4</text:a></text:p>
          <text:p text:style-name="P12"><text:a xlink:type="simple" xlink:href="#__RefHeading___Toc11890_3356077753%20kopia%203%20kopia%201" text:style-name="Index_20_Link" text:visited-style-name="Index_20_Link">3.3. Algorytm AES<text:tab/>4</text:a></text:p>
          <text:p text:style-name="P12"><text:a xlink:type="simple" xlink:href="#__RefHeading___Toc11890_3356077753%20kopia%203%20kopia%202" text:style-name="Index_20_Link" text:visited-style-name="Index_20_Link">3.4. Algorytm RSA<text:tab/>4</text:a></text:p>
          <text:p text:style-name="P12"><text:a xlink:type="simple" xlink:href="#__RefHeading___Toc11890_3356077753%20kopia%203%20kopia%202%20kopia%201" text:style-name="Index_20_Link" text:visited-style-name="Index_20_Link">3.5. SHA-256<text:tab/>4</text:a></text:p>
          <text:p text:style-name="P12"><text:a xlink:type="simple" xlink:href="#__RefHeading___Toc11890_3356077753%20kopia%203%20kopia%202%20kopia%202" text:style-name="Index_20_Link" text:visited-style-name="Index_20_Link">3.6. Podpis cyfrowych<text:tab/>4</text:a></text:p>
          <text:p text:style-name="P12"><text:a xlink:type="simple" xlink:href="#__RefHeading___Toc3002_1804544189" text:style-name="Index_20_Link" text:visited-style-name="Index_20_Link">3.7. Integralność i poufność danych<text:tab/>4</text:a></text:p>
          <text:p text:style-name="P11"><text:a xlink:type="simple" xlink:href="#__RefHeading___Toc425_2443504791%20Copy%201%20Copy%201" text:style-name="Index_20_Link" text:visited-style-name="Index_20_Link">4. Technologie i narzędzia<text:tab/>5</text:a></text:p>
          <text:p text:style-name="P12"><text:a xlink:type="simple" xlink:href="#__RefHeading___Toc11890_3356077753" text:style-name="Index_20_Link" text:visited-style-name="Index_20_Link">4.1. Python i biblioteki kryptograficzne<text:tab/>5</text:a></text:p>
          <text:p text:style-name="P12"><text:a xlink:type="simple" xlink:href="#__RefHeading___Toc11892_3356077753" text:style-name="Index_20_Link" text:visited-style-name="Index_20_Link">4.2. OpenSSL i GPG<text:tab/>5</text:a></text:p>
          <text:p text:style-name="P12"><text:a xlink:type="simple" xlink:href="#__RefHeading___Toc11894_3356077753" text:style-name="Index_20_Link" text:visited-style-name="Index_20_Link">4.3. Środowisko programistyczne/testowe<text:tab/>5</text:a></text:p>
          <text:p text:style-name="P12"><text:a xlink:type="simple" xlink:href="#__RefHeading___Toc11900_3356077753" text:style-name="Index_20_Link" text:visited-style-name="Index_20_Link">4.4. System operacyny i wymiagania sprzętowe<text:tab/>5</text:a></text:p>
          <text:p text:style-name="P11"><text:a xlink:type="simple" xlink:href="#__RefHeading___Toc12126_3356077753" text:style-name="Index_20_Link" text:visited-style-name="Index_20_Link">5. Architektura aplikacji<text:tab/>5</text:a></text:p>
          <text:p text:style-name="P12"><text:a xlink:type="simple" xlink:href="#__RefHeading___Toc11892_3356077753%20kopia%201" text:style-name="Index_20_Link" text:visited-style-name="Index_20_Link">5.1. Struktura katalogów i plików<text:tab/>5</text:a></text:p>
          <text:p text:style-name="P12"><text:a xlink:type="simple" xlink:href="#__RefHeading___Toc11892_3356077753%20kopia%202" text:style-name="Index_20_Link" text:visited-style-name="Index_20_Link">5.2. Moduły systemu<text:tab/>5</text:a></text:p>
          <text:p text:style-name="P12"><text:a xlink:type="simple" xlink:href="#__RefHeading___Toc11892_3356077753%20kopia%203" text:style-name="Index_20_Link" text:visited-style-name="Index_20_Link">5.3. Zarządzanie kluczami<text:tab/>5</text:a></text:p>
          <text:p text:style-name="P11"><text:a xlink:type="simple" xlink:href="#__RefHeading___Toc12128_3356077753" text:style-name="Index_20_Link" text:visited-style-name="Index_20_Link">6. Diagram przepływu danych (szyfrowanie/odszyfrowanie itp)<text:tab/>5</text:a></text:p>
          <text:p text:style-name="P11"><text:a xlink:type="simple" xlink:href="#__RefHeading___Toc7243_1429308687" text:style-name="Index_20_Link" text:visited-style-name="Index_20_Link">7. Bezpieczeństwo systemu i możliwe zagrożenia<text:tab/>5</text:a></text:p>
          <text:p text:style-name="P11"><text:a xlink:type="simple" xlink:href="#__RefHeading___Toc7245_1429308687" text:style-name="Index_20_Link" text:visited-style-name="Index_20_Link">8. Implementacja systemu<text:tab/>5</text:a></text:p>
          <text:p text:style-name="P11"><text:a xlink:type="simple" xlink:href="#__RefHeading___Toc7245_1429308687%20kopia%201" text:style-name="Index_20_Link" text:visited-style-name="Index_20_Link">9. Przykład użycia / testowanie systemu<text:tab/>5</text:a></text:p>
          <text:p text:style-name="P11"><text:a xlink:type="simple" xlink:href="#__RefHeading___Toc3004_1804544189" text:style-name="Index_20_Link" text:visited-style-name="Index_20_Link">10. Implementacja systemu<text:tab/>5</text:a></text:p>
          <text:p text:style-name="P11"><text:a xlink:type="simple" xlink:href="#__RefHeading___Toc3006_1804544189" text:style-name="Index_20_Link" text:visited-style-name="Index_20_Link">13. Podsumowanie i wnioski<text:tab/>5</text:a></text:p>
          <text:p text:style-name="P11"><text:a xlink:type="simple" xlink:href="#__RefHeading___Toc12132_3356077753%20Copy%203" text:style-name="Index_20_Link" text:visited-style-name="Index_20_Link">14. Załączniki<text:tab/>6</text:a></text:p>
          <text:p text:style-name="P11"><text:a xlink:type="simple" xlink:href="#__RefHeading___Toc431_2443504791" text:style-name="Index_20_Link" text:visited-style-name="Index_20_Link">14. Zasoby i odniesienia<text:tab/>8</text:a></text:p>
        </text:index-body>
      </text:table-of-content>
      <text:p text:style-name="P13"/>
      <text:p text:style-name="P13"/>
      <text:p text:style-name="Text_20_body"><text:span text:style-name="Strong_20_Emphasis"><text:span text:style-name="T1"/></text:span></text:p>
      <text:h text:style-name="P14" text:outline-level="1"><text:bookmark-start text:name="__RefHeading___Toc3534_2443504791"/><text:span text:style-name="Strong_20_Emphasis"><text:span text:style-name="T2">1.<text:tab/>Cel projektu</text:span></text:span><text:bookmark-end text:name="__RefHeading___Toc3534_2443504791"/></text:h>
      <text:p text:style-name="P15"><text:tab/>Celem projektu jest opracowanie prostej aplikacji umożliwiającej bezpieczne szyfrowanie i wymianę danych. System ma pozwalać na zaszyfrowanie pliku, bezpieczne przekazanie klucza szyfrującego, podpisanie pliku podpisem cyfrowym, weryfikację podpisu, sprawdzenie integralności danych oraz odszyfrowanie pliku po stronie odbiorcy.</text:p>
      <text:p text:style-name="P16"><text:tab/>Projekt obejmuje również analizę teoretycznych podstaw kryptografii, w szczególności zagadnień związanych z szyfrowaniem symetrycznym i asymetrycznym, podpisem cyfrowym, wymianą kluczy oraz mechanizmami zapewniania integralności i bezpieczeństwa danych.</text:p>
      <text:p text:style-name="P15"/>
      <text:p text:style-name="P17"/>
      <text:p text:style-name="P17"/>
      <text:p text:style-name="P18"/>
      <text:h text:style-name="P19" text:outline-level="1"><text:span text:style-name="Strong_20_Emphasis"><text:span text:style-name="T3"/></text:span></text:h>
      <text:h text:style-name="P20" text:outline-level="1"><text:bookmark-start text:name="__RefHeading___Toc419_2443504791"/><text:span text:style-name="Strong_20_Emphasis"><text:span text:style-name="T3">2.<text:tab/>Główne funkcje i zakres </text:span></text:span><text:span text:style-name="Strong_20_Emphasis"><text:span text:style-name="T4">systemu</text:span></text:span><text:bookmark-end text:name="__RefHeading___Toc419_2443504791"/></text:h>
      <text:h text:style-name="P21" text:outline-level="1"><text:bookmark-start text:name="__RefHeading___Toc421_2443504791"/>3. <text:tab/><text:span text:style-name="T5">Podstawy teoretyczne kryptografii</text:span><text:bookmark-end text:name="__RefHeading___Toc421_2443504791"/></text:h>
      <text:h text:style-name="P22" text:outline-level="2"><text:bookmark-start text:name="__RefHeading___Toc11890_3356077753 kopia 3"/><text:span text:style-name="T5">3</text:span>.1.<text:tab/><text:span text:style-name="T5">Kryptografia symetryczna</text:span><text:bookmark-end text:name="__RefHeading___Toc11890_3356077753 kopia 3"/></text:h>
      <text:h text:style-name="P22" text:outline-level="2"><text:bookmark-start text:name="__RefHeading___Toc11890_3356077753 kopia 4"/><text:span text:style-name="T5">3</text:span>.<text:span text:style-name="T5">2</text:span>.<text:tab/><text:span text:style-name="T5">Kryptografia asymetryczna</text:span><text:bookmark-end text:name="__RefHeading___Toc11890_3356077753 kopia 4"/></text:h>
      <text:h text:style-name="P22" text:outline-level="2"><text:bookmark-start text:name="__RefHeading___Toc11890_3356077753 kopia 3 kopia 1"/>3.<text:span text:style-name="T5">3</text:span>.<text:tab/><text:span text:style-name="T5">Algorytm AES</text:span><text:bookmark-end text:name="__RefHeading___Toc11890_3356077753 kopia 3 kopia 1"/></text:h>
      <text:h text:style-name="P22" text:outline-level="2"><text:bookmark-start text:name="__RefHeading___Toc11890_3356077753 kopia 3 kopia 2"/>3.<text:span text:style-name="T5">4</text:span>.<text:tab/><text:span text:style-name="T5">Algorytm RSA</text:span><text:bookmark-end text:name="__RefHeading___Toc11890_3356077753 kopia 3 kopia 2"/></text:h>
      <text:h text:style-name="P22" text:outline-level="2"><text:bookmark-start text:name="__RefHeading___Toc11890_3356077753 kopia 3 kopia 2 kopia 1"/>3.<text:span text:style-name="T5">5</text:span>.<text:tab/><text:span text:style-name="T5">SHA-256</text:span><text:bookmark-end text:name="__RefHeading___Toc11890_3356077753 kopia 3 kopia 2 kopia 1"/></text:h>
      <text:h text:style-name="P22" text:outline-level="2"><text:bookmark-start text:name="__RefHeading___Toc11890_3356077753 kopia 3 kopia 2 kopia 2"/>3.<text:span text:style-name="T5">6</text:span>.<text:tab/><text:span text:style-name="T5">Podpis cyfrowych</text:span><text:bookmark-end text:name="__RefHeading___Toc11890_3356077753 kopia 3 kopia 2 kopia 2"/></text:h>
      <text:h text:style-name="P23" text:outline-level="2"><text:bookmark-start text:name="__RefHeading___Toc3002_1804544189"/>3.7.<text:tab/>Integralność i poufność danych<text:bookmark-end text:name="__RefHeading___Toc3002_1804544189"/></text:h>
      <text:h text:style-name="P24" text:outline-level="1" text:is-list-header="true"><text:bookmark-start text:name="__RefHeading___Toc425_2443504791 Copy 1 Copy 1"/><text:span text:style-name="T6">4</text:span><text:span text:style-name="T7">.<text:tab/>Technologie i narzędzia</text:span><text:bookmark-end text:name="__RefHeading___Toc425_2443504791 Copy 1 Copy 1"/></text:h>
      <text:h text:style-name="P25" text:outline-level="2"><text:bookmark-start text:name="__RefHeading___Toc11890_3356077753"/>4.1.<text:tab/><text:span text:style-name="T5">Python i biblioteki kryptograficzne</text:span><text:bookmark-end text:name="__RefHeading___Toc11890_3356077753"/></text:h>
      <text:p text:style-name="P15">np.: cryptography i PyCryptodome + bilbioteki gui</text:p>
      <text:h text:style-name="P26" text:outline-level="2"><text:bookmark-start text:name="__RefHeading___Toc11892_3356077753"/>4.<text:span text:style-name="T8">2</text:span>.<text:tab/><text:span text:style-name="T5">OpenSSL i GPG</text:span><text:bookmark-end text:name="__RefHeading___Toc11892_3356077753"/></text:h>
      <text:h text:style-name="Heading_20_2" text:outline-level="2"><text:bookmark-start text:name="__RefHeading___Toc11894_3356077753"/><text:span text:style-name="Strong_20_Emphasis">4.3. <text:tab/></text:span><text:span text:style-name="Strong_20_Emphasis"><text:span text:style-name="T5">Środowisko programistyczne/testowe</text:span></text:span><text:bookmark-end text:name="__RefHeading___Toc11894_3356077753"/></text:h>
      <text:h text:style-name="P27" text:outline-level="2"><text:bookmark-start text:name="__RefHeading___Toc11900_3356077753"/><text:span text:style-name="Strong_20_Emphasis">4.</text:span><text:span text:style-name="Strong_20_Emphasis"><text:span text:style-name="T8">4</text:span></text:span><text:span text:style-name="Strong_20_Emphasis">. </text:span><text:span text:style-name="Strong_20_Emphasis"><text:span text:style-name="T5">System operacyny i wymiagania sprzętowe</text:span></text:span><text:bookmark-end text:name="__RefHeading___Toc11900_3356077753"/></text:h>
      <text:h text:style-name="P28" text:outline-level="1"><text:bookmark-start text:name="__RefHeading___Toc12126_3356077753"/><text:span text:style-name="Strong_20_Emphasis"><text:span text:style-name="T9">5</text:span></text:span><text:span text:style-name="Strong_20_Emphasis"><text:span text:style-name="T10">.<text:tab/></text:span></text:span><text:span text:style-name="Strong_20_Emphasis"><text:span text:style-name="T11">Architektura </text:span></text:span><text:span text:style-name="Strong_20_Emphasis"><text:span text:style-name="T4">aplikacji</text:span></text:span><text:bookmark-end text:name="__RefHeading___Toc12126_3356077753"/></text:h>
      <text:h text:style-name="P29" text:outline-level="2"><text:bookmark-start text:name="__RefHeading___Toc11892_3356077753 kopia 1"/><text:span text:style-name="T5">5.1</text:span>.<text:tab/><text:span text:style-name="T5">Struktura katalogów i plików</text:span><text:bookmark-end text:name="__RefHeading___Toc11892_3356077753 kopia 1"/></text:h>
      <text:h text:style-name="P29" text:outline-level="2"><text:bookmark-start text:name="__RefHeading___Toc11892_3356077753 kopia 2"/><text:span text:style-name="T5">5</text:span>.<text:span text:style-name="T8">2</text:span>.<text:tab/><text:span text:style-name="T12">Moduły systemu</text:span><text:bookmark-end text:name="__RefHeading___Toc11892_3356077753 kopia 2"/></text:h>
      <text:h text:style-name="P30" text:outline-level="2"><text:bookmark-start text:name="__RefHeading___Toc11892_3356077753 kopia 3"/><text:span text:style-name="T12">5</text:span>.<text:span text:style-name="T12">3</text:span>.<text:tab/><text:span text:style-name="T12">Zarządzanie kluczami</text:span><text:bookmark-end text:name="__RefHeading___Toc11892_3356077753 kopia 3"/></text:h>
      <text:h text:style-name="P28" text:outline-level="1" text:is-list-header="true"><text:bookmark-start text:name="__RefHeading___Toc12128_3356077753"/><text:span text:style-name="Strong_20_Emphasis"><text:span text:style-name="T13">6</text:span></text:span><text:span text:style-name="Strong_20_Emphasis"><text:span text:style-name="T10">.<text:tab/></text:span></text:span><text:span text:style-name="Strong_20_Emphasis"><text:span text:style-name="T14">Diagram przepływu danych (szyfrowanie/odszyfrowanie itp)</text:span></text:span><text:bookmark-end text:name="__RefHeading___Toc12128_3356077753"/></text:h>
      <text:h text:style-name="P31" text:outline-level="1" text:is-list-header="true"><text:bookmark-start text:name="__RefHeading___Toc7243_1429308687"/><text:span text:style-name="Strong_20_Emphasis"><text:span text:style-name="T15">7</text:span></text:span><text:span text:style-name="Strong_20_Emphasis"><text:span text:style-name="T10">.<text:tab/></text:span></text:span><text:span text:style-name="Strong_20_Emphasis"><text:span text:style-name="T13">Bezpieczeństwo </text:span></text:span><text:span text:style-name="Strong_20_Emphasis"><text:span text:style-name="T14">systemu i możliwe zagrożenia</text:span></text:span><text:bookmark-end text:name="__RefHeading___Toc7243_1429308687"/></text:h>
      <text:h text:style-name="P32" text:outline-level="1"><text:bookmark-start text:name="__RefHeading___Toc7245_1429308687"/><text:span text:style-name="Strong_20_Emphasis"><text:span text:style-name="T16">8</text:span></text:span><text:span text:style-name="Strong_20_Emphasis">. <text:tab/></text:span><text:span text:style-name="Strong_20_Emphasis"><text:span text:style-name="T12">I</text:span></text:span><text:span text:style-name="Strong_20_Emphasis"><text:span text:style-name="T14">mplementacja systemu</text:span></text:span><text:bookmark-end text:name="__RefHeading___Toc7245_1429308687"/></text:h>
      <text:h text:style-name="P32" text:outline-level="1"><text:bookmark-start text:name="__RefHeading___Toc7245_1429308687 kopia 1"/><text:span text:style-name="Strong_20_Emphasis"><text:span text:style-name="T14">9. <text:tab/>Przykład użycia / testowanie systemu</text:span></text:span><text:bookmark-end text:name="__RefHeading___Toc7245_1429308687 kopia 1"/></text:h>
      <text:h text:style-name="P32" text:outline-level="1"><text:bookmark-start text:name="__RefHeading___Toc3004_1804544189"/><text:span text:style-name="Strong_20_Emphasis"><text:span text:style-name="T14">10. <text:tab/>Implementacja systemu</text:span></text:span><text:bookmark-end text:name="__RefHeading___Toc3004_1804544189"/></text:h>
      <text:h text:style-name="P32" text:outline-level="1"><text:bookmark-start text:name="__RefHeading___Toc3006_1804544189"/><text:span text:style-name="Strong_20_Emphasis"><text:span text:style-name="T11">1</text:span></text:span><text:span text:style-name="Strong_20_Emphasis"><text:span text:style-name="T17">3</text:span></text:span><text:span text:style-name="Strong_20_Emphasis"><text:span text:style-name="T10">.<text:tab/></text:span></text:span><text:span text:style-name="Strong_20_Emphasis"><text:span text:style-name="T18">Podsumowanie i wnioski</text:span></text:span><text:bookmark-end text:name="__RefHeading___Toc3006_1804544189"/></text:h>
      <text:h text:style-name="P33" text:outline-level="1"><text:span text:style-name="Strong_20_Emphasis"><text:span text:style-name="T11"/></text:span></text:h>
      <text:h text:style-name="P34" text:outline-level="1"><text:bookmark-start text:name="__RefHeading___Toc12132_3356077753 Copy 3"/><text:span text:style-name="Strong_20_Emphasis"><text:span text:style-name="T11">1</text:span></text:span><text:span text:style-name="Strong_20_Emphasis"><text:span text:style-name="T17">4</text:span></text:span><text:span text:style-name="Strong_20_Emphasis"><text:span text:style-name="T10">.<text:tab/></text:span></text:span><text:span text:style-name="Strong_20_Emphasis"><text:span text:style-name="T13">Załączniki</text:span></text:span><text:bookmark-end text:name="__RefHeading___Toc12132_3356077753 Copy 3"/></text:h>
      <text:p text:style-name="P35"><text:span text:style-name="Strong_20_Emphasis"><text:span text:style-name="T18">czy cele osiągnięte</text:span></text:span></text:p>
      <text:p text:style-name="P35"><text:span text:style-name="Strong_20_Emphasis"><text:span text:style-name="T19">repo github </text:span></text:span><text:span text:style-name="Strong_20_Emphasis"><text:span text:style-name="T20">ew. listingi</text:span></text:span></text:p>
      <text:p text:style-name="P36"><text:span text:style-name="T21">Tabela 1. </text:span><text:span text:style-name="T22">PLACEHOLDER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7">PLACEHOLDER</text:p>
          </table:table-cell>
          <table:table-cell table:style-name="Table1.A1" office:value-type="string">
            <text:p text:style-name="P37">PLACEHOLDER</text:p>
          </table:table-cell>
          <table:table-cell table:style-name="Table1.C1" office:value-type="string">
            <text:p text:style-name="P37">PLACEHOLDER</text:p>
          </table:table-cell>
        </table:table-row>
        <table:table-row>
          <table:table-cell table:style-name="Table1.A2" office:value-type="string">
            <text:p text:style-name="P37">PLACEHOLDER</text:p>
          </table:table-cell>
          <table:table-cell table:style-name="Table1.A2" office:value-type="string">
            <text:p text:style-name="P37">PLACEHOLDER</text:p>
          </table:table-cell>
          <table:table-cell table:style-name="Table1.C2" office:value-type="string">
            <text:p text:style-name="P37">PLACEHOLDER</text:p>
          </table:table-cell>
        </table:table-row>
      </table:table>
      <text:p text:style-name="P38"/>
      <text:p text:style-name="P39"><text:span text:style-name="T1"><text:tab/></text:span><draw:frame draw:style-name="fr2" draw:name="Image7" text:anchor-type="char" svg:x="6.463cm" svg:y="0.157cm" svg:width="3.6cm" svg:height="5.271cm" draw:z-index="1"><draw:image xlink:href="Pictures/100000010000009A000000E29439C70F.png" xlink:type="simple" xlink:show="embed" xlink:actuate="onLoad" draw:mime-type="image/png"/></draw:frame></text:p>
      <text:p text:style-name="P39"><text:span text:style-name="Strong_20_Emphasis"><text:span text:style-name="T23"/></text:span></text:p>
      <text:p text:style-name="P40"><text:span text:style-name="Strong_20_Emphasis"><text:span text:style-name="T24"/></text:span></text:p>
      <text:p text:style-name="P40"><text:span text:style-name="Strong_20_Emphasis"><text:span text:style-name="T24"/></text:span></text:p>
      <text:p text:style-name="P40"><text:span text:style-name="Strong_20_Emphasis"><text:span text:style-name="T24"/></text:span></text:p>
      <text:p text:style-name="P40"><text:span text:style-name="Strong_20_Emphasis"><text:span text:style-name="T24"/></text:span></text:p>
      <text:p text:style-name="P40"><text:span text:style-name="Strong_20_Emphasis"><text:span text:style-name="T24"/></text:span></text:p>
      <text:p text:style-name="P40"><text:span text:style-name="Strong_20_Emphasis"><text:span text:style-name="T24"/></text:span></text:p>
      <text:p text:style-name="P40"><text:span text:style-name="Strong_20_Emphasis"><text:span text:style-name="T24">Rys. </text:span></text:span><text:span text:style-name="Strong_20_Emphasis"><text:span text:style-name="T25">1</text:span></text:span><text:span text:style-name="Strong_20_Emphasis"><text:span text:style-name="T26">.</text:span></text:span><text:span text:style-name="Strong_20_Emphasis"><text:span text:style-name="T24"> </text:span></text:span><text:span text:style-name="Strong_20_Emphasis"><text:span text:style-name="T25">PLACEHOLDER</text:span></text:span></text:p>
      <text:p text:style-name="P41"><text:bookmark text:name="__RefHeading___Toc425_2443504791 Copy 1"/></text:p>
      <text:p text:style-name="P39"><text:span text:style-name="T27">Listing </text:span><text:span text:style-name="T28">1</text:span><text:span text:style-name="T27"> </text:span><text:span text:style-name="T29">PLACEHOLDER</text:span><text:span text:style-name="T27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2"><text:span text:style-name="T30">import</text:span><text:span text:style-name="T31"> </text:span><text:span text:style-name="T32">placeholder</text:span><text:span text:style-name="T31"> </text:span><text:span text:style-name="T30">as</text:span><text:span text:style-name="T31"> </text:span><text:span text:style-name="T32">pholder</text:span></text:p>
            <text:p text:style-name="P42"><text:span text:style-name="T31"/></text:p>
          </table:table-cell>
        </table:table-row>
      </table:table>
      <text:h text:style-name="P43" text:outline-level="1"><text:span text:style-name="Strong_20_Emphasis"><text:span text:style-name="T33"/></text:span></text:h>
      <text:h text:style-name="P20" text:outline-level="1"><text:bookmark-start text:name="__RefHeading___Toc431_2443504791"/><text:span text:style-name="Strong_20_Emphasis"><text:span text:style-name="T18">14</text:span></text:span><text:span text:style-name="Strong_20_Emphasis"><text:span text:style-name="T34">.<text:tab/></text:span></text:span><text:span text:style-name="Strong_20_Emphasis"><text:span text:style-name="T35">Zasoby i odniesienia</text:span></text:span><text:bookmark-end text:name="__RefHeading___Toc431_2443504791"/></text:h>
      <text:p text:style-name="P44"><text:span text:style-name="Strong_20_Emphasis"><text:span text:style-name="T36">[1] </text:span></text:span><text:span text:style-name="Strong_20_Emphasis"><text:span text:style-name="T35">PlatformIO</text:span></text:span></text:p>
      <text:p text:style-name="P45"><text:a xlink:type="simple" xlink:href="https://platformio.org/" text:style-name="Internet_20_link" text:visited-style-name="Visited_20_Internet_20_Link"><text:span text:style-name="Strong_20_Emphasis"><text:span text:style-name="T37">https://platformio.org/</text:span></text:span></text:a></text:p>
      <text:p text:style-name="P46"><text:span text:style-name="Strong_20_Emphasis"><text:span text:style-name="T37"/></text:span></text:p>
      <text:p text:style-name="P47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tyle="normal" officeooo:rsid="00b881c5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left="0cm" fo:margin-right="0cm" style:line-height-at-least="0.503cm" fo:text-indent="0cm" style:auto-text-indent="false" fo:background-color="#f8f8f8"/>
      <style:text-properties style:use-window-font-color="true" loext:opacity="0%" style:font-name="JetBrains Mono" fo:font-family="'JetBrains Mono'" style:font-pitch="fixed" fo:font-size="10.5pt" fo:language="zxx" fo:country="none" fo:font-style="normal" style:text-underline-style="none" fo:font-weight="normal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omyślna_20_czcionka_20_akapitu" style:display-name="Domyślna czcionka akapitu" style:family="text"/>
    <style:style style:name="WW_5f_CharLFO15LVL1" style:display-name="WW_CharLFO1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6pt" fo:language="pl" fo:country="PL" officeooo:rsid="0140a4da" officeooo:paragraph-rsid="0140a4da" style:font-size-asian="6pt" style:font-size-complex="6pt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paragraph-rsid="00da6fcb"/>
    </style:style>
    <style:style style:name="MT1" style:family="text">
      <style:text-properties officeooo:rsid="026ac3c5"/>
    </style:style>
    <style:style style:name="MT2" style:family="text">
      <style:text-properties officeooo:rsid="02b6cb7d"/>
    </style:style>
    <style:style style:name="MT3" style:family="text">
      <style:text-properties fo:font-weight="normal" officeooo:rsid="004cd6be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. Torba, <text:span text:style-name="MT1">J.Lewandowski</text:span>, <text:span text:style-name="MT2">Cyberbezpieczeństwo</text:span> – Projekt, <text:span text:style-name="MT3">Szyfrowanie plików i bezpieczna wymiana kluczy 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23:34:45.987815695</meta:creation-date>
    <dc:date>2026-05-16T20:26:44.946489100</dc:date>
    <meta:editing-duration>PT23H6M7S</meta:editing-duration>
    <meta:editing-cycles>539</meta:editing-cycles>
    <meta:generator>LibreOffice/25.2.7.2$Windows_X86_64 LibreOffice_project/5cbfd1ab6520636bb5f7b99185aa69bd7456825d</meta:generator>
    <meta:print-date>2025-11-30T15:17:43.777011247</meta:print-date>
    <meta:printed-by>PDF files</meta:printed-by>
    <meta:document-statistic meta:table-count="2" meta:image-count="2" meta:object-count="0" meta:page-count="8" meta:paragraph-count="87" meta:word-count="381" meta:character-count="2828" meta:non-whitespace-character-count="2522"/>
  </office:meta>
</office:document-meta>
</file>