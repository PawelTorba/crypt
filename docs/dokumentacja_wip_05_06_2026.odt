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CFA000003D11ECAF20F.jpg" manifest:media-type="image/jpeg"/>
  <manifest:file-entry manifest:full-path="Pictures/10000001000003F7000002F84638A3E9.png" manifest:media-type="image/png"/>
  <manifest:file-entry manifest:full-path="Pictures/10000001000003F9000002F7D10B757C.png" manifest:media-type="image/png"/>
  <manifest:file-entry manifest:full-path="Pictures/10000001000003F9000002F7DD28357A.png" manifest:media-type="image/png"/>
  <manifest:file-entry manifest:full-path="Pictures/100000010000009A000000E29439C70F.png" manifest:media-type="image/png"/>
  <manifest:file-entry manifest:full-path="Pictures/10000001000003F9000002F7D78E24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JetBrains Mono" svg:font-family="'JetBrains Mono'" style:font-family-generic="system" style:font-pitch="fixed"/>
    <style:font-face style:name="JetBrains Mono ExtraLight" svg:font-family="'JetBrains Mono ExtraLigh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49cm" fo:border="0.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49cm" fo:border="0.05pt solid #000000" style:writing-mode="pag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49cm" fo:border="0.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49cm" fo:border="0.05pt solid #000000"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49cm" fo:border="0.05pt solid #000000"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49cm" fo:border="0.05pt solid #000000" style:writing-mode="pag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49cm" fo:border="0.05pt solid #000000"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49cm" fo:border="0.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49cm" fo:border="0.05pt solid #000000"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49cm" fo:border="0.05pt solid #000000" style:writing-mode="page"/>
    </style:style>
    <style:style style:name="Table1" style:family="table">
      <style:table-properties style:width="17cm" fo:margin-left="-0.009cm" table:align="left"/>
    </style:style>
    <style:style style:name="Table1.A" style:family="table-column">
      <style:table-column-properties style:column-width="5.666cm"/>
    </style:style>
    <style:style style:name="Table1.B" style:family="table-column">
      <style:table-column-properties style:column-width="5.667cm"/>
    </style:style>
    <style:style style:name="Table1.A1" style:family="table-cell">
      <style:table-cell-properties fo:padding="0.049cm" fo:border-left="0.25pt solid #000000" fo:border-right="none" fo:border-top="0.25pt solid #000000" fo:border-bottom="0.25pt solid #000000" style:writing-mode="lr-tb"/>
    </style:style>
    <style:style style:name="Table1.C1" style:family="table-cell">
      <style:table-cell-properties fo:padding="0.049cm" fo:border="0.25pt solid #000000" style:writing-mode="lr-tb"/>
    </style:style>
    <style:style style:name="Table1.A2" style:family="table-cell">
      <style:table-cell-properties fo:padding="0.049cm" fo:border-left="0.25pt solid #000000" fo:border-right="none" fo:border-top="none" fo:border-bottom="0.25pt solid #000000" style:writing-mode="lr-tb"/>
    </style:style>
    <style:style style:name="Table1.C2" style:family="table-cell">
      <style:table-cell-properties fo:padding="0.049cm" fo:border-left="0.25pt solid #000000" fo:border-right="0.25pt solid #000000" fo:border-top="none" fo:border-bottom="0.25pt solid #000000" style:writing-mode="lr-tb"/>
    </style:style>
    <style:style style:name="Table2" style:family="table">
      <style:table-properties style:width="17cm" fo:margin-left="-0.009cm" table:align="left"/>
    </style:style>
    <style:style style:name="Table2.A" style:family="table-column">
      <style:table-column-properties style:column-width="17cm"/>
    </style:style>
    <style:style style:name="Table2.A1" style:family="table-cell">
      <style:table-cell-properties fo:padding="0.049cm" fo:border="0.25pt solid #000000" style:writing-mode="lr-tb"/>
    </style:style>
    <style:style style:name="P1" style:family="paragraph" style:parent-style-name="Standard" style:master-page-name="MP0">
      <style:paragraph-properties style:page-number="auto" fo:break-before="pag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fo:text-align="center" style:justify-single-word="false"/>
      <style:text-properties fo:font-size="13pt"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P5" style:family="paragraph" style:parent-style-name="Standard">
      <style:paragraph-properties fo:text-align="center" style:justify-single-word="false" fo:break-before="page"/>
      <style:text-properties fo:font-size="13pt" style:font-size-asian="13pt" style:font-size-complex="13pt"/>
    </style:style>
    <style:style style:name="P6" style:family="paragraph" style:parent-style-name="Normalny">
      <style:paragraph-properties>
        <style:tab-stops>
          <style:tab-stop style:position="16.999cm" style:type="right" style:leader-style="dotted" style:leader-text="."/>
        </style:tab-stops>
      </style:paragraph-properties>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a09c7"/>
    </style:style>
    <style:style style:name="P9" style:family="paragraph" style:parent-style-name="Nagłówek_20_1">
      <style:paragraph-properties fo:text-align="justify" style:justify-single-word="false"/>
      <style:text-properties officeooo:paragraph-rsid="00157535"/>
    </style:style>
    <style:style style:name="P10" style:family="paragraph" style:parent-style-name="Nagłówek_20_2">
      <style:paragraph-properties fo:text-align="justify" style:justify-single-word="false"/>
      <style:text-properties officeooo:paragraph-rsid="0045d0d4"/>
    </style:style>
    <style:style style:name="P11" style:family="paragraph" style:parent-style-name="Text_20_body">
      <style:paragraph-properties fo:text-align="justify" style:justify-single-word="false"/>
      <style:text-properties officeooo:paragraph-rsid="0045d0d4"/>
    </style:style>
    <style:style style:name="P12" style:family="paragraph" style:parent-style-name="Text_20_body">
      <style:text-properties officeooo:paragraph-rsid="0045d0d4"/>
    </style:style>
    <style:style style:name="P13" style:family="paragraph" style:parent-style-name="Nagłówek_20_1">
      <style:paragraph-properties fo:break-before="pag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style style:name="P16" style:family="paragraph" style:parent-style-name="Nagłówek_20_2"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17" style:family="paragraph" style:parent-style-name="Nagłówek_20_2">
      <style:paragraph-properties fo:break-before="page"/>
    </style:style>
    <style:style style:name="P18" style:family="paragraph" style:parent-style-name="Text_20_body" style:list-style-name="L3">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5">
      <style:paragraph-properties fo:text-align="justify" style:justify-single-word="false"/>
      <style:text-properties fo:font-weight="normal" style:font-weight-asian="normal" style:font-weight-complex="normal"/>
    </style:style>
    <style:style style:name="P22" style:family="paragraph" style:parent-style-name="Text_20_body" style:list-style-name="L6">
      <style:paragraph-properties fo:text-align="justify" style:justify-single-word="false"/>
      <style:text-properties fo:font-weight="normal" style:font-weight-asian="normal" style:font-weight-complex="normal"/>
    </style:style>
    <style:style style:name="P23" style:family="paragraph" style:parent-style-name="Text_20_body" style:list-style-name="L7">
      <style:paragraph-properties fo:text-align="justify" style:justify-single-word="false"/>
      <style:text-properties fo:font-weight="normal" style:font-weight-asian="normal" style:font-weight-complex="normal"/>
    </style:style>
    <style:style style:name="P24" style:family="paragraph" style:parent-style-name="Text_20_body" style:list-style-name="L8">
      <style:paragraph-properties fo:text-align="justify" style:justify-single-word="false"/>
    </style:style>
    <style:style style:name="P25" style:family="paragraph" style:parent-style-name="Text_20_body" style:list-style-name="L9">
      <style:paragraph-properties fo:text-align="justify" style:justify-single-word="false"/>
      <style:text-properties fo:font-weight="normal" style:font-weight-asian="normal" style:font-weight-complex="normal"/>
    </style:style>
    <style:style style:name="P26" style:family="paragraph" style:parent-style-name="Text_20_body" style:list-style-name="L10">
      <style:paragraph-properties fo:text-align="justify" style:justify-single-word="false"/>
      <style:text-properties fo:font-weight="normal" style:font-weight-asian="normal" style:font-weight-complex="normal"/>
    </style:style>
    <style:style style:name="P27" style:family="paragraph" style:parent-style-name="Nagłówek_20_2">
      <style:paragraph-properties fo:break-before="page"/>
      <style:text-properties officeooo:paragraph-rsid="003d499e"/>
    </style:style>
    <style:style style:name="P28" style:family="paragraph" style:parent-style-name="Text_20_body" style:list-style-name="L11">
      <style:paragraph-properties fo:text-align="justify" style:justify-single-word="false"/>
    </style:style>
    <style:style style:name="P29" style:family="paragraph" style:parent-style-name="Nagłówek_20_2">
      <style:text-properties officeooo:paragraph-rsid="003d499e"/>
    </style:style>
    <style:style style:name="P30" style:family="paragraph" style:parent-style-name="Text_20_body" style:list-style-name="L12">
      <style:paragraph-properties fo:text-align="justify" style:justify-single-word="false"/>
    </style:style>
    <style:style style:name="P31" style:family="paragraph" style:parent-style-name="Text_20_body" style:list-style-name="L13">
      <style:paragraph-properties fo:text-align="justify" style:justify-single-word="false"/>
    </style:style>
    <style:style style:name="P32" style:family="paragraph" style:parent-style-name="Text_20_body" style:list-style-name="L13">
      <style:paragraph-properties fo:text-align="justify" style:justify-single-word="false"/>
      <style:text-properties officeooo:paragraph-rsid="00176e01"/>
    </style:style>
    <style:style style:name="P33" style:family="paragraph" style:parent-style-name="Nagłówek_20_3">
      <style:paragraph-properties fo:break-before="page"/>
    </style:style>
    <style:style style:name="P34" style:family="paragraph" style:parent-style-name="Text_20_body" style:list-style-name="L14">
      <style:paragraph-properties fo:text-align="justify" style:justify-single-word="false"/>
    </style:style>
    <style:style style:name="P35" style:family="paragraph" style:parent-style-name="Text_20_body">
      <style:paragraph-properties fo:text-align="justify" style:justify-single-word="false"/>
      <style:text-properties officeooo:paragraph-rsid="001773fd"/>
    </style:style>
    <style:style style:name="P36" style:family="paragraph" style:parent-style-name="Text_20_body" style:list-style-name="L15">
      <style:paragraph-properties fo:text-align="justify" style:justify-single-word="false"/>
      <style:text-properties officeooo:paragraph-rsid="001773fd"/>
    </style:style>
    <style:style style:name="P37" style:family="paragraph" style:parent-style-name="Nagłówek_20_3">
      <style:text-properties officeooo:paragraph-rsid="00231ec5"/>
    </style:style>
    <style:style style:name="P38" style:family="paragraph" style:parent-style-name="Text_20_body" style:list-style-name="L16">
      <style:paragraph-properties fo:text-align="justify" style:justify-single-word="false"/>
    </style:style>
    <style:style style:name="P39" style:family="paragraph" style:parent-style-name="Nagłówek_20_3">
      <style:text-properties officeooo:paragraph-rsid="0023fe01"/>
    </style:style>
    <style:style style:name="P40" style:family="paragraph" style:parent-style-name="Text_20_body" style:list-style-name="L17">
      <style:paragraph-properties fo:text-align="justify" style:justify-single-word="false"/>
    </style:style>
    <style:style style:name="P41" style:family="paragraph" style:parent-style-name="Text_20_body" style:list-style-name="L18">
      <style:paragraph-properties fo:text-align="justify" style:justify-single-word="false"/>
    </style:style>
    <style:style style:name="P42" style:family="paragraph" style:parent-style-name="Normalny">
      <style:paragraph-properties fo:margin-top="0.423cm" fo:margin-bottom="0.423cm" style:contextual-spacing="false"/>
    </style:style>
    <style:style style:name="P43" style:family="paragraph" style:parent-style-name="Text_20_body" style:list-style-name="L19">
      <style:paragraph-properties fo:text-align="justify" style:justify-single-word="false"/>
    </style:style>
    <style:style style:name="P44" style:family="paragraph" style:parent-style-name="Text_20_body" style:list-style-name="L20">
      <style:paragraph-properties fo:text-align="justify" style:justify-single-word="false"/>
    </style:style>
    <style:style style:name="P45" style:family="paragraph" style:parent-style-name="Text_20_body" style:list-style-name="L20">
      <style:paragraph-properties fo:text-align="justify" style:justify-single-word="false"/>
      <style:text-properties officeooo:paragraph-rsid="002a177e"/>
    </style:style>
    <style:style style:name="P46" style:family="paragraph" style:parent-style-name="Nagłówek_20_3">
      <style:text-properties officeooo:paragraph-rsid="002a177e"/>
    </style:style>
    <style:style style:name="P47" style:family="paragraph" style:parent-style-name="Text_20_body">
      <style:paragraph-properties fo:text-align="justify" style:justify-single-word="false"/>
      <style:text-properties officeooo:paragraph-rsid="002a177e"/>
    </style:style>
    <style:style style:name="P48" style:family="paragraph" style:parent-style-name="Text_20_body">
      <style:paragraph-properties fo:text-align="justify" style:justify-single-word="false"/>
      <style:text-properties officeooo:paragraph-rsid="002d4520"/>
    </style:style>
    <style:style style:name="P49" style:family="paragraph" style:parent-style-name="Nagłówek_20_3">
      <style:paragraph-properties fo:text-align="justify" style:justify-single-word="false"/>
      <style:text-properties officeooo:paragraph-rsid="002d4520"/>
    </style:style>
    <style:style style:name="P50" style:family="paragraph" style:parent-style-name="Text_20_body" style:list-style-name="L21">
      <style:paragraph-properties fo:text-align="justify" style:justify-single-word="false"/>
    </style:style>
    <style:style style:name="P51" style:family="paragraph" style:parent-style-name="Text_20_body" style:list-style-name="L22">
      <style:paragraph-properties fo:text-align="justify" style:justify-single-word="false"/>
    </style:style>
    <style:style style:name="P52" style:family="paragraph" style:parent-style-name="Text_20_body" style:list-style-name="L23">
      <style:paragraph-properties fo:text-align="justify" style:justify-single-word="false"/>
    </style:style>
    <style:style style:name="P53" style:family="paragraph" style:parent-style-name="Nagłówek_20_2">
      <style:paragraph-properties fo:text-align="justify" style:justify-single-word="false"/>
    </style:style>
    <style:style style:name="P54" style:family="paragraph" style:parent-style-name="Normalny">
      <style:paragraph-properties fo:margin-top="0.423cm" fo:margin-bottom="0.423cm" style:contextual-spacing="false" fo:text-align="justify" style:justify-single-word="false"/>
    </style:style>
    <style:style style:name="P55" style:family="paragraph" style:parent-style-name="Nagłówek_20_3">
      <style:paragraph-properties fo:text-align="justify" style:justify-single-word="false"/>
    </style:style>
    <style:style style:name="P56" style:family="paragraph" style:parent-style-name="Text_20_body" style:list-style-name="L24">
      <style:paragraph-properties fo:text-align="justify" style:justify-single-word="false"/>
    </style:style>
    <style:style style:name="P57" style:family="paragraph" style:parent-style-name="Text_20_body" style:list-style-name="L24">
      <style:paragraph-properties fo:text-align="justify" style:justify-single-word="false"/>
      <style:text-properties officeooo:paragraph-rsid="0098f42e"/>
    </style:style>
    <style:style style:name="P58" style:family="paragraph" style:parent-style-name="Text_20_body" style:list-style-name="L25">
      <style:paragraph-properties fo:text-align="justify" style:justify-single-word="false"/>
    </style:style>
    <style:style style:name="P59" style:family="paragraph" style:parent-style-name="Nagłówek_20_3">
      <style:paragraph-properties fo:text-align="justify" style:justify-single-word="false"/>
      <style:text-properties officeooo:paragraph-rsid="003bd255"/>
    </style:style>
    <style:style style:name="P60" style:family="paragraph" style:parent-style-name="Text_20_body" style:list-style-name="L26">
      <style:paragraph-properties fo:text-align="justify" style:justify-single-word="false"/>
    </style:style>
    <style:style style:name="P61" style:family="paragraph" style:parent-style-name="Text_20_body" style:list-style-name="L27">
      <style:paragraph-properties fo:text-align="justify" style:justify-single-word="false"/>
    </style:style>
    <style:style style:name="P62" style:family="paragraph" style:parent-style-name="Nagłówek_20_1">
      <style:paragraph-properties fo:text-align="justify" style:justify-single-word="false"/>
    </style:style>
    <style:style style:name="P63" style:family="paragraph" style:parent-style-name="Text_20_body" style:list-style-name="L28">
      <style:paragraph-properties fo:text-align="justify" style:justify-single-word="false"/>
      <style:text-properties officeooo:paragraph-rsid="004441ec"/>
    </style:style>
    <style:style style:name="P64" style:family="paragraph" style:parent-style-name="Text_20_body" style:list-style-name="L28">
      <style:paragraph-properties fo:margin-top="0cm" fo:margin-bottom="0cm" style:contextual-spacing="false" fo:text-align="justify" style:justify-single-word="false"/>
      <style:text-properties officeooo:rsid="004441ec"/>
    </style:style>
    <style:style style:name="P65" style:family="paragraph" style:parent-style-name="Text_20_body" style:list-style-name="L28">
      <style:paragraph-properties fo:text-align="justify" style:justify-single-word="false"/>
      <style:text-properties officeooo:rsid="004441ec"/>
    </style:style>
    <style:style style:name="P66" style:family="paragraph" style:parent-style-name="Nagłówek_20_2">
      <style:text-properties officeooo:paragraph-rsid="006a24ca"/>
    </style:style>
    <style:style style:name="P67" style:family="paragraph" style:parent-style-name="Text_20_body">
      <style:paragraph-properties fo:text-align="center" style:justify-single-word="false"/>
      <style:text-properties officeooo:paragraph-rsid="004ac41c"/>
    </style:style>
    <style:style style:name="P68" style:family="paragraph" style:parent-style-name="Text_20_body">
      <style:paragraph-properties fo:text-align="center" style:justify-single-word="false"/>
      <style:text-properties officeooo:paragraph-rsid="006e8814"/>
    </style:style>
    <style:style style:name="P69" style:family="paragraph" style:parent-style-name="Text_20_body">
      <style:paragraph-properties fo:text-align="justify" style:justify-single-word="false"/>
      <style:text-properties officeooo:rsid="006eb42e" officeooo:paragraph-rsid="00a7dbe4"/>
    </style:style>
    <style:style style:name="P70" style:family="paragraph" style:parent-style-name="Text_20_body">
      <style:paragraph-properties fo:text-align="justify" style:justify-single-word="false" fo:break-before="page"/>
      <style:text-properties officeooo:paragraph-rsid="00a7dbe4"/>
    </style:style>
    <style:style style:name="P71" style:family="paragraph" style:parent-style-name="Text_20_body">
      <style:paragraph-properties fo:text-align="justify" style:justify-single-word="false"/>
      <style:text-properties officeooo:rsid="006eb42e" officeooo:paragraph-rsid="0071da8e"/>
    </style:style>
    <style:style style:name="P72" style:family="paragraph" style:parent-style-name="Text_20_body" style:list-style-name="L29">
      <style:paragraph-properties fo:text-align="justify" style:justify-single-word="false"/>
      <style:text-properties officeooo:rsid="0071da8e" officeooo:paragraph-rsid="0071da8e"/>
    </style:style>
    <style:style style:name="P73" style:family="paragraph" style:parent-style-name="Text_20_body" style:list-style-name="L29">
      <style:paragraph-properties fo:text-align="justify" style:justify-single-word="false"/>
      <style:text-properties officeooo:paragraph-rsid="0071da8e"/>
    </style:style>
    <style:style style:name="P74" style:family="paragraph" style:parent-style-name="Text_20_body">
      <style:paragraph-properties fo:text-align="justify" style:justify-single-word="false"/>
      <style:text-properties officeooo:rsid="00751d26" officeooo:paragraph-rsid="00763b4a"/>
    </style:style>
    <style:style style:name="P75"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fo:text-align="justify" style:justify-single-word="false"/>
      <style:text-properties style:use-window-font-color="true" loext:opacity="0%" style:font-name="JetBrains Mono ExtraLight" fo:font-size="7pt" fo:language="zxx" fo:country="none" fo:font-style="normal" style:text-underline-style="none" fo:font-weight="normal" fo:background-color="transparent" style:font-size-asian="7pt" style:font-size-complex="7pt"/>
    </style:style>
    <style:style style:name="P76"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fo:text-align="justify" style:justify-single-word="false"/>
      <style:text-properties fo:color="#bbbbbb" loext:opacity="100%" style:font-name="JetBrains Mono ExtraLight" fo:font-size="7pt" fo:language="zxx" fo:country="none" fo:font-style="normal" style:text-underline-style="none" fo:font-weight="normal" fo:background-color="transparent" style:font-size-asian="7pt" style:font-size-complex="7pt"/>
    </style:style>
    <style:style style:name="P77" style:family="paragraph" style:parent-style-name="Text_20_body">
      <style:paragraph-properties fo:text-align="justify" style:justify-single-word="false"/>
      <style:text-properties officeooo:paragraph-rsid="0078d8de"/>
    </style:style>
    <style:style style:name="P78"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style:use-window-font-color="true" loext:opacity="0%" style:font-name="JetBrains Mono ExtraLight" fo:font-size="7pt" fo:language="zxx" fo:country="none" fo:font-style="normal" style:text-underline-style="none" fo:font-weight="normal" fo:background-color="transparent" style:font-name-asian="Noto Sans CJK SC" style:font-size-asian="7pt" style:font-weight-asian="bold" style:font-size-complex="7pt" style:font-weight-complex="bold"/>
    </style:style>
    <style:style style:name="P79"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fo:color="#000000" loext:opacity="100%" style:font-name="JetBrains Mono ExtraLight" fo:font-size="7pt" fo:language="zxx" fo:country="none" fo:font-style="normal" style:text-underline-style="none" fo:font-weight="normal" fo:background-color="transparent" style:font-name-asian="Noto Sans CJK SC" style:font-size-asian="7pt" style:font-weight-asian="bold" style:font-size-complex="7pt" style:font-weight-complex="bold"/>
    </style:style>
    <style:style style:name="P80"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style:use-window-font-color="true" loext:opacity="0%" style:font-name="JetBrains Mono ExtraLight" fo:font-size="7pt" fo:language="zxx" fo:country="none" fo:font-style="normal" style:text-underline-style="none" fo:font-weight="normal" officeooo:paragraph-rsid="007c02f2" fo:background-color="transparent" style:font-name-asian="Noto Sans CJK SC" style:font-size-asian="7pt" style:font-weight-asian="bold" style:font-size-complex="7pt" style:font-weight-complex="bold"/>
    </style:style>
    <style:style style:name="P81" style:family="paragraph" style:parent-style-name="Text_20_body">
      <style:text-properties officeooo:paragraph-rsid="007e9bcd"/>
    </style:style>
    <style:style style:name="P82"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style:use-window-font-color="true" loext:opacity="0%" style:font-name="JetBrains Mono ExtraLight" fo:font-size="7pt" fo:language="zxx" fo:country="none" fo:font-style="normal" style:text-underline-style="none" fo:font-weight="normal" officeooo:paragraph-rsid="007e9bcd" fo:background-color="transparent" style:font-name-asian="Noto Sans CJK SC" style:font-size-asian="7pt" style:font-size-complex="7pt"/>
    </style:style>
    <style:style style:name="P83"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style:use-window-font-color="true" loext:opacity="0%" style:font-name="JetBrains Mono ExtraLight" fo:font-size="7pt" fo:language="zxx" fo:country="none" fo:font-style="normal" style:text-underline-style="none" fo:font-weight="normal" fo:background-color="transparent" style:font-name-asian="Noto Sans CJK SC" style:font-size-asian="7pt" style:font-size-complex="7pt"/>
    </style:style>
    <style:style style:name="P84"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fo:color="#008000" loext:opacity="100%" style:font-name="JetBrains Mono ExtraLight" fo:font-size="7pt" fo:language="zxx" fo:country="none" fo:font-style="normal" style:text-underline-style="none" fo:font-weight="bold" fo:background-color="transparent" style:font-name-asian="Noto Sans CJK SC" style:font-size-asian="7pt" style:font-size-complex="7pt"/>
    </style:style>
    <style:style style:name="P85"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fo:color="#0000ff" loext:opacity="100%" style:font-name="JetBrains Mono ExtraLight" fo:font-size="7pt" fo:language="zxx" fo:country="none" fo:font-style="normal" style:text-underline-style="none" fo:font-weight="normal" fo:background-color="transparent" style:font-name-asian="Noto Sans CJK SC" style:font-size-asian="7pt" style:font-size-complex="7pt"/>
    </style:style>
    <style:style style:name="P86"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fo:color="#000000" loext:opacity="100%" style:font-name="JetBrains Mono ExtraLight" fo:font-size="7pt" fo:language="zxx" fo:country="none" fo:font-style="normal" style:text-underline-style="none" fo:font-weight="normal" fo:background-color="transparent" style:font-name-asian="Noto Sans CJK SC" style:font-size-asian="7pt" style:font-size-complex="7pt"/>
    </style:style>
    <style:style style:name="P87"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fo:color="#ba2121" loext:opacity="100%" style:font-name="JetBrains Mono ExtraLight" fo:font-size="7pt" fo:language="zxx" fo:country="none" fo:font-style="normal" style:text-underline-style="none" fo:font-weight="normal" fo:background-color="transparent" style:font-name-asian="Noto Sans CJK SC" style:font-size-asian="7pt" style:font-size-complex="7pt"/>
    </style:style>
    <style:style style:name="P88" style:family="paragraph" style:parent-style-name="Text_20_body">
      <style:paragraph-properties fo:text-align="justify" style:justify-single-word="false"/>
      <style:text-properties fo:font-size="12pt" style:font-size-asian="12pt" style:font-size-complex="12pt"/>
    </style:style>
    <style:style style:name="P89" style:family="paragraph" style:parent-style-name="Text_20_body">
      <style:paragraph-properties fo:text-align="justify" style:justify-single-word="false"/>
      <style:text-properties fo:font-size="12pt" officeooo:paragraph-rsid="0085d5b8" style:font-size-asian="12pt" style:font-size-complex="12pt"/>
    </style:style>
    <style:style style:name="P90" style:family="paragraph" style:parent-style-name="Text_20_body" style:list-style-name="L30">
      <style:paragraph-properties fo:text-align="justify" style:justify-single-word="false"/>
      <style:text-properties fo:font-size="12pt" officeooo:rsid="0085d5b8" officeooo:paragraph-rsid="0085d5b8" style:font-size-asian="12pt" style:font-size-complex="12pt"/>
    </style:style>
    <style:style style:name="P91" style:family="paragraph" style:parent-style-name="Text_20_body" style:list-style-name="L30">
      <style:paragraph-properties fo:text-align="justify" style:justify-single-word="false"/>
      <style:text-properties fo:font-size="12pt" officeooo:paragraph-rsid="0085d5b8" style:font-size-asian="12pt" style:font-size-complex="12pt"/>
    </style:style>
    <style:style style:name="P92" style:family="paragraph" style:parent-style-name="Text_20_body">
      <style:paragraph-properties fo:text-align="justify" style:justify-single-word="false"/>
      <style:text-properties fo:font-size="12pt" officeooo:paragraph-rsid="00889c6b" style:font-size-asian="12pt" style:font-size-complex="12pt"/>
    </style:style>
    <style:style style:name="P93" style:family="paragraph" style:parent-style-name="Text_20_body">
      <style:paragraph-properties fo:text-align="justify" style:justify-single-word="false"/>
      <style:text-properties officeooo:paragraph-rsid="008df3ab"/>
    </style:style>
    <style:style style:name="P94" style:family="paragraph" style:parent-style-name="Text_20_body">
      <style:paragraph-properties fo:text-align="justify" style:justify-single-word="false"/>
      <style:text-properties officeooo:paragraph-rsid="008f4b5f"/>
    </style:style>
    <style:style style:name="P95"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style:use-window-font-color="true" loext:opacity="0%" style:font-name="JetBrains Mono ExtraLight" fo:font-size="7pt" fo:language="zxx" fo:country="none" fo:font-style="normal" style:text-underline-style="none" fo:font-weight="normal" fo:background-color="transparent" style:font-size-asian="7pt" style:font-size-complex="7pt"/>
    </style:style>
    <style:style style:name="P96"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fo:color="#bbbbbb" loext:opacity="100%" style:font-name="JetBrains Mono ExtraLight" fo:font-size="7pt" fo:language="zxx" fo:country="none" fo:font-style="normal" style:text-underline-style="none" fo:font-weight="normal" fo:background-color="transparent" style:font-size-asian="7pt" style:font-size-complex="7pt"/>
    </style:style>
    <style:style style:name="P97"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style:text-properties style:use-window-font-color="true" loext:opacity="0%" style:font-name="JetBrains Mono ExtraLight" fo:font-size="7pt" fo:language="zxx" fo:country="none" fo:font-style="normal" style:text-underline-style="none" fo:font-weight="normal" officeooo:paragraph-rsid="00912ec0" fo:background-color="transparent" style:font-size-asian="7pt" style:font-size-complex="7pt"/>
    </style:style>
    <style:style style:name="P98" style:family="paragraph" style:parent-style-name="Text_20_body">
      <style:paragraph-properties fo:text-align="justify" style:justify-single-word="false"/>
      <style:text-properties officeooo:paragraph-rsid="00945e0c"/>
    </style:style>
    <style:style style:name="P99"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fo:text-align="justify" style:justify-single-word="false"/>
      <style:text-properties fo:color="#000000" loext:opacity="100%" style:font-name="JetBrains Mono ExtraLight" fo:font-size="7pt" fo:language="zxx" fo:country="none" fo:font-style="normal" style:text-underline-style="none" fo:font-weight="normal" fo:background-color="transparent" style:font-size-asian="7pt" style:font-size-complex="7pt"/>
    </style:style>
    <style:style style:name="P100"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fo:text-align="justify" style:justify-single-word="false"/>
      <style:text-properties fo:color="#3d7b7b" loext:opacity="100%" style:font-name="JetBrains Mono ExtraLight" fo:font-size="7pt" fo:language="zxx" fo:country="none" fo:font-style="italic" style:text-underline-style="none" fo:font-weight="normal" fo:background-color="transparent" style:font-size-asian="7pt" style:font-size-complex="7pt"/>
    </style:style>
    <style:style style:name="P101"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fo:text-align="justify" style:justify-single-word="false"/>
      <style:text-properties fo:color="#0000ff" loext:opacity="100%" style:font-name="JetBrains Mono ExtraLight" fo:font-size="7pt" fo:language="zxx" fo:country="none" fo:font-style="normal" style:text-underline-style="none" fo:font-weight="normal" fo:background-color="transparent" style:font-size-asian="7pt" style:font-size-complex="7pt"/>
    </style:style>
    <style:style style:name="P102" style:family="paragraph" style:parent-style-name="Text_20_body">
      <style:paragraph-properties fo:text-align="center" style:justify-single-word="false"/>
    </style:style>
    <style:style style:name="P103" style:family="paragraph" style:parent-style-name="Text_20_body">
      <style:paragraph-properties fo:text-align="justify" style:justify-single-word="false"/>
      <style:text-properties officeooo:paragraph-rsid="009b35e5"/>
    </style:style>
    <style:style style:name="P104" style:family="paragraph" style:parent-style-name="Text_20_body">
      <style:paragraph-properties fo:text-align="justify" style:justify-single-word="false"/>
      <style:text-properties officeooo:paragraph-rsid="009c68ac"/>
    </style:style>
    <style:style style:name="P105" style:family="paragraph" style:parent-style-name="Text_20_body">
      <style:paragraph-properties fo:text-align="justify" style:justify-single-word="false"/>
      <style:text-properties officeooo:paragraph-rsid="009c73e1"/>
    </style:style>
    <style:style style:name="P106" style:family="paragraph" style:parent-style-name="Text_20_body">
      <style:paragraph-properties fo:text-align="justify" style:justify-single-word="false"/>
      <style:text-properties officeooo:paragraph-rsid="009e2f42"/>
    </style:style>
    <style:style style:name="P107" style:family="paragraph" style:parent-style-name="Table_20_Contents">
      <style:paragraph-properties ch2_options="{'Style': 'default', 'Language': 'Python', 'UseCharStyles': 0, 'LineNumberRatio': 100, 'LineNumberStart': 1, 'MasterCharStyle': '', 'ShowLineNumbers': 0, 'ColourizeBackground': 0, 'LineNumberSeparator': '  ', 'LineNumberPaddingSymbol': '', 'StoreOptionsWithSnippet': 1}" fo:text-align="justify" style:justify-single-word="false"/>
      <style:text-properties style:use-window-font-color="true" loext:opacity="0%" style:font-name="JetBrains Mono ExtraLight" fo:font-size="7pt" fo:language="zxx" fo:country="none" fo:font-style="normal" style:text-underline-style="none" fo:font-weight="normal" officeooo:paragraph-rsid="009e2f42" fo:background-color="transparent" style:font-size-asian="7pt" style:font-size-complex="7pt"/>
    </style:style>
    <style:style style:name="P108" style:family="paragraph" style:parent-style-name="Text_20_body">
      <style:paragraph-properties fo:text-align="justify" style:justify-single-word="false"/>
      <style:text-properties officeooo:paragraph-rsid="00b15170"/>
    </style:style>
    <style:style style:name="P109" style:family="paragraph" style:parent-style-name="Text_20_body">
      <style:paragraph-properties fo:text-align="center" style:justify-single-word="false" fo:break-before="page"/>
      <style:text-properties officeooo:paragraph-rsid="00578e9b"/>
    </style:style>
    <style:style style:name="P110" style:family="paragraph" style:parent-style-name="Text_20_body" style:list-style-name="L31">
      <style:paragraph-properties fo:text-align="justify" style:justify-single-word="false"/>
      <style:text-properties officeooo:paragraph-rsid="009eeb4e"/>
    </style:style>
    <style:style style:name="P111" style:family="paragraph" style:parent-style-name="Text_20_body">
      <style:paragraph-properties fo:text-align="justify" style:justify-single-word="false"/>
      <style:text-properties officeooo:paragraph-rsid="00a37747"/>
    </style:style>
    <style:style style:name="P11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style:use-window-font-color="true" loext:opacity="0%" style:font-name="JetBrains Mono ExtraLight" fo:font-size="7pt" fo:language="zxx" fo:country="none" fo:font-style="normal" style:text-underline-style="none" fo:font-weight="normal" fo:background-color="transparent" style:font-size-asian="7pt" style:font-size-complex="7pt"/>
    </style:style>
    <style:style style:name="P11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fo:color="#bbbbbb" loext:opacity="100%" style:font-name="JetBrains Mono ExtraLight" fo:font-size="7pt" fo:language="zxx" fo:country="none" fo:font-style="normal" style:text-underline-style="none" fo:font-weight="normal" fo:background-color="transparent" style:font-size-asian="7pt" style:font-size-complex="7pt"/>
    </style:style>
    <style:style style:name="P114" style:family="paragraph" style:parent-style-name="Text_20_body">
      <style:paragraph-properties fo:text-align="justify" style:justify-single-word="false" fo:break-before="page"/>
      <style:text-properties officeooo:paragraph-rsid="00a37747"/>
    </style:style>
    <style:style style:name="P11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fo:color="#000000" loext:opacity="100%" style:font-name="JetBrains Mono ExtraLight" fo:font-size="7pt" fo:language="zxx" fo:country="none" fo:font-style="normal" style:text-underline-style="none" fo:font-weight="normal" fo:background-color="transparent" style:font-size-asian="7pt" style:font-size-complex="7pt"/>
    </style:style>
    <style:style style:name="P11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text-align="justify" style:justify-single-word="false" fo:background-color="#f8f8f8"/>
      <style:text-properties fo:color="#008000" loext:opacity="100%" style:font-name="JetBrains Mono ExtraLight" fo:font-size="7pt" fo:language="zxx" fo:country="none" fo:font-style="normal" style:text-underline-style="none" fo:font-weight="bold" fo:background-color="transparent" style:font-size-asian="7pt" style:font-size-complex="7pt"/>
    </style:style>
    <style:style style:name="P117" style:family="paragraph" style:parent-style-name="Text_20_body">
      <style:text-properties officeooo:paragraph-rsid="00520338"/>
    </style:style>
    <style:style style:name="P118" style:family="paragraph" style:parent-style-name="Nagłówek_20_1"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119" style:family="paragraph" style:parent-style-name="Text_20_body">
      <style:text-properties officeooo:paragraph-rsid="005b54cc"/>
    </style:style>
    <style:style style:name="P120" style:family="paragraph" style:parent-style-name="Text_20_body">
      <style:paragraph-properties fo:break-before="page"/>
    </style:style>
    <style:style style:name="P121" style:family="paragraph" style:parent-style-name="Text_20_body">
      <style:text-properties fo:font-size="8pt" style:font-size-asian="8pt" style:font-size-complex="8pt"/>
    </style:style>
    <style:style style:name="P122" style:family="paragraph" style:parent-style-name="code">
      <loext:graphic-properties draw:fill="solid" draw:fill-color="#ffffff" draw:opacity="100%"/>
      <style:paragraph-properties fo:background-color="#ffffff"/>
    </style:style>
    <style:style style:name="P123" style:family="paragraph" style:parent-style-name="code">
      <loext:graphic-properties draw:fill="solid" draw:fill-color="#ffffff" draw:opacity="100%"/>
      <style:paragraph-properties fo:background-color="#ffffff"/>
      <style:text-properties fo:font-size="9pt" style:font-size-asian="9pt" style:font-size-complex="9pt"/>
    </style:style>
    <style:style style:name="P124" style:family="paragraph" style:parent-style-name="Text_20_body">
      <style:text-properties officeooo:paragraph-rsid="00083b92"/>
    </style:style>
    <style:style style:name="P125" style:family="paragraph" style:parent-style-name="Text_20_body">
      <style:text-properties fo:font-style="italic" officeooo:rsid="00083b92" officeooo:paragraph-rsid="00083b92" style:font-style-asian="italic" style:font-style-complex="italic"/>
    </style:style>
    <style:style style:name="P126" style:family="paragraph" style:parent-style-name="Text_20_body">
      <style:text-properties fo:font-style="italic" style:font-style-asian="italic" style:font-style-complex="italic"/>
    </style:style>
    <style:style style:name="T1" style:family="text">
      <style:text-properties officeooo:rsid="00077e39"/>
    </style:style>
    <style:style style:name="T2" style:family="text">
      <style:text-properties officeooo:rsid="0045d0d4"/>
    </style:style>
    <style:style style:name="T3" style:family="text">
      <style:text-properties officeooo:rsid="000b3cad"/>
    </style:style>
    <style:style style:name="T4" style:family="text">
      <style:text-properties officeooo:rsid="000d03c0"/>
    </style:style>
    <style:style style:name="T5" style:family="text">
      <style:text-properties fo:font-style="italic" officeooo:rsid="000d03c0" style:font-style-asian="italic" style:font-style-complex="italic"/>
    </style:style>
    <style:style style:name="T6" style:family="text">
      <style:text-properties fo:font-weight="normal" officeooo:rsid="000d03c0" style:font-weight-asian="normal" style:font-weight-complex="normal"/>
    </style:style>
    <style:style style:name="T7" style:family="text">
      <style:text-properties fo:font-weight="normal" style:font-weight-asian="normal" style:font-weight-complex="normal"/>
    </style:style>
    <style:style style:name="T8" style:family="text">
      <style:text-properties officeooo:rsid="003d499e"/>
    </style:style>
    <style:style style:name="T9" style:family="text">
      <style:text-properties fo:font-weight="bold" style:font-weight-asian="bold" style:font-weight-complex="bold"/>
    </style:style>
    <style:style style:name="T10" style:family="text">
      <style:text-properties fo:font-weight="normal" officeooo:rsid="00158207"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officeooo:rsid="001cb9b8"/>
    </style:style>
    <style:style style:name="T13" style:family="text">
      <style:text-properties officeooo:rsid="0028287e"/>
    </style:style>
    <style:style style:name="T14" style:family="text">
      <style:text-properties officeooo:rsid="00176e01"/>
    </style:style>
    <style:style style:name="T15" style:family="text">
      <style:text-properties fo:font-weight="normal" officeooo:rsid="0028287e" style:font-weight-asian="normal" style:font-weight-complex="normal"/>
    </style:style>
    <style:style style:name="T16" style:family="text">
      <style:text-properties fo:font-weight="normal" officeooo:rsid="00176e01" style:font-weight-asian="normal" style:font-weight-complex="normal"/>
    </style:style>
    <style:style style:name="T17" style:family="text">
      <style:text-properties style:font-name="Liberation Sans" style:font-name-asian="Noto Sans CJK SC"/>
    </style:style>
    <style:style style:name="T18" style:family="text">
      <style:text-properties style:font-name="Liberation Sans" officeooo:rsid="003d499e" style:font-name-asian="Noto Sans CJK SC"/>
    </style:style>
    <style:style style:name="T19" style:family="text">
      <style:text-properties style:font-name="Liberation Sans" officeooo:rsid="0021bcd3" style:font-name-asian="Noto Sans CJK SC"/>
    </style:style>
    <style:style style:name="T20" style:family="text">
      <style:text-properties style:font-name="Liberation Sans" officeooo:rsid="00231ec5" style:font-name-asian="Noto Sans CJK SC"/>
    </style:style>
    <style:style style:name="T21" style:family="text">
      <style:text-properties style:font-name="Liberation Sans" officeooo:rsid="0023fe01" style:font-name-asian="Noto Sans CJK SC"/>
    </style:style>
    <style:style style:name="T22" style:family="text">
      <style:text-properties officeooo:rsid="0023fe01"/>
    </style:style>
    <style:style style:name="T23" style:family="text">
      <style:text-properties officeooo:rsid="0019d313"/>
    </style:style>
    <style:style style:name="T24" style:family="text">
      <style:text-properties fo:font-weight="normal" officeooo:rsid="002a177e" style:font-weight-asian="normal" style:font-weight-complex="normal"/>
    </style:style>
    <style:style style:name="T25" style:family="text">
      <style:text-properties fo:font-style="italic" style:font-style-asian="italic" style:font-style-complex="italic"/>
    </style:style>
    <style:style style:name="T26" style:family="text">
      <style:text-properties officeooo:rsid="002a177e"/>
    </style:style>
    <style:style style:name="T27" style:family="text">
      <style:text-properties officeooo:rsid="002ab7bf"/>
    </style:style>
    <style:style style:name="T28" style:family="text">
      <style:text-properties officeooo:rsid="002d4520"/>
    </style:style>
    <style:style style:name="T29" style:family="text">
      <style:text-properties officeooo:rsid="00698042"/>
    </style:style>
    <style:style style:name="T30" style:family="text">
      <style:text-properties officeooo:rsid="0034d083"/>
    </style:style>
    <style:style style:name="T31" style:family="text">
      <style:text-properties fo:font-weight="normal" officeooo:rsid="0098f42e" style:font-weight-asian="normal" style:font-weight-complex="normal"/>
    </style:style>
    <style:style style:name="T32" style:family="text">
      <style:text-properties fo:font-weight="normal" officeooo:rsid="003a1603" style:font-weight-asian="normal" style:font-weight-complex="normal"/>
    </style:style>
    <style:style style:name="T33" style:family="text">
      <style:text-properties officeooo:rsid="003bd255"/>
    </style:style>
    <style:style style:name="T34" style:family="text">
      <style:text-properties fo:font-weight="normal" officeooo:rsid="028519f4" style:font-weight-asian="normal" style:font-weight-complex="normal"/>
    </style:style>
    <style:style style:name="T35" style:family="text">
      <style:text-properties fo:font-weight="normal" officeooo:rsid="004441ec" style:font-weight-asian="normal" style:font-weight-complex="normal"/>
    </style:style>
    <style:style style:name="T36" style:family="text">
      <style:text-properties officeooo:rsid="004ac41c"/>
    </style:style>
    <style:style style:name="T37" style:family="text">
      <style:text-properties fo:font-style="italic" officeooo:rsid="004ac41c" style:font-style-asian="italic" style:font-style-complex="italic"/>
    </style:style>
    <style:style style:name="T38" style:family="text">
      <style:text-properties fo:font-size="8pt" fo:language="pl" fo:country="PL" fo:font-weight="normal" officeooo:rsid="008bdd71" style:font-size-asian="8pt" style:font-weight-asian="normal" style:font-size-complex="8pt" style:font-weight-complex="normal"/>
    </style:style>
    <style:style style:name="T39" style:family="text">
      <style:text-properties fo:font-size="8pt" fo:language="pl" fo:country="PL" fo:font-weight="normal" officeooo:rsid="026d6fe8" style:font-size-asian="8pt" style:font-weight-asian="normal" style:font-size-complex="8pt" style:font-weight-complex="normal"/>
    </style:style>
    <style:style style:name="T40" style:family="text">
      <style:text-properties fo:font-size="8pt" fo:language="pl" fo:country="PL" fo:font-weight="normal" officeooo:rsid="00901582" style:font-size-asian="8pt" style:font-weight-asian="normal" style:font-size-complex="8pt" style:font-weight-complex="normal"/>
    </style:style>
    <style:style style:name="T41" style:family="text">
      <style:text-properties fo:color="#000000" loext:opacity="100%" fo:font-size="8pt" fo:language="pl" fo:country="PL" fo:font-weight="normal" officeooo:rsid="004965d9" style:font-size-asian="8pt" style:font-weight-asian="normal" style:font-size-complex="8pt" style:font-weight-complex="normal"/>
    </style:style>
    <style:style style:name="T42" style:family="text">
      <style:text-properties fo:font-weight="normal" officeooo:rsid="004ac41c" style:font-weight-asian="normal" style:font-weight-complex="normal"/>
    </style:style>
    <style:style style:name="T43" style:family="text">
      <style:text-properties fo:font-style="italic" fo:font-weight="normal" officeooo:rsid="004ac41c" style:font-style-asian="italic" style:font-weight-asian="normal" style:font-style-complex="italic" style:font-weight-complex="normal"/>
    </style:style>
    <style:style style:name="T44" style:family="text">
      <style:text-properties officeooo:rsid="004de4b0"/>
    </style:style>
    <style:style style:name="T45" style:family="text">
      <style:text-properties officeooo:rsid="004e161f"/>
    </style:style>
    <style:style style:name="T46" style:family="text">
      <style:text-properties fo:font-style="normal" officeooo:rsid="006eb42e" style:font-style-asian="normal" style:font-style-complex="normal"/>
    </style:style>
    <style:style style:name="T47" style:family="text">
      <style:text-properties officeooo:rsid="006eb42e"/>
    </style:style>
    <style:style style:name="T48" style:family="text">
      <style:text-properties officeooo:rsid="006d9843"/>
    </style:style>
    <style:style style:name="T49" style:family="text">
      <style:text-properties officeooo:rsid="006e6ea6"/>
    </style:style>
    <style:style style:name="T50" style:family="text">
      <style:text-properties fo:font-style="italic" officeooo:rsid="006e6ea6" style:font-style-asian="italic" style:font-style-complex="italic"/>
    </style:style>
    <style:style style:name="T51" style:family="text">
      <style:text-properties fo:font-size="8pt" fo:language="pl" fo:country="PL" fo:font-weight="normal" officeooo:rsid="004e161f" style:font-size-asian="8pt" style:font-weight-asian="normal" style:font-size-complex="8pt" style:font-weight-complex="normal"/>
    </style:style>
    <style:style style:name="T52" style:family="text">
      <style:text-properties fo:font-style="italic" officeooo:rsid="006eb42e" style:font-style-asian="italic" style:font-style-complex="italic"/>
    </style:style>
    <style:style style:name="T53" style:family="text">
      <style:text-properties officeooo:rsid="00702ed8"/>
    </style:style>
    <style:style style:name="T54" style:family="text">
      <style:text-properties fo:font-style="normal" officeooo:rsid="00702ed8" style:font-style-asian="normal" style:font-style-complex="normal"/>
    </style:style>
    <style:style style:name="T55" style:family="text">
      <style:text-properties fo:font-style="italic" officeooo:rsid="00751d26" style:font-style-asian="italic" style:font-style-complex="italic"/>
    </style:style>
    <style:style style:name="T56" style:family="text">
      <style:text-properties fo:font-style="italic" officeooo:rsid="007d57f0" style:font-style-asian="italic" style:font-style-complex="italic"/>
    </style:style>
    <style:style style:name="T57" style:family="text">
      <style:text-properties fo:font-style="italic" officeooo:rsid="007d5d51" style:font-style-asian="italic" style:font-style-complex="italic"/>
    </style:style>
    <style:style style:name="T58" style:family="text">
      <style:text-properties fo:font-style="italic" officeooo:rsid="00702ed8" style:font-style-asian="italic" style:font-style-complex="italic"/>
    </style:style>
    <style:style style:name="T59" style:family="text">
      <style:text-properties officeooo:rsid="0071da8e"/>
    </style:style>
    <style:style style:name="T60" style:family="text">
      <style:text-properties fo:font-style="italic" officeooo:rsid="0071da8e" style:font-style-asian="italic" style:font-style-complex="italic"/>
    </style:style>
    <style:style style:name="T61" style:family="text">
      <style:text-properties fo:font-size="8pt" fo:font-style="italic" style:font-size-asian="8pt" style:font-style-asian="italic" style:font-size-complex="8pt" style:font-style-complex="italic"/>
    </style:style>
    <style:style style:name="T62" style:family="text">
      <style:text-properties fo:font-size="8pt" fo:font-style="italic" officeooo:rsid="00763b4a" style:font-size-asian="8pt" style:font-style-asian="italic" style:font-size-complex="8pt" style:font-style-complex="italic"/>
    </style:style>
    <style:style style:name="T63" style:family="text">
      <style:text-properties fo:color="#000000" loext:opacity="100%"/>
    </style:style>
    <style:style style:name="T64" style:family="text">
      <style:text-properties fo:color="#008000" loext:opacity="100%" fo:font-weight="bold"/>
    </style:style>
    <style:style style:name="T65" style:family="text">
      <style:text-properties fo:color="#0000ff" loext:opacity="100%"/>
    </style:style>
    <style:style style:name="T66" style:family="text">
      <style:text-properties fo:color="#008000" loext:opacity="100%"/>
    </style:style>
    <style:style style:name="T67" style:family="text">
      <style:text-properties fo:color="#aa22ff" loext:opacity="100%" fo:font-weight="bold"/>
    </style:style>
    <style:style style:name="T68" style:family="text">
      <style:text-properties fo:color="#666666" loext:opacity="100%"/>
    </style:style>
    <style:style style:name="T69" style:family="text">
      <style:text-properties fo:color="#bbbbbb" loext:opacity="100%"/>
    </style:style>
    <style:style style:name="T70" style:family="text">
      <style:text-properties fo:color="#ba2121" loext:opacity="100%"/>
    </style:style>
    <style:style style:name="T71" style:family="text">
      <style:text-properties fo:color="#cb3f38" loext:opacity="100%" fo:font-weight="bold"/>
    </style:style>
    <style:style style:name="T72" style:family="text">
      <style:text-properties fo:font-size="8pt" officeooo:rsid="00751d26" style:font-size-asian="8pt" style:font-size-complex="8pt"/>
    </style:style>
    <style:style style:name="T73" style:family="text">
      <style:text-properties fo:font-size="8pt" fo:font-style="italic" officeooo:rsid="00751d26" style:font-size-asian="8pt" style:font-style-asian="italic" style:font-size-complex="8pt" style:font-style-complex="italic"/>
    </style:style>
    <style:style style:name="T74" style:family="text">
      <style:text-properties fo:font-size="8pt" fo:font-style="italic" officeooo:rsid="0078d8de" style:font-size-asian="8pt" style:font-style-asian="italic" style:font-size-complex="8pt" style:font-style-complex="italic"/>
    </style:style>
    <style:style style:name="T75" style:family="text">
      <style:text-properties fo:color="#000000" loext:opacity="100%" officeooo:rsid="007a841c"/>
    </style:style>
    <style:style style:name="T76" style:family="text">
      <style:text-properties fo:color="#666666" loext:opacity="100%" fo:font-style="normal" style:text-underline-style="none" fo:font-weight="normal"/>
    </style:style>
    <style:style style:name="T77" style:family="text">
      <style:text-properties fo:color="#666666" loext:opacity="100%" officeooo:rsid="007c02f2"/>
    </style:style>
    <style:style style:name="T78" style:family="text">
      <style:text-properties fo:color="#000000" loext:opacity="100%" officeooo:rsid="007c02f2"/>
    </style:style>
    <style:style style:name="T79" style:family="text">
      <style:text-properties fo:color="#a45a77" loext:opacity="100%" fo:font-weight="bold"/>
    </style:style>
    <style:style style:name="T80" style:family="text">
      <style:text-properties fo:font-size="8pt" fo:font-style="italic" officeooo:rsid="007fc711" style:font-size-asian="8pt" style:font-style-asian="italic" style:font-size-complex="8pt" style:font-style-complex="italic"/>
    </style:style>
    <style:style style:name="T81" style:family="text">
      <style:text-properties fo:font-size="8pt" fo:font-style="italic" officeooo:rsid="007e9bcd" style:font-size-asian="8pt" style:font-style-asian="italic" style:font-size-complex="8pt" style:font-style-complex="italic"/>
    </style:style>
    <style:style style:name="T82" style:family="text">
      <style:text-properties fo:color="#3d7b7b" loext:opacity="100%" fo:font-style="italic"/>
    </style:style>
    <style:style style:name="T83" style:family="text">
      <style:text-properties officeooo:rsid="008426d3"/>
    </style:style>
    <style:style style:name="T84" style:family="text">
      <style:text-properties officeooo:rsid="0085c98d"/>
    </style:style>
    <style:style style:name="T85" style:family="text">
      <style:text-properties fo:font-style="italic" officeooo:rsid="008426d3" style:font-style-asian="italic" style:font-style-complex="italic"/>
    </style:style>
    <style:style style:name="T86" style:family="text">
      <style:text-properties officeooo:rsid="0085d5b8"/>
    </style:style>
    <style:style style:name="T87" style:family="text">
      <style:text-properties fo:font-style="italic" officeooo:rsid="0085d5b8" style:font-style-asian="italic" style:font-style-complex="italic"/>
    </style:style>
    <style:style style:name="T88" style:family="text">
      <style:text-properties fo:font-style="normal" style:font-style-asian="normal" style:font-style-complex="normal"/>
    </style:style>
    <style:style style:name="T89" style:family="text">
      <style:text-properties fo:font-style="italic" officeooo:rsid="008f0bfa" style:font-style-asian="italic" style:font-style-complex="italic"/>
    </style:style>
    <style:style style:name="T90" style:family="text">
      <style:text-properties fo:font-style="normal" officeooo:rsid="0085d5b8" style:font-style-asian="normal" style:font-style-complex="normal"/>
    </style:style>
    <style:style style:name="T91" style:family="text">
      <style:text-properties fo:font-style="italic" officeooo:rsid="00889c6b" style:font-style-asian="italic" style:font-style-complex="italic"/>
    </style:style>
    <style:style style:name="T92" style:family="text">
      <style:text-properties officeooo:rsid="00889c6b"/>
    </style:style>
    <style:style style:name="T93" style:family="text">
      <style:text-properties fo:font-style="italic" officeooo:rsid="008b708f" style:font-style-asian="italic" style:font-style-complex="italic"/>
    </style:style>
    <style:style style:name="T94" style:family="text">
      <style:text-properties style:font-name="Liberation Serif" fo:font-style="normal" officeooo:rsid="0089fee2" style:font-style-asian="normal" style:font-style-complex="normal"/>
    </style:style>
    <style:style style:name="T95" style:family="text">
      <style:text-properties style:font-name="Liberation Serif" fo:font-style="normal" officeooo:rsid="008a1989" style:font-style-asian="normal" style:font-style-complex="normal"/>
    </style:style>
    <style:style style:name="T96" style:family="text">
      <style:text-properties fo:font-size="8pt" fo:font-style="italic" officeooo:rsid="008f4b5f" style:font-size-asian="8pt" style:font-style-asian="italic" style:font-size-complex="8pt" style:font-style-complex="italic"/>
    </style:style>
    <style:style style:name="T97" style:family="text">
      <style:text-properties fo:font-size="8pt" fo:font-style="italic" officeooo:rsid="00945e0c" style:font-size-asian="8pt" style:font-style-asian="italic" style:font-size-complex="8pt" style:font-style-complex="italic"/>
    </style:style>
    <style:style style:name="T98" style:family="text">
      <style:text-properties fo:color="#ba2121" loext:opacity="100%" fo:font-style="normal" style:text-underline-style="none" fo:font-weight="normal"/>
    </style:style>
    <style:style style:name="T99" style:family="text">
      <style:text-properties fo:color="#000000" loext:opacity="100%" fo:font-style="normal" style:text-underline-style="none" fo:font-weight="normal"/>
    </style:style>
    <style:style style:name="T100" style:family="text">
      <style:text-properties fo:font-style="italic" officeooo:rsid="009b35e5" style:font-style-asian="italic" style:font-style-complex="italic"/>
    </style:style>
    <style:style style:name="T101" style:family="text">
      <style:text-properties officeooo:rsid="009b35e5"/>
    </style:style>
    <style:style style:name="T102" style:family="text">
      <style:text-properties fo:font-size="8pt" fo:font-style="italic" officeooo:rsid="009d0603" style:font-size-asian="8pt" style:font-style-asian="italic" style:font-size-complex="8pt" style:font-style-complex="italic"/>
    </style:style>
    <style:style style:name="T103" style:family="text">
      <style:text-properties fo:font-size="8pt" fo:font-style="italic" officeooo:rsid="009c73e1" style:font-size-asian="8pt" style:font-style-asian="italic" style:font-size-complex="8pt" style:font-style-complex="italic"/>
    </style:style>
    <style:style style:name="T104" style:family="text">
      <style:text-properties fo:font-size="8pt" fo:font-style="italic" officeooo:rsid="009e2f42" style:font-size-asian="8pt" style:font-style-asian="italic" style:font-size-complex="8pt" style:font-style-complex="italic"/>
    </style:style>
    <style:style style:name="T105" style:family="text">
      <style:text-properties fo:color="#bbbbbb" loext:opacity="100%" fo:font-style="normal" style:text-underline-style="none" fo:font-weight="normal"/>
    </style:style>
    <style:style style:name="T106" style:family="text">
      <style:text-properties officeooo:rsid="009e4c2b"/>
    </style:style>
    <style:style style:name="T107" style:family="text">
      <style:text-properties fo:font-style="italic" officeooo:rsid="009e4c2b" style:font-style-asian="italic" style:font-style-complex="italic"/>
    </style:style>
    <style:style style:name="T108" style:family="text">
      <style:text-properties officeooo:rsid="00a184f4"/>
    </style:style>
    <style:style style:name="T109" style:family="text">
      <style:text-properties fo:font-style="italic" officeooo:rsid="009eeb4e" style:font-style-asian="italic" style:font-style-complex="italic"/>
    </style:style>
    <style:style style:name="T110" style:family="text">
      <style:text-properties officeooo:rsid="009eced1"/>
    </style:style>
    <style:style style:name="T111" style:family="text">
      <style:text-properties fo:font-size="8pt" fo:language="pl" fo:country="PL" fo:font-weight="normal" officeooo:rsid="00578e9b" style:font-size-asian="8pt" style:font-weight-asian="normal" style:font-size-complex="8pt" style:font-weight-complex="normal"/>
    </style:style>
    <style:style style:name="T112" style:family="text">
      <style:text-properties fo:font-size="8pt" fo:language="pl" fo:country="PL" fo:font-weight="normal" officeooo:rsid="00512c72" style:font-size-asian="8pt" style:font-weight-asian="normal" style:font-size-complex="8pt" style:font-weight-complex="normal"/>
    </style:style>
    <style:style style:name="T113" style:family="text">
      <style:text-properties officeooo:rsid="009eeb4e"/>
    </style:style>
    <style:style style:name="T114" style:family="text">
      <style:text-properties fo:font-size="8pt" fo:font-style="italic" officeooo:rsid="00a37747" style:font-size-asian="8pt" style:font-style-asian="italic" style:font-size-complex="8pt" style:font-style-complex="italic"/>
    </style:style>
    <style:style style:name="T115" style:family="text">
      <style:text-properties officeooo:rsid="00647842"/>
    </style:style>
    <style:style style:name="T116" style:family="text">
      <style:text-properties officeooo:rsid="0064759e"/>
    </style:style>
    <style:style style:name="T117" style:family="text">
      <style:text-properties officeooo:rsid="0066d5f0"/>
    </style:style>
    <style:style style:name="T118" style:family="text">
      <style:text-properties officeooo:rsid="0061bbc8"/>
    </style:style>
    <style:style style:name="T119" style:family="text">
      <style:text-properties fo:font-size="8pt" style:font-size-asian="8pt" style:font-size-complex="8pt"/>
    </style:style>
    <style:style style:name="T120" style:family="text">
      <style:text-properties fo:font-size="8pt" fo:font-weight="normal" style:font-size-asian="8pt" style:font-weight-asian="normal" style:font-size-complex="8pt" style:font-weight-complex="normal"/>
    </style:style>
    <style:style style:name="T121" style:family="text">
      <style:text-properties fo:color="#a90d91" loext:opacity="100%" fo:font-size="9pt" style:font-size-asian="9pt" style:font-size-complex="9pt"/>
    </style:style>
    <style:style style:name="T122" style:family="text">
      <style:text-properties fo:color="#000000" loext:opacity="100%" fo:font-size="9pt" style:font-size-asian="9pt" style:font-size-complex="9pt"/>
    </style:style>
    <style:style style:name="T123" style:family="text">
      <style:text-properties officeooo:rsid="006a5d8b"/>
    </style:style>
    <style:style style:name="T124" style:family="text">
      <style:text-properties fo:font-style="normal" officeooo:rsid="00083b92" style:font-style-asian="normal" style:font-style-complex="normal"/>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23" svg:y="1.79cm" svg:width="17cm" svg:height="12.686cm" draw:z-index="5">
        <draw:image xlink:href="Pictures/10000001000003F9000002F7D78E24CC.png" xlink:type="simple" xlink:show="embed" xlink:actuate="onLoad" draw:mime-type="image/png"/>
      </draw:frame>
      <draw:frame draw:style-name="fr3" draw:name="Image4" text:anchor-type="page" text:anchor-page-number="20" svg:y="7.209cm" svg:width="17cm" svg:height="12.686cm" draw:z-index="4">
        <draw:image xlink:href="Pictures/10000001000003F9000002F7DD28357A.png" xlink:type="simple" xlink:show="embed" xlink:actuate="onLoad" draw:mime-type="image/png"/>
      </draw:frame>
      <draw:frame draw:style-name="fr3" draw:name="Image3" text:anchor-type="page" text:anchor-page-number="17" svg:y="13.496cm" svg:width="17cm" svg:height="12.686cm" draw:z-index="3">
        <draw:image xlink:href="Pictures/10000001000003F9000002F7D10B757C.png" xlink:type="simple" xlink:show="embed" xlink:actuate="onLoad" draw:mime-type="image/png"/>
      </draw:frame>
      <draw:frame draw:style-name="fr3" draw:name="Image2" text:anchor-type="page" text:anchor-page-number="14" svg:y="12.522cm" svg:width="17cm" svg:height="12.728cm" draw:z-index="2">
        <draw:image xlink:href="Pictures/10000001000003F7000002F84638A3E9.png" xlink:type="simple" xlink:show="embed" xlink:actuate="onLoad" draw:mime-type="image/png"/>
      </draw:frame>
      <text:p text:style-name="P1"><draw:frame draw:style-name="fr1" draw:name="Image1" text:anchor-type="paragraph" svg:y="0.307cm" svg:width="14.063cm" style:rel-width="scale" svg:height="4.136cm" style:rel-height="scale" draw:z-index="0"><draw:image xlink:href="Pictures/1000000000000CFA000003D11ECAF20F.jpg" xlink:type="simple" xlink:show="embed" xlink:actuate="onLoad" draw:mime-type="image/jpeg"/></draw:frame></text:p>
      <text:p text:style-name="Standard"/>
      <text:p text:style-name="Appendix">Cyberbezpieczeństwo</text:p>
      <text:p text:style-name="Appendix">Projekt</text:p>
      <text:p text:style-name="P2"/>
      <text:p text:style-name="P2"/>
      <text:p text:style-name="P2"/>
      <text:p text:style-name="Appendix">Temat projektu</text:p>
      <text:p text:style-name="P3">Szyfrowanie plików i bezpieczna wymiana kluczy</text:p>
      <text:p text:style-name="P4">(alt: System bezpiecznej wymiany plików z wykorzystaniem kryptografii symetrycznej i asymetrycznej)</text:p>
      <text:p text:style-name="P3"/>
      <text:p text:style-name="P3"/>
      <text:p text:style-name="P3"/>
      <text:p text:style-name="P3"/>
      <text:p text:style-name="P3"/>
      <text:p text:style-name="P3"/>
      <text:p text:style-name="P3"/>
      <text:p text:style-name="P3"/>
      <text:p text:style-name="P3"/>
      <text:p text:style-name="P3"/>
      <text:p text:style-name="P3"/>
      <text:p text:style-name="P3">Jakub Lewandowski</text:p>
      <text:p text:style-name="P3">3EF-ZI</text:p>
      <text:p text:style-name="P3">178746</text:p>
      <text:p text:style-name="P3"/>
      <text:p text:style-name="P3">i</text:p>
      <text:p text:style-name="P3"/>
      <text:p text:style-name="P3">Paweł Torba</text:p>
      <text:p text:style-name="P3">3EF-ZI</text:p>
      <text:p text:style-name="P3">178763</text:p>
      <text:p text:style-name="P3"/>
      <text:p text:style-name="P5"/>
      <text:table-of-content text:style-name="Sect1" text:name="_TOC0">
        <text:table-of-content-source text:outline-level="9">
          <text:index-title-template text:style-name="Contents_20_Heading">Table of Contents</text:index-title-template>
          <text:table-of-content-entry-template text:outline-level="1" text:style-name="Normalny">
            <text:index-entry-link-start text:style-name="Index_20_Link"/>
            <text:index-entry-text/>
            <text:index-entry-tab-stop style:type="right" style:leader-char="."/>
            <text:index-entry-page-number/>
            <text:index-entry-link-end/>
          </text:table-of-content-entry-template>
          <text:table-of-content-entry-template text:outline-level="2" text:style-name="Normalny">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Normalny">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Normalny">
            <text:index-entry-link-start text:style-name="Index_20_Link"/>
            <text:index-entry-text/>
            <text:index-entry-tab-stop style:type="right" style:leader-char="."/>
            <text:index-entry-page-number/>
            <text:index-entry-link-end/>
          </text:table-of-content-entry-template>
          <text:table-of-content-entry-template text:outline-level="5" text:style-name="Normalny">
            <text:index-entry-link-start text:style-name="Index_20_Link"/>
            <text:index-entry-text/>
            <text:index-entry-tab-stop style:type="right" style:leader-char="."/>
            <text:index-entry-page-number/>
            <text:index-entry-link-end/>
          </text:table-of-content-entry-template>
          <text:table-of-content-entry-template text:outline-level="6" text:style-name="Normalny">
            <text:index-entry-link-start text:style-name="Index_20_Link"/>
            <text:index-entry-text/>
            <text:index-entry-tab-stop style:type="right" style:leader-char="."/>
            <text:index-entry-page-number/>
            <text:index-entry-link-end/>
          </text:table-of-content-entry-template>
          <text:table-of-content-entry-template text:outline-level="7" text:style-name="Normalny">
            <text:index-entry-link-start text:style-name="Index_20_Link"/>
            <text:index-entry-text/>
            <text:index-entry-tab-stop style:type="right" style:leader-char="."/>
            <text:index-entry-page-number/>
            <text:index-entry-link-end/>
          </text:table-of-content-entry-template>
          <text:table-of-content-entry-template text:outline-level="8" text:style-name="Normalny">
            <text:index-entry-link-start text:style-name="Index_20_Link"/>
            <text:index-entry-text/>
            <text:index-entry-tab-stop style:type="right" style:leader-char="."/>
            <text:index-entry-page-number/>
            <text:index-entry-link-end/>
          </text:table-of-content-entry-template>
          <text:table-of-content-entry-template text:outline-level="9" text:style-name="Normalny">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6"><text:a xlink:type="simple" xlink:href="#__RefHeading___Toc3534_2443504791" office:name="1. Cel projektu" text:style-name="Index_20_Link" text:visited-style-name="Index_20_Link">1. Cel projektu<text:tab/>3</text:a></text:p>
          <text:p text:style-name="P6"><text:a xlink:type="simple" xlink:href="#__RefHeading___Toc1830_2011108690" office:name="2. Główne funkcje i zakres systemu" text:style-name="Index_20_Link" text:visited-style-name="Index_20_Link">2. Główne funkcje i zakres systemu<text:tab/>3</text:a></text:p>
          <text:p text:style-name="P6"><text:s text:c="6"/><text:a xlink:type="simple" xlink:href="#__RefHeading___Toc1834_2011108690%20Copy%201" office:name="2.1. Szyfrowanie danych" text:style-name="Index_20_Link" text:visited-style-name="Index_20_Link">2.1. Szyfrowanie danych<text:tab/>3</text:a></text:p>
          <text:p text:style-name="P6"><text:s text:c="6"/><text:a xlink:type="simple" xlink:href="#__RefHeading___Toc1834_2011108690%20Copy%201%20Copy%201" office:name="2.2. Deszyfrowanie danych" text:style-name="Index_20_Link" text:visited-style-name="Index_20_Link">2.2. Deszyfrowanie danych<text:tab/>3</text:a></text:p>
          <text:p text:style-name="P6"><text:s text:c="6"/><text:a xlink:type="simple" xlink:href="#__RefHeading___Toc1834_2011108690%20Copy%201%20Copy%201%20Copy%201" office:name="2.3. Tworzenie podpisu cyfrowego" text:style-name="Index_20_Link" text:visited-style-name="Index_20_Link">2.3. Tworzenie podpisu cyfrowego<text:tab/>3</text:a></text:p>
          <text:p text:style-name="P6"><text:s text:c="6"/><text:a xlink:type="simple" xlink:href="#__RefHeading___Toc1834_2011108690%20Copy%201%20Copy%201%20Copy%201%20Copy%201" office:name="2.4. Weryfikacja podpisu cyfrowego" text:style-name="Index_20_Link" text:visited-style-name="Index_20_Link">2.4. Weryfikacja podpisu cyfrowego<text:tab/>3</text:a></text:p>
          <text:p text:style-name="P6"><text:s text:c="6"/><text:a xlink:type="simple" xlink:href="#__RefHeading___Toc1834_2011108690%20Copy%201%20Copy%201%20Copy%201%20Copy%201%20Copy%201" office:name="2.5. Generowanie kluczy" text:style-name="Index_20_Link" text:visited-style-name="Index_20_Link">2.5. Generowanie kluczy<text:tab/>3</text:a></text:p>
          <text:p text:style-name="P6"><text:s text:c="6"/><text:a xlink:type="simple" xlink:href="#__RefHeading___Toc1834_2011108690%20Copy%201%20Copy%201%20Copy%201%20Copy%201%20Copy%201%20Copy%201" office:name="2.6. Szyfrowanie hybrydowe" text:style-name="Index_20_Link" text:visited-style-name="Index_20_Link">2.6. Szyfrowanie hybrydowe<text:tab/>4</text:a></text:p>
          <text:p text:style-name="P6"><text:a xlink:type="simple" xlink:href="#__RefHeading___Toc1832_2011108690" office:name="3. Podstawy teoretyczne kryptografii" text:style-name="Index_20_Link" text:visited-style-name="Index_20_Link">3. Podstawy teoretyczne kryptografii<text:tab/>5</text:a></text:p>
          <text:p text:style-name="P6"><text:s text:c="6"/><text:a xlink:type="simple" xlink:href="#__RefHeading___Toc1834_2011108690" office:name="3.1. Kryptografia symetryczna" text:style-name="Index_20_Link" text:visited-style-name="Index_20_Link">3.1. Kryptografia symetryczna<text:tab/>5</text:a></text:p>
          <text:p text:style-name="P6"><text:s text:c="6"/><text:a xlink:type="simple" xlink:href="#__RefHeading___Toc1836_2011108690" office:name="3.2. Kryptografia asymetryczna" text:style-name="Index_20_Link" text:visited-style-name="Index_20_Link">3.2. Kryptografia asymetryczna<text:tab/>6</text:a></text:p>
          <text:p text:style-name="P6"><text:s text:c="6"/><text:a xlink:type="simple" xlink:href="#__RefHeading___Toc1844_2011108690" office:name="3.3. Podpis cyfrowy" text:style-name="Index_20_Link" text:visited-style-name="Index_20_Link">3.3. Podpis cyfrowy<text:tab/>7</text:a></text:p>
          <text:p text:style-name="P6"><text:s text:c="6"/><text:a xlink:type="simple" xlink:href="#__RefHeading___Toc1846_2011108690" office:name="3.4. Integralność i poufność danych" text:style-name="Index_20_Link" text:visited-style-name="Index_20_Link">3.4. Integralność i poufność danych<text:tab/>7</text:a></text:p>
          <text:p text:style-name="P6"><text:s text:c="6"/><text:a xlink:type="simple" xlink:href="#__RefHeading___Toc1838_2011108690" office:name="3.5. Algorytm AES" text:style-name="Index_20_Link" text:visited-style-name="Index_20_Link">3.5. Algorytm AES<text:tab/>8</text:a></text:p>
          <text:p text:style-name="P6"><text:s text:c="10"/><text:a xlink:type="simple" xlink:href="#__RefHeading___Toc1838_2011108690%20Copy%201" office:name="3.5.1. Proces szyfrowania" text:style-name="Index_20_Link" text:visited-style-name="Index_20_Link">3.5.1. Proces szyfrowania<text:tab/>8</text:a></text:p>
          <text:p text:style-name="P6"><text:s text:c="10"/><text:a xlink:type="simple" xlink:href="#__RefHeading___Toc1838_2011108690%20Copy%201%20Copy%201" office:name="3.5.2. Rozszerzanie klucza (Key Expansion)" text:style-name="Index_20_Link" text:visited-style-name="Index_20_Link">3.5.2. Rozszerzanie klucza (Key Expansion)<text:tab/>9</text:a></text:p>
          <text:p text:style-name="P6"><text:s text:c="10"/><text:a xlink:type="simple" xlink:href="#__RefHeading___Toc1838_2011108690%20Copy%201%20Copy%201%20Copy%202" office:name="3.5.3. Zalety algorytmu AES" text:style-name="Index_20_Link" text:visited-style-name="Index_20_Link">3.5.3. Zalety algorytmu AES<text:tab/>9</text:a></text:p>
          <text:p text:style-name="P6"><text:s text:c="10"/><text:a xlink:type="simple" xlink:href="#__RefHeading___Toc1838_2011108690%20Copy%201%20Copy%201%20Copy%202%20Copy%201" office:name="3.5.4. Wady algorytmu AES" text:style-name="Index_20_Link" text:visited-style-name="Index_20_Link">3.5.4. Wady algorytmu AES<text:tab/>9</text:a></text:p>
          <text:p text:style-name="P6"><text:s text:c="10"/><text:a xlink:type="simple" xlink:href="#__RefHeading___Toc1838_2011108690%20Copy%201%20Copy%201%20Copy%202%20Copy%201%20Copy%201" office:name="3.5.5. Zastosowania algorytmu AES" text:style-name="Index_20_Link" text:visited-style-name="Index_20_Link">3.5.5. Zastosowania algorytmu AES<text:tab/>9</text:a></text:p>
          <text:p text:style-name="P6"><text:s text:c="6"/><text:a xlink:type="simple" xlink:href="#__RefHeading___Toc1840_2011108690" office:name="3.6. Algorytm RSA" text:style-name="Index_20_Link" text:visited-style-name="Index_20_Link">3.6. Algorytm RSA<text:tab/>10</text:a></text:p>
          <text:p text:style-name="P6"><text:s text:c="10"/><text:a xlink:type="simple" xlink:href="#__RefHeading___Toc3125_2011108690" office:name="3.6.1. Zasada działania RSA" text:style-name="Index_20_Link" text:visited-style-name="Index_20_Link">3.6.1. Zasada działania RSA<text:tab/>10</text:a></text:p>
          <text:p text:style-name="P6"><text:s text:c="10"/><text:a xlink:type="simple" xlink:href="#__RefHeading___Toc3125_2011108690%20Copy%201" office:name="3.6.2. Podpisywanie wiadomości" text:style-name="Index_20_Link" text:visited-style-name="Index_20_Link">3.6.2. Podpisywanie wiadomości<text:tab/>10</text:a></text:p>
          <text:p text:style-name="P6"><text:s text:c="10"/><text:a xlink:type="simple" xlink:href="#__RefHeading___Toc3125_2011108690%20Copy%201%20Copy%201" office:name="3.6.3. Zastosowanie" text:style-name="Index_20_Link" text:visited-style-name="Index_20_Link">3.6.3. Zastosowanie<text:tab/>11</text:a></text:p>
          <text:p text:style-name="P6"><text:s text:c="10"/><text:a xlink:type="simple" xlink:href="#__RefHeading___Toc3125_2011108690%20Copy%201%20Copy%201%20Copy%201" office:name="3.6.4. Zalety RSA" text:style-name="Index_20_Link" text:visited-style-name="Index_20_Link">3.6.4. Zalety RSA<text:tab/>11</text:a></text:p>
          <text:p text:style-name="P6"><text:s text:c="10"/><text:a xlink:type="simple" xlink:href="#__RefHeading___Toc3125_2011108690%20Copy%201%20Copy%201%20Copy%201%20Copy%201" office:name="3.6.5. Zalety RSA" text:style-name="Index_20_Link" text:visited-style-name="Index_20_Link">3.6.5. Zalety RSA<text:tab/>11</text:a></text:p>
          <text:p text:style-name="P6"><text:s text:c="6"/><text:a xlink:type="simple" xlink:href="#__RefHeading___Toc1842_2011108690" office:name="3.7. SHA-256" text:style-name="Index_20_Link" text:visited-style-name="Index_20_Link">3.7. SHA-256<text:tab/>12</text:a></text:p>
          <text:p text:style-name="P6"><text:s text:c="10"/><text:a xlink:type="simple" xlink:href="#__RefHeading___Toc6486_2011108690" office:name="3.7.1. Proces obliczania skrótu" text:style-name="Index_20_Link" text:visited-style-name="Index_20_Link">3.7.1. Proces obliczania skrótu<text:tab/>12</text:a></text:p>
          <text:p text:style-name="P6"><text:s text:c="10"/><text:a xlink:type="simple" xlink:href="#__RefHeading___Toc6488_2011108690" office:name="3.7.2. Zalety algorytmu SHA-256" text:style-name="Index_20_Link" text:visited-style-name="Index_20_Link">3.7.2. Zalety algorytmu SHA-256<text:tab/>12</text:a></text:p>
          <text:p text:style-name="P6"><text:s text:c="10"/><text:a xlink:type="simple" xlink:href="#__RefHeading___Toc6490_2011108690" office:name="3.7.3. Wady algorytmu SHA-256" text:style-name="Index_20_Link" text:visited-style-name="Index_20_Link">3.7.3. Wady algorytmu SHA-256<text:tab/>12</text:a></text:p>
          <text:p text:style-name="P6"><text:s text:c="10"/><text:a xlink:type="simple" xlink:href="#__RefHeading___Toc6492_2011108690" office:name="3.7.4. Zastosowania" text:style-name="Index_20_Link" text:visited-style-name="Index_20_Link">3.7.4. Zastosowania<text:tab/>13</text:a></text:p>
          <text:p text:style-name="P6"><text:a xlink:type="simple" xlink:href="#__RefHeading___Toc425_2443504791_Copy_1_" office:name="4. Technologie i narzędzia" text:style-name="Index_20_Link" text:visited-style-name="Index_20_Link">4. Technologie i narzędzia<text:tab/>14</text:a></text:p>
          <text:p text:style-name="P6"><text:a xlink:type="simple" xlink:href="#__RefHeading___Toc12126_3356077753" office:name="5. Architektura aplikacji" text:style-name="Index_20_Link" text:visited-style-name="Index_20_Link">5. Architektura aplikacji<text:tab/>15</text:a></text:p>
          <text:p text:style-name="P6"><text:s text:c="6"/><text:a xlink:type="simple" xlink:href="#__RefHeading___Toc1848_2011108690" office:name="5.1. Struktura katalogów i plików" text:style-name="Index_20_Link" text:visited-style-name="Index_20_Link">5.1. Struktura katalogów i plików<text:tab/>15</text:a></text:p>
          <text:p text:style-name="P6"><text:s text:c="6"/><text:a xlink:type="simple" xlink:href="#__RefHeading___Toc1850_2011108690" office:name="5.2. Moduły systemu" text:style-name="Index_20_Link" text:visited-style-name="Index_20_Link">5.2. Moduły systemu<text:tab/>15</text:a></text:p>
          <text:p text:style-name="P6"><text:s text:c="10"/><text:a xlink:type="simple" xlink:href="#__RefHeading___Toc6703_3721631286" office:name="5.2.1. Moduł szyfrowania – dopisać wyjaśnienie kodu itp" text:style-name="Index_20_Link" text:visited-style-name="Index_20_Link">5.2.1. Moduł szyfrowania – dopisać wyjaśnienie kodu itp<text:tab/>15</text:a></text:p>
          <text:p text:style-name="P6"><text:s text:c="10"/><text:a xlink:type="simple" xlink:href="#__RefHeading___Toc6705_3721631286" office:name="5.2.2. Moduł deszyfrowania – dopisać wyjaśnienie kodu itp" text:style-name="Index_20_Link" text:visited-style-name="Index_20_Link">5.2.2. Moduł deszyfrowania – dopisać wyjaśnienie kodu itp<text:tab/>19</text:a></text:p>
          <text:p text:style-name="P6"><text:s text:c="10"/><text:a xlink:type="simple" xlink:href="#__RefHeading___Toc6707_3721631286" office:name="5.2.3. Moduł podpisu cyfrowego – dopisać wyjaśnienie kodu itp" text:style-name="Index_20_Link" text:visited-style-name="Index_20_Link">5.2.3. Moduł podpisu cyfrowego – dopisać wyjaśnienie kodu itp<text:tab/>20</text:a></text:p>
          <text:p text:style-name="P6"><text:s text:c="10"/><text:a xlink:type="simple" xlink:href="#__RefHeading___Toc6709_3721631286" office:name="5.2.5. Moduł generowania kluczy – dopisać wyjaśnienie kodu itp." text:style-name="Index_20_Link" text:visited-style-name="Index_20_Link">5.2.5. Moduł generowania kluczy – dopisać wyjaśnienie kodu itp.<text:tab/>21</text:a></text:p>
          <text:p text:style-name="P6"><text:a xlink:type="simple" xlink:href="#__RefHeading___Toc12128_3356077753" office:name="6. Diagram przepływu danych (szyfrowanie/odszyfrowanie itp.)" text:style-name="Index_20_Link" text:visited-style-name="Index_20_Link">6. Diagram przepływu danych (szyfrowanie/odszyfrowanie itp.)<text:tab/>22</text:a></text:p>
          <text:p text:style-name="P6"><text:a xlink:type="simple" xlink:href="#__RefHeading___Toc7243_1429308687" office:name="7. Bezpieczeństwo systemu i możliwe zagrożenia (w odniesieniu do tematu projektu)" text:style-name="Index_20_Link" text:visited-style-name="Index_20_Link">7. Bezpieczeństwo systemu i możliwe zagrożenia (w odniesieniu do tematu projektu)<text:tab/>22</text:a></text:p>
          <text:p text:style-name="P6"><text:a xlink:type="simple" xlink:href="#__RefHeading___Toc7245_1429308687" office:name="8. Implementacja systemu (teoretyczna, jak zaimplenetować w organizajci czy cuś???)" text:style-name="Index_20_Link" text:visited-style-name="Index_20_Link">8. Implementacja systemu (teoretyczna, jak zaimplenetować w organizajci czy cuś???)<text:tab/>22</text:a></text:p>
          <text:p text:style-name="P6"><text:a xlink:type="simple" xlink:href="#__RefHeading___Toc7245_1429308687_kopia_" office:name="9. Przykład użycia / testowanie systemu" text:style-name="Index_20_Link" text:visited-style-name="Index_20_Link">9. Przykład użycia / testowanie systemu<text:tab/>22</text:a></text:p>
          <text:p text:style-name="P6"><text:a xlink:type="simple" xlink:href="#__RefHeading___Toc3006_1804544189" office:name="10. Podsumowanie i wnioski" text:style-name="Index_20_Link" text:visited-style-name="Index_20_Link">10. Podsumowanie i wnioski<text:tab/>22</text:a></text:p>
          <text:p text:style-name="P6"><text:a xlink:type="simple" xlink:href="#__RefHeading___Toc12132_3356077753_Copy_" office:name="14. Załączniki" text:style-name="Index_20_Link" text:visited-style-name="Index_20_Link">14. Załączniki<text:tab/>23</text:a></text:p>
          <text:p text:style-name="P6"><text:a xlink:type="simple" xlink:href="#__RefHeading___Toc431_2443504791" office:name="14. Bibliografia" text:style-name="Index_20_Link" text:visited-style-name="Index_20_Link">14. Bibliografia<text:tab/>25</text:a></text:p>
        </text:index-body>
      </text:table-of-content>
      <text:h text:style-name="Nagłówek_20_1" text:outline-level="1"><text:bookmark-start text:name="__RefHeading___Toc3534_2443504791"/><text:soft-page-break/><text:span text:style-name="Strong_20_Emphasis">1.<text:tab/>Cel projektu</text:span><text:bookmark-end text:name="__RefHeading___Toc3534_2443504791"/></text:h>
      <text:p text:style-name="P7"><text:tab/>Celem projektu jest opracowanie prostej aplikacji umożliwiającej bezpieczne szyfrowanie i wymianę danych. System ma pozwalać na zaszyfrowanie pliku <text:span text:style-name="T1">oraz tekstu</text:span>, <text:span text:style-name="T1">generowanie klucza szyfrującego (i jego szyfrowanie w celu bezpiecznej wymiany)</text:span>, podpisanie pliku podpisem cyfrowym, weryfikację podpisu oraz odszyfrowanie pliku po stronie odbiorcy.</text:p>
      <text:p text:style-name="P8"><text:tab/>Projekt obejmuje również analizę teoretycznych podstaw kryptografii, w szczególności zagadnień związanych z szyfrowaniem symetrycznym i asymetrycznym, podpisem cyfrowym, <text:span text:style-name="T1">bezpieczną</text:span> wymianą kluczy oraz mechanizmami zapewniania integralności i bezpieczeństwa danych.</text:p>
      <text:h text:style-name="P9" text:outline-level="1"><text:bookmark-start text:name="__RefHeading___Toc1830_2011108690"/><text:span text:style-name="Strong_20_Emphasis">2.</text:span><text:tab/><text:span text:style-name="Strong_20_Emphasis">Główne funkcje i zakres systemu</text:span><text:bookmark-end text:name="__RefHeading___Toc1830_2011108690"/></text:h>
      <text:h text:style-name="P10" text:outline-level="2"><text:bookmark-start text:name="__RefHeading___Toc1834_2011108690 Copy 1"/><text:span text:style-name="Domyślna_20_czcionka_20_akapitu"><text:span text:style-name="T2">2</text:span></text:span><text:span text:style-name="Domyślna_20_czcionka_20_akapitu">.1. <text:tab/>Szyfrowanie danych</text:span><text:bookmark-end text:name="__RefHeading___Toc1834_2011108690 Copy 1"/></text:h>
      <text:p text:style-name="P11"><text:span text:style-name="Domyślna_20_czcionka_20_akapitu"><text:tab/>Użytkownik może wskazać plik wejściowy, lokalizację pliku wyjściowego, </text:span><text:span text:style-name="Domyślna_20_czcionka_20_akapitu"><text:span text:style-name="T2">algorytm szyfrowania oraz podstawową konfigurację zmiennych algorytmu szyfrującego</text:span></text:span><text:span text:style-name="Domyślna_20_czcionka_20_akapitu">. Aplikacja automatycznie generuje klucz</text:span><text:span text:style-name="Domyślna_20_czcionka_20_akapitu"><text:span text:style-name="T2">e</text:span></text:span><text:span text:style-name="Domyślna_20_czcionka_20_akapitu"> </text:span><text:span text:style-name="Domyślna_20_czcionka_20_akapitu"><text:span text:style-name="T2">(np.: </text:span></text:span><text:span text:style-name="Domyślna_20_czcionka_20_akapitu">AES</text:span><text:span text:style-name="Domyślna_20_czcionka_20_akapitu"><text:span text:style-name="T2">)</text:span></text:span><text:span text:style-name="Domyślna_20_czcionka_20_akapitu"> oraz wartość </text:span><text:span text:style-name="Domyślna_20_czcionka_20_akapitu"><text:span text:style-name="T2">inne konieczne wartości (np.: </text:span></text:span><text:span text:style-name="Domyślna_20_czcionka_20_akapitu">Nonce/IV</text:span><text:span text:style-name="Domyślna_20_czcionka_20_akapitu"><text:span text:style-name="T2">)</text:span></text:span><text:span text:style-name="Domyślna_20_czcionka_20_akapitu">, wymagane do bezpiecznego zaszyfrowania pliku.</text:span></text:p>
      <text:h text:style-name="P10" text:outline-level="2"><text:bookmark-start text:name="__RefHeading___Toc1834_2011108690 Copy 1 Copy 1"/><text:span text:style-name="Domyślna_20_czcionka_20_akapitu"><text:span text:style-name="T2">2</text:span></text:span><text:span text:style-name="Domyślna_20_czcionka_20_akapitu">.</text:span><text:span text:style-name="Domyślna_20_czcionka_20_akapitu"><text:span text:style-name="T2">2</text:span></text:span><text:span text:style-name="Domyślna_20_czcionka_20_akapitu">. <text:tab/></text:span><text:span text:style-name="Domyślna_20_czcionka_20_akapitu"><text:span text:style-name="T2">Deszyfrowanie</text:span></text:span><text:span text:style-name="Domyślna_20_czcionka_20_akapitu"> danych</text:span><text:bookmark-end text:name="__RefHeading___Toc1834_2011108690 Copy 1 Copy 1"/></text:h>
      <text:p text:style-name="P11"><text:span text:style-name="Domyślna_20_czcionka_20_akapitu"><text:tab/>Użytkownik może wskazać zaszyfrowany plik, lokalizację pliku wynikowego, klucz oraz </text:span><text:span text:style-name="Domyślna_20_czcionka_20_akapitu"><text:span text:style-name="T2">inne </text:span></text:span><text:span text:style-name="Domyślna_20_czcionka_20_akapitu">wartość wykorzystane podczas szyfrowania. W przypadku zastosowania szyfrowania hybrydowego możliwe jest również wykorzystanie klucza prywatnego do odszyfrowania klucza </text:span><text:span text:style-name="Domyślna_20_czcionka_20_akapitu"><text:span text:style-name="T2">szyfrującego</text:span></text:span><text:span text:style-name="Domyślna_20_czcionka_20_akapitu">.</text:span></text:p>
      <text:h text:style-name="P10" text:outline-level="2"><text:bookmark-start text:name="__RefHeading___Toc1834_2011108690 Copy 1 Copy 1 Copy 1"/><text:span text:style-name="Domyślna_20_czcionka_20_akapitu"><text:span text:style-name="T2">2</text:span></text:span><text:span text:style-name="Domyślna_20_czcionka_20_akapitu">.</text:span><text:span text:style-name="Domyślna_20_czcionka_20_akapitu"><text:span text:style-name="T2">3</text:span></text:span><text:span text:style-name="Domyślna_20_czcionka_20_akapitu">. <text:tab/></text:span><text:span text:style-name="Domyślna_20_czcionka_20_akapitu"><text:span text:style-name="T2">Tworzenie</text:span></text:span><text:span text:style-name="Domyślna_20_czcionka_20_akapitu"> </text:span><text:span text:style-name="Domyślna_20_czcionka_20_akapitu"><text:span text:style-name="T2">podpisu cyfrowego</text:span></text:span><text:bookmark-end text:name="__RefHeading___Toc1834_2011108690 Copy 1 Copy 1 Copy 1"/></text:h>
      <text:p text:style-name="P11"><text:span text:style-name="Domyślna_20_czcionka_20_akapitu"><text:tab/>Użytkownik może wskazać plik przeznaczony do podpisania, klucz prywatny oraz lokalizację zapisu podpisu cyfrowego. Aplikacja generuje skrót pliku przy użyciu algorytmu SHA-256, a następnie tworzy podpis cyfrowy, który pozwala potwierdzić autentyczność nadawcy oraz integralność danych.</text:span></text:p>
      <text:h text:style-name="P10" text:outline-level="2"><text:bookmark-start text:name="__RefHeading___Toc1834_2011108690 Copy 1 Copy 1 Copy 1 Copy 1"/><text:span text:style-name="Domyślna_20_czcionka_20_akapitu"><text:span text:style-name="T2">2</text:span></text:span><text:span text:style-name="Domyślna_20_czcionka_20_akapitu">.</text:span><text:span text:style-name="Domyślna_20_czcionka_20_akapitu"><text:span text:style-name="T2">4</text:span></text:span><text:span text:style-name="Domyślna_20_czcionka_20_akapitu">. <text:tab/>Weryfikacja podpisu cyfrowego</text:span><text:bookmark-end text:name="__RefHeading___Toc1834_2011108690 Copy 1 Copy 1 Copy 1 Copy 1"/></text:h>
      <text:p text:style-name="P11"><text:span text:style-name="Domyślna_20_czcionka_20_akapitu"><text:tab/>Użytkownik może wskazać plik, podpis cyfrowy oraz klucz publiczny nadawcy. Aplikacja sprawdza poprawność podpisu i informuje, czy plik został podpisany przez właściciela wskazanego klucza prywatnego oraz czy jego zawartość nie została zmodyfikowana po podpisaniu.<text:tab/></text:span></text:p>
      <text:h text:style-name="P10" text:outline-level="2"><text:bookmark-start text:name="__RefHeading___Toc1834_2011108690 Copy 1 Copy 1 Copy 1 Copy 1 Copy 1"/><text:span text:style-name="Domyślna_20_czcionka_20_akapitu"><text:span text:style-name="T2">2</text:span></text:span><text:span text:style-name="Domyślna_20_czcionka_20_akapitu">.</text:span><text:span text:style-name="Domyślna_20_czcionka_20_akapitu"><text:span text:style-name="T2">5</text:span></text:span><text:span text:style-name="Domyślna_20_czcionka_20_akapitu">. <text:tab/></text:span><text:span text:style-name="Domyślna_20_czcionka_20_akapitu"><text:span text:style-name="T2">Generowanie kluczy</text:span></text:span><text:bookmark-end text:name="__RefHeading___Toc1834_2011108690 Copy 1 Copy 1 Copy 1 Copy 1 Copy 1"/></text:h>
      <text:p text:style-name="P11"><text:span text:style-name="Domyślna_20_czcionka_20_akapitu">Użytkownik może wygenerować parę kluczy </text:span><text:span text:style-name="Domyślna_20_czcionka_20_akapitu"><text:span text:style-name="T2">(publiczy i prywatny)</text:span></text:span><text:span text:style-name="Domyślna_20_czcionka_20_akapitu">, określając ich rozmiar oraz lokalizację zapisania klucza publicznego i prywatnego. Wygenerowane klucze mogą zostać wykorzystane do szyfrowania hybrydowego oraz tworzenia i weryfikacji podpisów cyfrowych.</text:span></text:p>
      <text:h text:style-name="P10" text:outline-level="2"><text:bookmark-start text:name="__RefHeading___Toc1834_2011108690 Copy 1 Copy 1 Copy 1 Copy 1 Copy 1 Copy 1"/><text:soft-page-break/><text:span text:style-name="Domyślna_20_czcionka_20_akapitu"><text:span text:style-name="T2">2</text:span></text:span><text:span text:style-name="Domyślna_20_czcionka_20_akapitu">.</text:span><text:span text:style-name="Domyślna_20_czcionka_20_akapitu"><text:span text:style-name="T2">6</text:span></text:span><text:span text:style-name="Domyślna_20_czcionka_20_akapitu">. <text:tab/>Szyfrowanie hybrydowe</text:span><text:bookmark-end text:name="__RefHeading___Toc1834_2011108690 Copy 1 Copy 1 Copy 1 Copy 1 Copy 1 Copy 1"/></text:h>
      <text:p text:style-name="P11"><text:span text:style-name="Domyślna_20_czcionka_20_akapitu"><text:tab/>Użytkownik może zadecydować, czy wygenerowany podczas szyfrowania klucz ma zostać dodatkowo zabezpieczony przy użyciu klucza publicznego odbiorcy. W takim przypadku dane są szyfrowane </text:span><text:span text:style-name="Domyślna_20_czcionka_20_akapitu"><text:span text:style-name="T2">wybranym</text:span></text:span><text:span text:style-name="Domyślna_20_czcionka_20_akapitu"> algorytmem, natomiast klucz </text:span><text:span text:style-name="Domyślna_20_czcionka_20_akapitu"><text:span text:style-name="T2">szyfrowania</text:span></text:span><text:span text:style-name="Domyślna_20_czcionka_20_akapitu"> zostaje zaszyfrowany algorytmem RSA. Dzięki temu możliwe jest bezpieczne przekazanie klucza szyfrującego odbiorcy. Rozwiązanie to łączy wysoką wydajność kryptografii symetrycznej z bezpieczeństwem wymiany kluczy oferowanym przez kryptografię asymetryczną.</text:span></text:p>
      <text:p text:style-name="P11"><text:span text:style-name="Domyślna_20_czcionka_20_akapitu"/></text:p>
      <text:p text:style-name="P12"><text:span text:style-name="Domyślna_20_czcionka_20_akapitu"/></text:p>
      <text:p text:style-name="P12"><text:span text:style-name="Domyślna_20_czcionka_20_akapitu"/></text:p>
      <text:h text:style-name="P13" text:outline-level="1"><text:bookmark-start text:name="__RefHeading___Toc1832_2011108690"/><text:span text:style-name="Domyślna_20_czcionka_20_akapitu">3. <text:tab/>Podstawy teoretyczne kryptografii</text:span><text:bookmark-end text:name="__RefHeading___Toc1832_2011108690"/></text:h>
      <text:p text:style-name="Text_20_body"><text:tab/>Kryptografia to praktyka i nauka zajmująca się technikami bezpiecznej komunikacji w obliczu działań podmiotów o wrogich zamiarach. <text:span text:style-name="T3">K</text:span>ryptografia polega na tworzeniu i analizowaniu protokołów, które uniemożliwiają osobom trzecim lub ogółowi społeczeństwa odczytanie prywatnych wiadomości.</text:p>
      <text:p text:style-name="Text_20_body"><text:tab/>Współczesna kryptografia stanowi punkt styku takich dyscyplin, jak matematyka, informatyka, bezpieczeństwo informacji, elektrotechnika, cyfrowe przetwarzanie sygnałów <text:span text:style-name="T3">czy</text:span> fizyka. Podstawowe pojęcia związane z bezpieczeństwem informacji (poufność danych, integralność danych, uwierzytelnianie i niezaprzeczalność) są również kluczowe dla kryptografii. Praktyczne zastosowania kryptografii obejmują handel elektroniczny, karty płatnicze oparte na chipach, waluty cyfrowe, hasła komputerowe oraz komunikację wojskową. </text:p>
      <text:h text:style-name="Nagłówek_20_2" text:outline-level="2"><text:bookmark-start text:name="__RefHeading___Toc1834_2011108690"/><text:span text:style-name="Domyślna_20_czcionka_20_akapitu">3.1. <text:tab/>Kryptografia symetryczna</text:span><text:bookmark-end text:name="__RefHeading___Toc1834_2011108690"/></text:h>
      <text:p text:style-name="P7"><text:span text:style-name="Domyślna_20_czcionka_20_akapitu"><text:span text:style-name="T4"><text:tab/>Kryptografia symetryczna p</text:span></text:span><text:span text:style-name="Domyślna_20_czcionka_20_akapitu">olega na tym, że nadawca i odbiorca używają tego samego tajnego klucza do szyfrowania i odszyfrowywania danych </text:span><text:span text:style-name="Domyślna_20_czcionka_20_akapitu"><text:span text:style-name="T4">(klucz symetryczny) - o</text:span></text:span><text:span text:style-name="Domyślna_20_czcionka_20_akapitu">znacza to, że zarówno nadawca, jak i odbiorca muszą posiadać ten sam tajny klucz.</text:span></text:p>
      <text:p text:style-name="P7"><text:tab/>Szyfry <text:span text:style-name="T4">oparte</text:span> o kluczu symetrycznym są realizowane albo jako szyfry blokowe, albo jako szyfry strumieniowe. Szyfr blokowy szyfruje dane wejściowe w postaci bloków tekstu jawnego, w przeciwieństwie do pojedynczych znaków, które są formą wejściową stosowaną w szyfrach strumieniowych <text:span text:style-name="T4">(</text:span>bit po bicie lub znak po znaku<text:span text:style-name="T4">)</text:span>. <text:span text:style-name="T4">Do szyfrów blokowych zaliczają się m.in.: </text:span><text:span text:style-name="T5">DES (Data Encryption Standard)</text:span><text:span text:style-name="T4"> czy </text:span><text:span text:style-name="T5">AES (Advanced Encryption Standard)</text:span><text:span text:style-name="T4">. Do szyfrów strumieniowych zalicza się </text:span><text:span text:style-name="T5">RC4</text:span><text:span text:style-name="T4">.</text:span></text:p>
      <text:p text:style-name="P7">Zalety kryptografii symetrycznej:</text:p>
      <text:list text:style-name="L1">
        <text:list-item>
          <text:p text:style-name="P14">wysoka szybkość działani,</text:p>
        </text:list-item>
        <text:list-item>
          <text:p text:style-name="P14">niskie wymagania obliczeniowe,</text:p>
        </text:list-item>
        <text:list-item>
          <text:p text:style-name="P14"><text:span text:style-name="Strong_20_Emphasis"><text:span text:style-name="T6">w</text:span></text:span><text:span text:style-name="Strong_20_Emphasis"><text:span text:style-name="T7">ysoka wydajność.</text:span></text:span></text:p>
        </text:list-item>
      </text:list>
      <text:p text:style-name="Text_20_body"><text:tab/>Wady kryptografii symetrycznej:</text:p>
      <text:list text:style-name="L2">
        <text:list-item>
          <text:p text:style-name="P15"><text:span text:style-name="T4">p</text:span>roblem dystrybucji klucza,</text:p>
        </text:list-item>
        <text:list-item>
          <text:p text:style-name="P15"><text:span text:style-name="Strong_20_Emphasis"><text:span text:style-name="T6">s</text:span></text:span><text:span text:style-name="Strong_20_Emphasis"><text:span text:style-name="T7">kalowalność.</text:span></text:span></text:p>
        </text:list-item>
      </text:list>
      <text:h text:style-name="P16" text:outline-level="2"/>
      <text:h text:style-name="P17" text:outline-level="2"><text:bookmark-start text:name="__RefHeading___Toc1836_2011108690"/><text:span text:style-name="Domyślna_20_czcionka_20_akapitu">3.2.<text:tab/>Kryptografia asymetryczna</text:span><text:bookmark-end text:name="__RefHeading___Toc1836_2011108690"/></text:h>
      <text:p text:style-name="P7"><text:span text:style-name="Strong_20_Emphasis"><text:span text:style-name="T7"><text:tab/></text:span></text:span><text:span text:style-name="Domyślna_20_czcionka_20_akapitu"><text:span text:style-name="T7">Kryptografia asymetryczna polega na wykorzystaniu </text:span></text:span><text:span text:style-name="Strong_20_Emphasis"><text:span text:style-name="T7">dwóch różnych, lecz matematycznie powiązanych kluczy</text:span></text:span><text:span text:style-name="Domyślna_20_czcionka_20_akapitu"><text:span text:style-name="T7">: klucza publicznego i klucza prywatnego. Klucz publiczny może być udostępniany wszystkim użytkownikom, natomiast klucz prywatny musi pozostać tajny i być znany wyłącznie właścicielowi. Dane zaszyfrowane kluczem publicznym mogą zostać odszyfrowane jedynie odpowiadającym mu kluczem prywatnym.</text:span></text:span></text:p>
      <text:p text:style-name="P7"><text:span text:style-name="Domyślna_20_czcionka_20_akapitu"><text:span text:style-name="T7">Do najpopularniejszych algorytmów asymetrycznych zalicza się:</text:span></text:span></text:p>
      <text:list text:style-name="L3">
        <text:list-item>
          <text:p text:style-name="P18">RSA (Rivest–Shamir–Adleman), </text:p>
        </text:list-item>
        <text:list-item>
          <text:p text:style-name="P18">Diffie–Hellman, </text:p>
        </text:list-item>
        <text:list-item>
          <text:p text:style-name="P18">ECC (Elliptic Curve Cryptography), </text:p>
        </text:list-item>
        <text:list-item>
          <text:p text:style-name="P18">DSA (Digital Signature Algorithm).</text:p>
        </text:list-item>
      </text:list>
      <text:p text:style-name="P7"><text:span text:style-name="T7"><text:tab/>Kryptografia asymetryczna jest wykorzystywana nie tylko do szyfrowania danych, ale również do tworzenia </text:span><text:span text:style-name="Strong_20_Emphasis"><text:span text:style-name="T7">podpisów cyfrowych</text:span></text:span><text:span text:style-name="T7">, które umożliwiają potwierdzenie autentyczności nadawcy oraz integralności przesyłanych danych.</text:span></text:p>
      <text:p text:style-name="P19"><text:tab/>Szyfry <text:span text:style-name="T4">oparte</text:span> o kluczu symetrycznym są realizowane albo jako szyfry blokowe, albo jako szyfry strumieniowe. Szyfr blokowy szyfruje dane wejściowe w postaci bloków tekstu jawnego, w przeciwieństwie do pojedynczych znaków, które są formą wejściową stosowaną w szyfrach strumieniowych <text:span text:style-name="T4">(</text:span>bit po bicie lub znak po znaku<text:span text:style-name="T4">)</text:span>. <text:span text:style-name="T4">Do szyfrów blokowych zaliczają się m.in.: </text:span><text:span text:style-name="T5">DES (Data Encryption Standard)</text:span><text:span text:style-name="T4"> czy </text:span><text:span text:style-name="T5">AES (Advanced Encryption Standard)</text:span><text:span text:style-name="T4">. Do szyfrów strumieniowych zalicza się </text:span><text:span text:style-name="T5">RC4</text:span><text:span text:style-name="T4">.</text:span></text:p>
      <text:p text:style-name="P7"><text:span text:style-name="Strong_20_Emphasis"><text:span text:style-name="T7">Zalety kryptografii asymetrycznej:</text:span></text:span></text:p>
      <text:list text:style-name="L4">
        <text:list-item>
          <text:p text:style-name="P20"><text:span text:style-name="Strong_20_Emphasis"><text:span text:style-name="T7">brak konieczności bezpiecznego przekazywania tajnego klucza, </text:span></text:span></text:p>
        </text:list-item>
      </text:list>
      <text:list text:style-name="L5">
        <text:list-item>
          <text:p text:style-name="P21">możliwość stosowania podpisów cyfrowych, </text:p>
        </text:list-item>
      </text:list>
      <text:list text:style-name="L6">
        <text:list-item>
          <text:p text:style-name="P22">wysoki poziom bezpieczeństwa, </text:p>
        </text:list-item>
      </text:list>
      <text:list text:style-name="L7">
        <text:list-item>
          <text:p text:style-name="P23">dobra skalowalność w dużych sieciach.</text:p>
        </text:list-item>
      </text:list>
      <text:p text:style-name="P19"><text:tab/>Wady kryptografii asymetrycznej:</text:p>
      <text:list text:style-name="L8">
        <text:list-item>
          <text:p text:style-name="P24"><text:span text:style-name="Strong_20_Emphasis"><text:span text:style-name="T7">mniejsza szybkość działania w porównaniu z kryptografią symetryczną, </text:span></text:span></text:p>
        </text:list-item>
      </text:list>
      <text:list text:style-name="L9">
        <text:list-item>
          <text:p text:style-name="P25">większe wymagania obliczeniowe, </text:p>
        </text:list-item>
      </text:list>
      <text:list text:style-name="L10">
        <text:list-item>
          <text:p text:style-name="P26">nieefektywność przy szyfrowaniu dużych ilości danych.</text:p>
        </text:list-item>
      </text:list>
      <text:p text:style-name="P7"><text:span text:style-name="Strong_20_Emphasis"><text:span text:style-name="T7"><text:tab/>W praktyce kryptografia asymetryczna jest często łączona z kryptografią symetryczną. Klucz publiczny służy do bezpiecznej wymiany klucza symetrycznego, natomiast właściwe dane są szyfrowane szybszym algorytmem symetrycznym, takim jak AES.</text:span></text:span></text:p>
      <text:p text:style-name="Text_20_body"/>
      <text:p text:style-name="Text_20_body"/>
      <text:h text:style-name="P27" text:outline-level="2"><text:bookmark-start text:name="__RefHeading___Toc1844_2011108690"/><text:span text:style-name="Domyślna_20_czcionka_20_akapitu">3.</text:span><text:span text:style-name="Domyślna_20_czcionka_20_akapitu"><text:span text:style-name="T8">3</text:span></text:span><text:span text:style-name="Domyślna_20_czcionka_20_akapitu">. Podpis cyfrowy</text:span><text:bookmark-end text:name="__RefHeading___Toc1844_2011108690"/></text:h>
      <text:p text:style-name="P7"><text:tab/>Podpis cyfrowy to mechanizm służący do potwierdzania autentyczności i integralności danych. Jest on tworzony przy użyciu klucza prywatnego nadawcy, a weryfikowany za pomocą klucza publicznego.</text:p>
      <text:p text:style-name="P7">Funkcje podpisu cyfrowego:</text:p>
      <text:list text:style-name="L11">
        <text:list-item>
          <text:p text:style-name="P28">potwierdzenie tożsamości nadawcy, </text:p>
        </text:list-item>
        <text:list-item>
          <text:p text:style-name="P28">ochrona przed modyfikacją danych, </text:p>
        </text:list-item>
        <text:list-item>
          <text:p text:style-name="P28">brak możliwości wyparcia się podpisu (niezaprzeczalność). </text:p>
        </text:list-item>
      </text:list>
      <text:p text:style-name="P7"><text:tab/>Podpis cyfrowy często wykorzystuje funkcje skrótu (np. SHA-256) oraz algorytmy asymetryczne (np. RSA).</text:p>
      <text:h text:style-name="P29" text:outline-level="2"><text:bookmark-start text:name="__RefHeading___Toc1846_2011108690"/><text:span text:style-name="Domyślna_20_czcionka_20_akapitu">3.</text:span><text:span text:style-name="Domyślna_20_czcionka_20_akapitu"><text:span text:style-name="T8">4</text:span></text:span><text:span text:style-name="Domyślna_20_czcionka_20_akapitu">. Integralność i poufność danych</text:span><text:bookmark-end text:name="__RefHeading___Toc1846_2011108690"/></text:h>
      <text:p text:style-name="P7"><text:span text:style-name="Domyślna_20_czcionka_20_akapitu"><text:span text:style-name="T9"><text:tab/>I</text:span></text:span>ntegralność danych oznacza pewność, że dane nie zostały zmienione w nieautoryzowany sposób podczas przesyłania lub przechowywania. Do jej zapewnienia stosuje się m.in. funkcje skrótu i podpisy cyfrowe.</text:p>
      <text:p text:style-name="P7"><text:tab/>Poufność danych oznacza ochronę informacji przed nieautoryzowanym dostępem. Zapewnia się ją głównie poprzez szyfrowanie danych (np. AES lub RSA).</text:p>
      <text:p text:style-name="P7"><text:tab/>Obie te właściwości są fundamentem bezpieczeństwa systemów informatycznych i komunikacji cyfrowej.</text:p>
      <text:h text:style-name="P16" text:outline-level="2"><text:span text:style-name="Domyślna_20_czcionka_20_akapitu"/></text:h>
      <text:h text:style-name="P17" text:outline-level="2"><text:bookmark-start text:name="__RefHeading___Toc1838_2011108690"/><text:span text:style-name="Domyślna_20_czcionka_20_akapitu">3.</text:span><text:span text:style-name="Domyślna_20_czcionka_20_akapitu"><text:span text:style-name="T8">5</text:span></text:span><text:span text:style-name="Domyślna_20_czcionka_20_akapitu">.<text:tab/>Algorytm AES</text:span><text:bookmark-end text:name="__RefHeading___Toc1838_2011108690"/></text:h>
      <text:p text:style-name="P7"><text:span text:style-name="Domyślna_20_czcionka_20_akapitu"><text:span text:style-name="T7"><text:tab/></text:span></text:span><text:span text:style-name="Domyślna_20_czcionka_20_akapitu"><text:span text:style-name="Strong_20_Emphasis"><text:span text:style-name="T7">AES (Advanced Encryption Standard)</text:span></text:span></text:span><text:span text:style-name="Domyślna_20_czcionka_20_akapitu"><text:span text:style-name="T7"> </text:span></text:span><text:span text:style-name="Domyślna_20_czcionka_20_akapitu"><text:span text:style-name="T10">należy do</text:span></text:span><text:span text:style-name="Domyślna_20_czcionka_20_akapitu"><text:span text:style-name="T7"> algorytmów szyfrowania symetrycznego. </text:span></text:span><text:span text:style-name="Domyślna_20_czcionka_20_akapitu"><text:span text:style-name="T10">W</text:span></text:span><text:span text:style-name="Domyślna_20_czcionka_20_akapitu"><text:span text:style-name="T7"> 2001 roku został przyjęty przez amerykański instytut </text:span></text:span><text:span text:style-name="Domyślna_20_czcionka_20_akapitu"><text:span text:style-name="Strong_20_Emphasis"><text:span text:style-name="T11">National Institute of Standards and Technology</text:span></text:span></text:span><text:span text:style-name="Domyślna_20_czcionka_20_akapitu"><text:span text:style-name="T7"> jako oficjalny standard szyfrowania.</text:span></text:span></text:p>
      <text:p text:style-name="P7"><text:span text:style-name="T7"><text:tab/>AES jest </text:span><text:span text:style-name="Strong_20_Emphasis"><text:span text:style-name="T7">szyfrem blokowym</text:span></text:span><text:span text:style-name="T7">, co oznacza, że szyfruje dane w blokach o stałej długości </text:span><text:span text:style-name="Strong_20_Emphasis"><text:span text:style-name="T7">128 bitów</text:span></text:span><text:span text:style-name="T7">. Algorytm może wykorzystywać klucze o długości:</text:span></text:p>
      <text:list text:style-name="L12">
        <text:list-item>
          <text:p text:style-name="P30">128 bitów, </text:p>
        </text:list-item>
        <text:list-item>
          <text:p text:style-name="P30">192 bitów, </text:p>
        </text:list-item>
        <text:list-item>
          <text:p text:style-name="P30">256 bitów. </text:p>
        </text:list-item>
      </text:list>
      <text:h text:style-name="Nagłówek_20_3" text:outline-level="3"><text:bookmark-start text:name="__RefHeading___Toc1838_2011108690 Copy 1"/><text:span text:style-name="Domyślna_20_czcionka_20_akapitu">3.</text:span><text:span text:style-name="Domyślna_20_czcionka_20_akapitu"><text:span text:style-name="T8">5</text:span></text:span><text:span text:style-name="Domyślna_20_czcionka_20_akapitu">.</text:span><text:span text:style-name="Domyślna_20_czcionka_20_akapitu"><text:span text:style-name="T12">1.<text:tab/> Proces szyfrowania</text:span></text:span><text:bookmark-end text:name="__RefHeading___Toc1838_2011108690 Copy 1"/></text:h>
      <text:p text:style-name="P7">Proces szyfrowania w AES składa się z kilku etapów:</text:p>
      <text:list text:style-name="L13">
        <text:list-item>
          <text:p text:style-name="P31">AddRoundKey (dodanie klucza rundy): <text:span text:style-name="T13">j</text:span>est to etap wykonywany na początku szyfrowania oraz na końcu każdej rundy. Każdy bajt danych jest łączony z odpowiednim bajtem klucza rundy za pomocą operacji XOR. <text:span text:style-name="T14">Celem tego etapu jest </text:span>wprowadzenie tajnego klucza do procesu szyfrowania.</text:p>
        </text:list-item>
        <text:list-item>
          <text:p text:style-name="P32"><text:span text:style-name="T7">SubBytes (podstawianie bajtów): </text:span><text:span text:style-name="T15">k</text:span><text:span text:style-name="T7">ażdy bajt stanu zostaje zastąpiony innym bajtem zgodnie ze </text:span><text:span text:style-name="T16">talbicą</text:span><text:span text:style-name="T7"> </text:span><text:span text:style-name="Strong_20_Emphasis"><text:span text:style-name="T7">S-Box </text:span></text:span><text:span text:style-name="Strong_20_Emphasis"><text:span text:style-name="T16">(specjalna tablica podstawień, jej zadaniem jest zastąpienie każdego bajtu inną wartością według wcześniej zdefiniowanej reguły)</text:span></text:span><text:span text:style-name="Strong_20_Emphasis"><text:span text:style-name="T7">, </text:span></text:span><text:span text:style-name="Strong_20_Emphasis"><text:span text:style-name="T16">w celu zwiększenia nieliniowości algorytmu i utrudnienia analiz kryptograficznych. Zamiana odbywa się według wcześniej zdefiniowanej tabeli.</text:span></text:span></text:p>
        </text:list-item>
        <text:list-item>
          <text:p text:style-name="P31"><text:span text:style-name="Strong_20_Emphasis"><text:span text:style-name="T7">ShiftRows (przesunięcie wierszy): </text:span></text:span><text:span text:style-name="Strong_20_Emphasis"><text:span text:style-name="T15">w</text:span></text:span><text:span text:style-name="Strong_20_Emphasis"><text:span text:style-name="T7">iersze macierzy stanu są cyklicznie przesuwane w lewo.</text:span></text:span></text:p>
        </text:list-item>
        <text:list-item>
          <text:p text:style-name="P31"><text:span text:style-name="Strong_20_Emphasis"><text:span text:style-name="T7">MixColumns (mieszanie kolumn): </text:span></text:span><text:span text:style-name="Strong_20_Emphasis"><text:span text:style-name="T15">k</text:span></text:span><text:span text:style-name="Strong_20_Emphasis"><text:span text:style-name="T7">ażda kolumna stanu jest przekształcana za pomocą operacji matematycznych wykonywanych w skończonym ciele Galois GF(2⁸). W praktyce bajty w obrębie kolumn są ze sobą mieszane, dzięki czemu zmiana jednego bajtu wpływa na wiele innych bajtów. Krok ten wykonywany jest w celu utrudnienia odtworzenia danych wejściowych.</text:span></text:span></text:p>
        </text:list-item>
        <text:list-item>
          <text:p text:style-name="P31"><text:span text:style-name="Strong_20_Emphasis"><text:span text:style-name="T7">AddRoundKey (ponowne dodanie klucza): </text:span></text:span><text:span text:style-name="Strong_20_Emphasis"><text:span text:style-name="T15">w</text:span></text:span><text:span text:style-name="Strong_20_Emphasis"><text:span text:style-name="T7">ynik poprzednio wykonanych operacji jest ponownie łączony z kluczem rundy za pomocą operacji XOR.</text:span></text:span></text:p>
        </text:list-item>
        <text:list-item>
          <text:p text:style-name="P31"><text:span text:style-name="Strong_20_Emphasis"><text:span text:style-name="T7">W ostatniej rundzie pomijany jest etap MixColumns.</text:span></text:span></text:p>
        </text:list-item>
      </text:list>
      <text:p text:style-name="P7"><text:span text:style-name="Strong_20_Emphasis"/></text:p>
      <text:h text:style-name="P33" text:outline-level="3"><text:bookmark-start text:name="__RefHeading___Toc1838_2011108690 Copy 1 Copy 1"/><text:span text:style-name="Domyślna_20_czcionka_20_akapitu"><text:span text:style-name="T17">3.</text:span></text:span><text:span text:style-name="Domyślna_20_czcionka_20_akapitu"><text:span text:style-name="T18">5</text:span></text:span><text:span text:style-name="Domyślna_20_czcionka_20_akapitu"><text:span text:style-name="T17">.</text:span></text:span><text:span text:style-name="Domyślna_20_czcionka_20_akapitu"><text:span text:style-name="T19">2</text:span></text:span><text:span text:style-name="Domyślna_20_czcionka_20_akapitu"><text:span text:style-name="T17">.<text:tab/> Rozszerzanie klucza (Key Expansion)</text:span></text:span><text:bookmark-end text:name="__RefHeading___Toc1838_2011108690 Copy 1 Copy 1"/></text:h>
      <text:p text:style-name="P7"><text:span text:style-name="Strong_20_Emphasis"><text:tab/></text:span><text:span text:style-name="Strong_20_Emphasis"><text:span text:style-name="T7">Przed rozpoczęciem szyfrowania klucz główny jest przekształcany w zestaw kluczy rundowych. Dla AES-128 z jednego klucza 128-bitowego generowanych jest 11 kluczy:</text:span></text:span></text:p>
      <text:list text:style-name="L14">
        <text:list-item>
          <text:p text:style-name="P34">1 klucz początkowy, </text:p>
        </text:list-item>
        <text:list-item>
          <text:p text:style-name="P34">10 kluczy dla kolejnych rund. </text:p>
        </text:list-item>
      </text:list>
      <text:p text:style-name="P7"><text:tab/>Dzięki temu każda runda wykorzystuje inny fragment klucza.</text:p>
      <text:p text:style-name="P35">W zależności od długości klucza wykonywana jest różna liczba rund szyfrowania:</text:p>
      <text:list text:style-name="L15">
        <text:list-item>
          <text:p text:style-name="P36">AES-128 – 10 rund, </text:p>
        </text:list-item>
        <text:list-item>
          <text:p text:style-name="P36">AES-192 – 12 rund, </text:p>
        </text:list-item>
        <text:list-item>
          <text:p text:style-name="P36">AES-256 – 14 rund. </text:p>
        </text:list-item>
      </text:list>
      <text:h text:style-name="P37" text:outline-level="3" text:is-list-header="true"><text:bookmark-start text:name="__RefHeading___Toc1838_2011108690 Copy 1 Copy 1 Copy 2"/><text:span text:style-name="Domyślna_20_czcionka_20_akapitu"><text:span text:style-name="T17">3.</text:span></text:span><text:span text:style-name="Domyślna_20_czcionka_20_akapitu"><text:span text:style-name="T18">5</text:span></text:span><text:span text:style-name="Domyślna_20_czcionka_20_akapitu"><text:span text:style-name="T17">.</text:span></text:span><text:span text:style-name="Domyślna_20_czcionka_20_akapitu"><text:span text:style-name="T20">3</text:span></text:span><text:span text:style-name="Domyślna_20_czcionka_20_akapitu"><text:span text:style-name="T17">.<text:tab/> Zalety algorytmu AES</text:span></text:span><text:bookmark-end text:name="__RefHeading___Toc1838_2011108690 Copy 1 Copy 1 Copy 2"/></text:h>
      <text:list text:style-name="L16">
        <text:list-item>
          <text:p text:style-name="P38">bardzo wysoki poziom bezpieczeństwa, </text:p>
        </text:list-item>
        <text:list-item>
          <text:p text:style-name="P38">szybkie działanie, </text:p>
        </text:list-item>
        <text:list-item>
          <text:p text:style-name="P38">niskie wymagania obliczeniowe, </text:p>
        </text:list-item>
        <text:list-item>
          <text:p text:style-name="P38">możliwość zastosowania w sprzęcie i oprogramowaniu, </text:p>
        </text:list-item>
        <text:list-item>
          <text:p text:style-name="P38">powszechne zastosowanie na całym świecie. </text:p>
        </text:list-item>
      </text:list>
      <text:h text:style-name="P39" text:outline-level="3" text:is-list-header="true"><text:bookmark-start text:name="__RefHeading___Toc1838_2011108690 Copy 1 Copy 1 Copy 2 Copy 1"/><text:span text:style-name="Domyślna_20_czcionka_20_akapitu"><text:span text:style-name="T17">3.</text:span></text:span><text:span text:style-name="Domyślna_20_czcionka_20_akapitu"><text:span text:style-name="T18">5</text:span></text:span><text:span text:style-name="Domyślna_20_czcionka_20_akapitu"><text:span text:style-name="T17">.</text:span></text:span><text:span text:style-name="Domyślna_20_czcionka_20_akapitu"><text:span text:style-name="T21">4</text:span></text:span><text:span text:style-name="Domyślna_20_czcionka_20_akapitu"><text:span text:style-name="T17">.<text:tab/> </text:span></text:span><text:span text:style-name="Domyślna_20_czcionka_20_akapitu"><text:span text:style-name="T21">Wady</text:span></text:span><text:span text:style-name="Domyślna_20_czcionka_20_akapitu"><text:span text:style-name="T17"> algorytmu AES</text:span></text:span><text:bookmark-end text:name="__RefHeading___Toc1838_2011108690 Copy 1 Copy 1 Copy 2 Copy 1"/></text:h>
      <text:list text:style-name="L17">
        <text:list-item>
          <text:p text:style-name="P40">konieczność bezpiecznej wymiany klucza szyfrującego, </text:p>
        </text:list-item>
        <text:list-item>
          <text:p text:style-name="P40">bezpieczeństwo zależy od odpowiedniego zarządzania kluczami. </text:p>
        </text:list-item>
      </text:list>
      <text:h text:style-name="Nagłówek_20_3" text:outline-level="3"><text:bookmark-start text:name="__RefHeading___Toc1838_2011108690 Copy 1 Copy 1 Copy 2 Copy 1 Copy 1"/><text:span text:style-name="Strong_20_Emphasis">3.</text:span><text:span text:style-name="Strong_20_Emphasis"><text:span text:style-name="T8">5</text:span></text:span><text:span text:style-name="Strong_20_Emphasis">.</text:span><text:span text:style-name="Strong_20_Emphasis"><text:span text:style-name="T8">5</text:span></text:span><text:span text:style-name="Strong_20_Emphasis">.<text:tab/> </text:span><text:span text:style-name="Strong_20_Emphasis"><text:span text:style-name="T22">Zastosowania</text:span></text:span><text:span text:style-name="Strong_20_Emphasis"> algorytmu AES</text:span><text:bookmark-end text:name="__RefHeading___Toc1838_2011108690 Copy 1 Copy 1 Copy 2 Copy 1 Copy 1"/></text:h>
      <text:list text:style-name="L18">
        <text:list-item>
          <text:p text:style-name="P41">szyfrowanie dysków i nośników danych, </text:p>
        </text:list-item>
        <text:list-item>
          <text:p text:style-name="P41">zabezpieczanie sieci Wi-Fi (WPA2, WPA3), </text:p>
        </text:list-item>
        <text:list-item>
          <text:p text:style-name="P41">połączenia VPN, </text:p>
        </text:list-item>
        <text:list-item>
          <text:p text:style-name="P41">bankowość elektroniczna, </text:p>
        </text:list-item>
        <text:list-item>
          <text:p text:style-name="P41">komunikatory internetowe, </text:p>
        </text:list-item>
        <text:list-item>
          <text:p text:style-name="P41">protokół HTTPS/TLS. </text:p>
        </text:list-item>
      </text:list>
      <text:p text:style-name="P7"><text:tab/>Obecnie AES jest uznawany za standard szyfrowania i jest szeroko stosowany przez instytucje rządowe, firmy oraz użytkowników indywidualnych do ochrony poufnych danych.</text:p>
      <text:p text:style-name="P42"/>
      <text:h text:style-name="Nagłówek_20_2" text:outline-level="2"><text:bookmark-start text:name="__RefHeading___Toc1840_2011108690"/><text:soft-page-break/><text:span text:style-name="Domyślna_20_czcionka_20_akapitu">3.</text:span><text:span text:style-name="Domyślna_20_czcionka_20_akapitu"><text:span text:style-name="T8">6</text:span></text:span><text:span text:style-name="Domyślna_20_czcionka_20_akapitu">.<text:tab/>Algorytm RSA</text:span><text:bookmark-end text:name="__RefHeading___Toc1840_2011108690"/></text:h>
      <text:p text:style-name="P7"><text:tab/>RSA jest jednym z najważniejszych algorytmów kryptografii asymetrycznej. Jego bezpieczeństwo opiera się na trudności rozkładu dużych liczb na czynniki pierwsze.</text:p>
      <text:p text:style-name="P7"><text:span text:style-name="T7">RSA wykorzystuje </text:span><text:span text:style-name="Strong_20_Emphasis"><text:span text:style-name="T7">parę kluczy</text:span></text:span><text:span text:style-name="T7">:</text:span></text:p>
      <text:list text:style-name="L19">
        <text:list-item>
          <text:p text:style-name="P43"><text:span text:style-name="Strong_20_Emphasis"><text:span text:style-name="T7">klucz publiczny</text:span></text:span><text:span text:style-name="T7"> – służy do szyfrowania danych lub weryfikacji podpisu cyfrowego, </text:span></text:p>
        </text:list-item>
        <text:list-item>
          <text:p text:style-name="P43"><text:span text:style-name="Strong_20_Emphasis"><text:span text:style-name="T7">klucz prywatny</text:span></text:span><text:span text:style-name="T7"> – służy do odszyfrowywania danych lub tworzenia podpisu cyfrowego.</text:span></text:p>
        </text:list-item>
      </text:list>
      <text:h text:style-name="Nagłówek_20_3" text:outline-level="3"><text:bookmark-start text:name="__RefHeading___Toc3125_2011108690"/><text:span text:style-name="T23">3.</text:span><text:span text:style-name="T8">6</text:span><text:span text:style-name="T23">.1.<text:tab/> </text:span>Zasada działania RSA<text:bookmark-end text:name="__RefHeading___Toc3125_2011108690"/></text:h>
      <text:p text:style-name="P7">Proces działania algorytmu RSA składa się z kilku etapów:</text:p>
      <text:list text:style-name="L20">
        <text:list-item>
          <text:p text:style-name="P44"><text:span text:style-name="Strong_20_Emphasis"><text:span text:style-name="T7">Generowanie kluczy:</text:span></text:span><text:span text:style-name="T7"> </text:span><text:span text:style-name="T24">w</text:span> celu wygenerowania pary kluczy (publicznego i prywatnego) należy wykonać następujące kroki:</text:p>
          <text:list>
            <text:list-item>
              <text:p text:style-name="P44">wybrać dwie duże liczby pierwsze p oraz q,</text:p>
            </text:list-item>
            <text:list-item>
              <text:p text:style-name="P44">obliczyć wartość n=p⋅q,</text:p>
            </text:list-item>
            <text:list-item>
              <text:p text:style-name="P44">obliczyć funkcję Eulera φ(n)=(p−1)(q−1),</text:p>
            </text:list-item>
            <text:list-item>
              <text:p text:style-name="P44">wybrać liczbę e, która jest względnie pierwsza z φ(n),</text:p>
            </text:list-item>
            <text:list-item>
              <text:p text:style-name="P44">wyznaczyć liczbę d, będącą odwrotnością modularną liczby e, tak aby spełniona była zależność: d⋅e≡1(modφ(n))</text:p>
            </text:list-item>
          </text:list>
        </text:list-item>
      </text:list>
      <text:p text:style-name="P7"><text:tab/>Klucz publiczny definiowany jest jako para (n,e), natomiast klucz prywatny jako para (n,d).</text:p>
      <text:list text:continue-numbering="true" text:style-name="L20">
        <text:list-item>
          <text:p text:style-name="P45"><text:span text:style-name="Strong_20_Emphasis"><text:span text:style-name="T7">Szyfrowanie wiadomości:</text:span></text:span><text:span text:style-name="T7"> </text:span><text:span text:style-name="T24">p</text:span>rzed zaszyfrowaniem wiadomość dzielona jest na bloki o wartości liczbowej nie większej niż <text:span text:style-name="T25">n</text:span>. Następnie każdy blok wiadomości <text:span text:style-name="T25">m</text:span> szyfrowany jest przy użyciu klucza publicznego według wzoru: c=me(modn). W wyniku powstaje szyfrogram składający się z kolejnych bloków c.</text:p>
        </text:list-item>
        <text:list-item>
          <text:p text:style-name="P45"><text:span text:style-name="T7">Deszyfrowanie wiadomości: </text:span><text:span text:style-name="T24">o</text:span>dbiorca wykorzystuje swój klucz prywatny do odszyfrowania otrzymanego szyfrogramu. Każdy blok szyfrogramu c przekształcany jest z powrotem w wiadomość jawną m zgodnie ze wzorem: m=cd(modn). Po odszyfrowaniu wszystkich bloków otrzymywana jest oryginalna wiadomość.</text:p>
        </text:list-item>
      </text:list>
      <text:h text:style-name="P46" text:outline-level="3"><text:bookmark-start text:name="__RefHeading___Toc3125_2011108690 Copy 1"/><text:span text:style-name="T23">3.</text:span><text:span text:style-name="T8">6</text:span><text:span text:style-name="T23">.</text:span><text:span text:style-name="T26">2</text:span><text:span text:style-name="T23">.<text:tab/> </text:span>Podpisywanie wiadomości<text:bookmark-end text:name="__RefHeading___Toc3125_2011108690 Copy 1"/></text:h>
      <text:p text:style-name="P47"><text:tab/>Algorytm RSA może być również wykorzystywany do tworzenia podpisów cyfrowych. W tym celu nadawca oblicza skrót wiadomości, a następnie szyfruje go swoim kluczem prywatnym. Tak utworzony podpis jest przesyłany wraz z wiadomością.</text:p>
      <text:p text:style-name="P48">Odbiorca wykorzystuje klucz publiczny nadawcy do odszyfrowania podpisu i porównuje otrzymaną wartość ze skrótem obliczonym z odebranej wiadomości. Jeżeli obie wartości są zgodne, oznacza to, że wiadomość pochodzi od deklarowanego nadawcy i nie została zmodyfikowana podczas transmisji.</text:p>
      <text:p text:style-name="P48"/>
      <text:h text:style-name="P49" text:outline-level="3"><text:bookmark-start text:name="__RefHeading___Toc3125_2011108690 Copy 1 Copy 1"/><text:soft-page-break/><text:span text:style-name="T23">3.</text:span><text:span text:style-name="T8">6</text:span><text:span text:style-name="T23">.</text:span><text:span text:style-name="T26">3</text:span><text:span text:style-name="T23">.<text:tab/> </text:span><text:span text:style-name="T27">Zastosowanie</text:span><text:bookmark-end text:name="__RefHeading___Toc3125_2011108690 Copy 1 Copy 1"/></text:h>
      <text:p text:style-name="P7"><text:tab/>Ze względu na wysoką złożoność obliczeniową RSA rzadko wykorzystuje się go do szyfrowania całych wiadomości. Najczęściej służy on do bezpiecznej wymiany kluczy szyfrujących lub tworzenia podpisów cyfrowych, natomiast właściwe dane szyfrowane są szybszymi algorytmami symetrycznymi, takimi jak AES. </text:p>
      <text:h text:style-name="P49" text:outline-level="3"><text:bookmark-start text:name="__RefHeading___Toc3125_2011108690 Copy 1 Copy 1 Copy 1"/><text:span text:style-name="Domyślna_20_czcionka_20_akapitu"><text:span text:style-name="T23">3.</text:span></text:span><text:span text:style-name="Domyślna_20_czcionka_20_akapitu"><text:span text:style-name="T8">6</text:span></text:span><text:span text:style-name="Domyślna_20_czcionka_20_akapitu"><text:span text:style-name="T23">.</text:span></text:span><text:span text:style-name="Domyślna_20_czcionka_20_akapitu"><text:span text:style-name="T28">4</text:span></text:span><text:span text:style-name="Domyślna_20_czcionka_20_akapitu"><text:span text:style-name="T23">.<text:tab/> </text:span></text:span><text:span text:style-name="Domyślna_20_czcionka_20_akapitu"><text:span text:style-name="T28">Zalety RSA</text:span></text:span><text:bookmark-end text:name="__RefHeading___Toc3125_2011108690 Copy 1 Copy 1 Copy 1"/></text:h>
      <text:list text:style-name="L21">
        <text:list-item>
          <text:p text:style-name="P50"><text:span text:style-name="Domyślna_20_czcionka_20_akapitu">wysoki poziom bezpieczeństwa, </text:span></text:p>
        </text:list-item>
      </text:list>
      <text:list text:style-name="L22">
        <text:list-item>
          <text:p text:style-name="P51">szeroko stosowany i dobrze przebadany,</text:p>
        </text:list-item>
        <text:list-item>
          <text:p text:style-name="P51"><text:span text:style-name="Domyślna_20_czcionka_20_akapitu">umożliwia bezpieczną wymianę kluczy.</text:span></text:p>
        </text:list-item>
      </text:list>
      <text:h text:style-name="P49" text:outline-level="3"><text:bookmark-start text:name="__RefHeading___Toc3125_2011108690 Copy 1 Copy 1 Copy 1 Copy 1"/><text:span text:style-name="Domyślna_20_czcionka_20_akapitu"><text:span text:style-name="T23">3.</text:span></text:span><text:span text:style-name="Domyślna_20_czcionka_20_akapitu"><text:span text:style-name="T8">6</text:span></text:span><text:span text:style-name="Domyślna_20_czcionka_20_akapitu"><text:span text:style-name="T23">.</text:span></text:span><text:span text:style-name="Domyślna_20_czcionka_20_akapitu"><text:span text:style-name="T28">5</text:span></text:span><text:span text:style-name="Domyślna_20_czcionka_20_akapitu"><text:span text:style-name="T23">.<text:tab/> </text:span></text:span><text:span text:style-name="Domyślna_20_czcionka_20_akapitu"><text:span text:style-name="T28">Zalety RSA</text:span></text:span><text:bookmark-end text:name="__RefHeading___Toc3125_2011108690 Copy 1 Copy 1 Copy 1 Copy 1"/></text:h>
      <text:list text:style-name="L23">
        <text:list-item>
          <text:p text:style-name="P52"><text:span text:style-name="Domyślna_20_czcionka_20_akapitu">działa znacznie wolniej niż AES, </text:span></text:p>
        </text:list-item>
        <text:list-item>
          <text:p text:style-name="P52">wymaga dużych kluczy (najczęściej 2048 lub 4096 bitów), </text:p>
        </text:list-item>
        <text:list-item>
          <text:p text:style-name="P52">nie nadaje się do szyfrowania dużych ilości danych.</text:p>
        </text:list-item>
      </text:list>
      <text:h text:style-name="P53" text:outline-level="2"><text:bookmark-start text:name="__RefHeading___Toc1842_2011108690"/><text:span text:style-name="Domyślna_20_czcionka_20_akapitu">3.</text:span><text:span text:style-name="Domyślna_20_czcionka_20_akapitu"><text:span text:style-name="T29">7</text:span></text:span><text:span text:style-name="Domyślna_20_czcionka_20_akapitu">. SHA-256</text:span><text:bookmark-end text:name="__RefHeading___Toc1842_2011108690"/></text:h>
      <text:p text:style-name="P54">SHA-256 (Secure Hash Algorithm 256-bit) <text:span text:style-name="T30">J</text:span>est kryptograficzną funkcją skrótu, której zadaniem jest przekształcenie danych wejściowych o dowolnej długości w skrót (hash) o stałej długośc<text:span text:style-name="T7">i </text:span><text:span text:style-name="Strong_20_Emphasis"><text:span text:style-name="T7">256 bitów</text:span></text:span><text:span text:style-name="T7">. Funkcja ta jest jednokierunkowa, co oznacza, że na podstawie otrzymanego skrótu </text:span>nie można odtworzyć oryginalnych danych wejściowych.</text:p>
      <text:h text:style-name="P55" text:outline-level="3"><text:bookmark-start text:name="__RefHeading___Toc6486_2011108690"/>3.<text:span text:style-name="T29">7</text:span>.1. Proces obliczania skrótu<text:bookmark-end text:name="__RefHeading___Toc6486_2011108690"/></text:h>
      <text:p text:style-name="P7">Proces działania algorytmu SHA-256 składa się z kilku etapów:</text:p>
      <text:list text:style-name="L24">
        <text:list-item>
          <text:p text:style-name="P56"><text:span text:style-name="Strong_20_Emphasis"><text:span text:style-name="T7">Przygotowanie wiadomości:</text:span></text:span><text:span text:style-name="T7"> do wiadomości dodawane są dodatkowe bity </text:span><text:span text:style-name="T31">tak</text:span><text:span text:style-name="T7">, aby jej długość była zgodna z wymaganiami algorytmu. Na końcu dołączana jest również informacja o pierwotnej długości wiadomości. </text:span></text:p>
        </text:list-item>
        <text:list-item>
          <text:p text:style-name="P56"><text:span text:style-name="Strong_20_Emphasis"><text:span text:style-name="T7">Podział na bloki:</text:span></text:span><text:span text:style-name="T7"> przygotowana wiadomość dzielona jest na bloki o długości 512 bitów. </text:span></text:p>
        </text:list-item>
        <text:list-item>
          <text:p text:style-name="P56"><text:span text:style-name="Strong_20_Emphasis"><text:span text:style-name="T7">Inicjalizacja wartości początkowych:</text:span></text:span><text:span text:style-name="T7"> algorytm wykorzystuje osiem stałych 32-bitowych wartości początkowych, które tworzą początkowy stan funkcji skrótu. </text:span></text:p>
        </text:list-item>
        <text:list-item>
          <text:p text:style-name="P56"><text:span text:style-name="Strong_20_Emphasis"><text:span text:style-name="T7">Tworzenie harmonogramu wiadomości:</text:span></text:span><text:span text:style-name="T7"> z każdego 512-bitowego bloku generowanych jest 64 słów o długości 32 bitów wykorzystywanych podczas dalszych obliczeń. </text:span></text:p>
        </text:list-item>
        <text:list-item>
          <text:p text:style-name="P56"><text:span text:style-name="Strong_20_Emphasis"><text:span text:style-name="T7">Przetwarzanie rund:</text:span></text:span><text:span text:style-name="T7"> dla każdego bloku wykonywane są 64 rundy operacji matematycznych i logicznych, takich jak: dodawanie modulo 232, operacje XOR, przesunięcia </text:span><text:span text:style-name="T32">i </text:span><text:span text:style-name="T7">rotacje bitowe. </text:span></text:p>
        </text:list-item>
        <text:list-item>
          <text:p text:style-name="P57"><text:span text:style-name="Strong_20_Emphasis"><text:span text:style-name="T7">Aktualizacja wartości skrótu:</text:span></text:span><text:span text:style-name="T7"> po zakończeniu przetwarzania danego bloku aktualizowane są wartości stanu funkcji skrótu. </text:span></text:p>
        </text:list-item>
        <text:list-item>
          <text:p text:style-name="P57"><text:soft-page-break/><text:span text:style-name="Strong_20_Emphasis"><text:span text:style-name="T7">Wygenerowanie końcowego skrótu:</text:span></text:span><text:span text:style-name="T7"> po przetworzeniu wszystkich bloków danych otrzymywany jest końcowy skrót o długości 256 bitów.</text:span></text:p>
        </text:list-item>
      </text:list>
      <text:h text:style-name="P55" text:outline-level="3"><text:bookmark-start text:name="__RefHeading___Toc6488_2011108690"/>3.<text:span text:style-name="T29">7</text:span>.<text:span text:style-name="T33">2</text:span>. Zalety algorytmu SHA-256<text:bookmark-end text:name="__RefHeading___Toc6488_2011108690"/></text:h>
      <text:list text:style-name="L25">
        <text:list-item>
          <text:p text:style-name="P58">wysoki poziom bezpieczeństwa, </text:p>
        </text:list-item>
        <text:list-item>
          <text:p text:style-name="P58">odporność na znane ataki kryptograficzne, </text:p>
        </text:list-item>
        <text:list-item>
          <text:p text:style-name="P58">możliwość przetwarzania danych o dowolnej długości, </text:p>
        </text:list-item>
        <text:list-item>
          <text:p text:style-name="P58">szerokie zastosowanie w systemach bezpieczeństwa, </text:p>
        </text:list-item>
        <text:list-item>
          <text:p text:style-name="P58">stosunkowo wysoka wydajność działania.</text:p>
        </text:list-item>
      </text:list>
      <text:h text:style-name="P59" text:outline-level="3"><text:bookmark-start text:name="__RefHeading___Toc6490_2011108690"/><text:span text:style-name="Domyślna_20_czcionka_20_akapitu">3.</text:span><text:span text:style-name="Domyślna_20_czcionka_20_akapitu"><text:span text:style-name="T29">7</text:span></text:span><text:span text:style-name="Domyślna_20_czcionka_20_akapitu">.</text:span><text:span text:style-name="Domyślna_20_czcionka_20_akapitu"><text:span text:style-name="T8">3</text:span></text:span><text:span text:style-name="Domyślna_20_czcionka_20_akapitu">. </text:span><text:span text:style-name="Domyślna_20_czcionka_20_akapitu"><text:span text:style-name="T33">Wady</text:span></text:span><text:span text:style-name="Domyślna_20_czcionka_20_akapitu"> algorytmu SHA-256</text:span><text:bookmark-end text:name="__RefHeading___Toc6490_2011108690"/></text:h>
      <text:list text:style-name="L26">
        <text:list-item>
          <text:p text:style-name="P60"><text:span text:style-name="Domyślna_20_czcionka_20_akapitu">większa złożoność obliczeniowa w porównaniu z prostszymi funkcjami skrótu, </text:span></text:p>
        </text:list-item>
        <text:list-item>
          <text:p text:style-name="P60">nie służy do szyfrowania danych, a jedynie do generowania skrótów, </text:p>
        </text:list-item>
        <text:list-item>
          <text:p text:style-name="P60">dla bardzo dużych zbiorów danych może wymagać znacznych zasobów obliczeniowych.</text:p>
        </text:list-item>
      </text:list>
      <text:h text:style-name="P59" text:outline-level="3"><text:bookmark-start text:name="__RefHeading___Toc6492_2011108690"/><text:span text:style-name="Domyślna_20_czcionka_20_akapitu">3.</text:span><text:span text:style-name="Domyślna_20_czcionka_20_akapitu"><text:span text:style-name="T29">7</text:span></text:span><text:span text:style-name="Domyślna_20_czcionka_20_akapitu">.</text:span><text:span text:style-name="Domyślna_20_czcionka_20_akapitu"><text:span text:style-name="T8">4</text:span></text:span><text:span text:style-name="Domyślna_20_czcionka_20_akapitu">. </text:span><text:span text:style-name="Domyślna_20_czcionka_20_akapitu"><text:span text:style-name="T33">Zastosowania</text:span></text:span><text:span text:style-name="Domyślna_20_czcionka_20_akapitu"> </text:span><text:bookmark-end text:name="__RefHeading___Toc6492_2011108690"/></text:h>
      <text:list text:style-name="L27">
        <text:list-item>
          <text:p text:style-name="P61"><text:span text:style-name="Domyślna_20_czcionka_20_akapitu">weryfikacja integralności plików, </text:span></text:p>
        </text:list-item>
        <text:list-item>
          <text:p text:style-name="P61">podpisy cyfrowe, </text:p>
        </text:list-item>
        <text:list-item>
          <text:p text:style-name="P61">certyfikaty cyfrowe, </text:p>
        </text:list-item>
        <text:list-item>
          <text:p text:style-name="P61">protokół HTTPS/TLS, </text:p>
        </text:list-item>
        <text:list-item>
          <text:p text:style-name="P61">przechowywanie haseł (w połączeniu z dodatkowymi mechanizmami zabezpieczeń), </text:p>
        </text:list-item>
        <text:list-item>
          <text:p text:style-name="P61">technologia blockchain i kryptowaluty, </text:p>
        </text:list-item>
        <text:list-item>
          <text:p text:style-name="P61">systemy uwierzytelniania użytkowników.</text:p>
        </text:list-item>
      </text:list>
      <text:p text:style-name="P7"><text:span text:style-name="Domyślna_20_czcionka_20_akapitu">Obecnie SHA-256 jest jedną z najczęściej wykorzystywanych funkcji skrótu</text:span></text:p>
      <text:h text:style-name="P62" text:outline-level="1"><text:bookmark-start text:name="__RefHeading___Toc425_2443504791_Copy_1_"/>4.<text:tab/>Technologie i narzędzia<text:bookmark-end text:name="__RefHeading___Toc425_2443504791_Copy_1_"/></text:h>
      <text:list text:style-name="L28">
        <text:list-item>
          <text:p text:style-name="P63"><text:span text:style-name="Strong_20_Emphasis"><text:span text:style-name="T34">Visual Studio Code - główne środowisko programistyczne wykorzystywane do tworzenia kodu, zarządzania projektem oraz integracji z rozszerzeniami. </text:span></text:span></text:p>
        </text:list-item>
        <text:list-item>
          <text:p text:style-name="P63"><text:span text:style-name="Strong_20_Emphasis"><text:span text:style-name="T35">Python - język programowania wykorzystany do implementacji aplikacji oraz mechanizmów kryptograficznych. Ze względu na prostą składnię oraz szeroki wybór bibliotek.</text:span></text:span></text:p>
        </text:list-item>
        <text:list-item>
          <text:p text:style-name="P63"><text:span text:style-name="Strong_20_Emphasis"><text:span text:style-name="T35">Tkinter - standardowa biblioteka GUI języka Python. Została wykorzystana do przygotowania okien aplikacji oraz elementów umożliwiających interakcję użytkownika z programem.</text:span></text:span></text:p>
        </text:list-item>
        <text:list-item>
          <text:p text:style-name="P63"><text:soft-page-break/><text:span text:style-name="Strong_20_Emphasis"><text:span text:style-name="T35">Biblioteka Cryptography - </text:span></text:span><text:span text:style-name="Strong_20_Emphasis"><text:span text:style-name="T7">biblioteka kryptograficzna języka Python wykorzystana do implementacji algorytmów kryptograficznych oraz operacji związanych z zarządzaniem kluczami. </text:span></text:span><text:span text:style-name="Strong_20_Emphasis"><text:span text:style-name="T35">W</text:span></text:span><text:span text:style-name="Strong_20_Emphasis"><text:span text:style-name="T7">ykorzystano </text:span></text:span><text:span text:style-name="Strong_20_Emphasis"><text:span text:style-name="T35">m.in.</text:span></text:span><text:span text:style-name="Strong_20_Emphasis"><text:span text:style-name="T7"> moduły odpowiedzialne za:</text:span></text:span></text:p>
          <text:list>
            <text:list-item>
              <text:p text:style-name="P64">szyfrowanie i deszyfrowanie danych przy użyciu algorytmu AES, </text:p>
            </text:list-item>
            <text:list-item>
              <text:p text:style-name="P64">generowanie i obsługę kluczy RSA, </text:p>
            </text:list-item>
            <text:list-item>
              <text:p text:style-name="P64">serializację oraz odczyt kluczy publicznych i prywatnych, </text:p>
            </text:list-item>
            <text:list-item>
              <text:p text:style-name="P64">tworzenie i weryfikację podpisów cyfrowych, </text:p>
            </text:list-item>
            <text:list-item>
              <text:p text:style-name="P64">obliczanie funkcji skrótu SHA-256, </text:p>
            </text:list-item>
            <text:list-item>
              <text:p text:style-name="P65">obsługę wyjątków związanych z nieprawidłową weryfikacją podpisów cyfrowych.</text:p>
            </text:list-item>
          </text:list>
        </text:list-item>
        <text:list-item>
          <text:p text:style-name="P63"><text:span text:style-name="Strong_20_Emphasis"><text:span text:style-name="T35">Git - system kontroli wersji wykorzystywany synchronizacji zmian w kodzie pomiędzy twórcami.</text:span></text:span></text:p>
        </text:list-item>
        <text:list-item>
          <text:p text:style-name="P63"><text:span text:style-name="Strong_20_Emphasis"><text:span text:style-name="T35">GitHbub - platforma internetowa służąca do przechowywania repozytorium projektu oraz zarządzania kodem źródłowym. Wykorzystany do archiwizacji projektu i współpracy nad kodem.</text:span></text:span></text:p>
        </text:list-item>
      </text:list>
      <text:h text:style-name="Nagłówek_20_1" text:outline-level="1"><text:bookmark-start text:name="__RefHeading___Toc12126_3356077753"/><text:span text:style-name="Strong_20_Emphasis">5.<text:tab/>Architektura aplikacji</text:span><text:bookmark-end text:name="__RefHeading___Toc12126_3356077753"/></text:h>
      <text:p text:style-name="P7"><text:span text:style-name="Strong_20_Emphasis"><text:tab/></text:span><text:span text:style-name="Strong_20_Emphasis"><text:span text:style-name="T7">Aplikacja została zaprojektowana w architekturze modułowej. Poszczególne funkcjonalności zostały rozdzielone na niezależne moduły odpowiedzialne za szyfrowanie, deszyfrowanie, generowanie kluczy oraz obsługę podpisów cyfrowych. Interfejs użytkownika został zaimplementowany przy użyciu biblioteki Tkinter, natomiast operacje kryptograficzne realizowane są przez bibliotekę Cryptography.</text:span></text:span></text:p>
      <text:h text:style-name="P66" text:outline-level="2"><text:bookmark-start text:name="__RefHeading___Toc1848_2011108690"/>5.1.<text:tab/>Struktura katalogów i plików<text:bookmark-end text:name="__RefHeading___Toc1848_2011108690"/></text:h>
      <text:p text:style-name="P7"><text:span text:style-name="T36"><text:tab/>Jak wspomniano w poprzednim rozdziale (</text:span><text:span text:style-name="T37">5. Architektura aplikacji</text:span><text:span text:style-name="T36">) program został zaprojektowany w sposób modułowy</text:span>. Kod źródłowy został podzielony na katalogi odpowiadające za realizację operacji kryptograficznych, obsługę interfejsu użytkownika oraz przechowywanie dokumentacji projektu. <text:span text:style-name="T36">Schemat przedstawiający strukturę katalogów i plików został przedstawiony na poniższym rysunku (</text:span><text:span text:style-name="T37">Rys. 1</text:span><text:span text:style-name="T36">).</text:span></text:p>
      <text:p text:style-name="P67"><text:span text:style-name="Strong_20_Emphasis"><text:span text:style-name="T38">Rys. </text:span></text:span><text:span text:style-name="Strong_20_Emphasis"><text:span text:style-name="T39">1</text:span></text:span><text:span text:style-name="Strong_20_Emphasis"><text:span text:style-name="T40">.</text:span></text:span><text:span text:style-name="Strong_20_Emphasis"><text:span text:style-name="T38"> </text:span></text:span><text:span text:style-name="Strong_20_Emphasis"><text:span text:style-name="T41">Struktura katalogów i plików aplikacji.</text:span></text:span></text:p>
      <text:p text:style-name="P7"><text:span text:style-name="T7"><text:tab/>Katalog </text:span><text:span text:style-name="Strong_20_Emphasis"><text:span text:style-name="T11">algorithms</text:span></text:span><text:span text:style-name="T7"> zawiera moduły odpowiedzialne za implementację algorytmów kryptograficznych. Znajdują się w nim funkcje realizujące szyfrowanie i deszyfrowanie danych przy użyciu algorytmu AES, operacje związane z podpisem cyfrowym RSA oraz pomocnicze funkcje kryptograficzne.</text:span></text:p>
      <text:p text:style-name="P7"><text:span text:style-name="T7"><text:tab/>Katalog </text:span><text:span text:style-name="Strong_20_Emphasis"><text:span text:style-name="T11">gui</text:span></text:span><text:span text:style-name="T7"> zawiera moduły odpowiedzialne za obsługę graficznego interfejsu użytkownika </text:span><text:span text:style-name="T42">stworzonego przy pomocy </text:span><text:span text:style-name="T43">Tkinter</text:span><text:span text:style-name="T7">. Poszczególne pliki odpowiadają za realizację konkretnych funkcji aplikacji </text:span><text:span text:style-name="T42">(oddzielne ekrany aplikacji)</text:span><text:span text:style-name="T7">, takich jak szyfrowanie, deszyfrowanie, podpisywanie danych oraz generowanie kluczy kryptograficznych.</text:span></text:p>
      <text:p text:style-name="P7"><text:span text:style-name="T7"><text:tab/>Katalog </text:span><text:span text:style-name="Strong_20_Emphasis"><text:span text:style-name="T11">docs</text:span></text:span><text:span text:style-name="T7"> przeznaczony jest do przechowywania dokumentacji projektowej.</text:span></text:p>
      <text:p text:style-name="P7"><text:soft-page-break/><text:span text:style-name="T7"><text:tab/>Głównym plikiem programu jest </text:span><text:span text:style-name="Strong_20_Emphasis"><text:span text:style-name="T11">main.py</text:span></text:span><text:span text:style-name="T7">, który odpowiada za uruchomienie aplikacji oraz inicjalizację interfejsu użytkownika. </text:span><text:span text:style-name="T42">Z poziomu tego pliku</text:span><text:span text:style-name="T7"> następuje </text:span><text:span text:style-name="T42">integracja</text:span><text:span text:style-name="T7"> wszystkich modułów systemu i uruchamiane są poszczególne funkcjonalności aplikacji.</text:span></text:p>
      <text:h text:style-name="Nagłówek_20_2" text:outline-level="2"><text:bookmark-start text:name="__RefHeading___Toc1850_2011108690"/>5.2.<text:tab/>Moduły systemu<text:bookmark-end text:name="__RefHeading___Toc1850_2011108690"/></text:h>
      <text:h text:style-name="Nagłówek_20_3" text:outline-level="3"><text:bookmark-start text:name="__RefHeading___Toc6703_3721631286"/><text:span text:style-name="T44">5.2.1. </text:span>Moduł szyfrowania<text:bookmark-end text:name="__RefHeading___Toc6703_3721631286"/></text:h>
      <text:p text:style-name="P7"><text:tab/>Moduł szyfrowania odpowiada za zabezpieczanie danych przy użyciu <text:span text:style-name="T45">wybranego algorytmu</text:span>. Użytkownik może wskazać plik wejściowy, lokalizację pliku wynikowego oraz wybrać parametry szyfrowania. Moduł <text:span text:style-name="T45">może </text:span>automatycznie <text:span text:style-name="T45">generować</text:span> klucz <text:span text:style-name="T45">szyfrowania</text:span> oraz <text:span text:style-name="T45">inne </text:span>wartoś<text:span text:style-name="T45">ci konieczne</text:span>. Dodatkowo istnieje możliwość zaszyfrowania klucza AES przy użyciu klucza publicznego RSA odbiorcy, co pozwala na wykorzystanie szyfrowania hybrydowego.</text:p>
      <text:p text:style-name="P7"><text:tab/>Interfejs modułu szyfrowania został zaimplementowany w pliku <text:span text:style-name="T25">encrypt.py</text:span> jako klasa <text:span text:style-name="T25">EncryptFrame </text:span><text:span text:style-name="T46">(dziedzicząca z klasy bazowej tk.Frame)</text:span>. <text:span text:style-name="T47">O</text:span>dpowiada <text:span text:style-name="T47">ona za</text:span> utworzenie elementów graficznych takich jak przyciski wyboru <text:span text:style-name="T48">wspomnianych we wcześniejszym akapicie opcji</text:span>. <text:span text:style-name="T49">Struktura ekranu modułu </text:span><text:span text:style-name="T50">Encrypt</text:span><text:span text:style-name="T49"> przedstawiona została na poniższym rysunku (</text:span><text:span text:style-name="T50">Rys. 2.</text:span><text:span text:style-name="T49">)</text:span></text:p>
      <text:p text:style-name="P68"><text:span text:style-name="Strong_20_Emphasis"><text:span text:style-name="T38">Rys. </text:span></text:span><text:span text:style-name="Strong_20_Emphasis"><text:span text:style-name="T51">2</text:span></text:span><text:span text:style-name="Strong_20_Emphasis"><text:span text:style-name="T40">.</text:span></text:span><text:span text:style-name="Strong_20_Emphasis"><text:span text:style-name="T38"> </text:span></text:span><text:span text:style-name="Strong_20_Emphasis"><text:span text:style-name="T51">Okno modułu szyfrowania.</text:span></text:span></text:p>
      <text:p text:style-name="P69"><text:tab/></text:p>
      <text:p text:style-name="P70"><text:span text:style-name="T47"><text:tab/>Jako </text:span><text:span text:style-name="T52">Plik wejściowy</text:span><text:span text:style-name="T47"> użytkownik może wskazać dowolny plik </text:span><text:span text:style-name="T52">.docx</text:span><text:span text:style-name="T47">, </text:span><text:span text:style-name="T52">.txt</text:span><text:span text:style-name="T47"> </text:span><text:span text:style-name="T53">czy</text:span><text:span text:style-name="T47"> </text:span><text:span text:style-name="T52">.mp4</text:span><text:span text:style-name="T47"> – </text:span><text:span text:style-name="T53">a</text:span>plikacja nie nakłada ograniczeń na typ szyfrowanych danych<text:span text:style-name="T47">. Jako </text:span><text:span text:style-name="T52">Plik wyjściowy </text:span>użytkownik wskazuje lokalizację oraz nazwę pliku wynikowego <text:span text:style-name="T53">(bez rozszerzenia)</text:span><text:span text:style-name="T46">. W lokalizacji </text:span><text:span text:style-name="T54">tej</text:span><text:span text:style-name="T46"> zapis</text:span><text:span text:style-name="T54">ywane</text:span><text:span text:style-name="T46"> </text:span><text:span text:style-name="T54">są</text:span><text:span text:style-name="T46"> również pliki klucza szyfrującego, </text:span><text:span text:style-name="T52">Nonce/IV</text:span><text:span text:style-name="T46"> (jeżeli wykorzystywane) </text:span><text:span text:style-name="T54">oraz </text:span>zaszyfrowany klucz AES <text:span text:style-name="T53">(jeżeli wybrano opcję szyfrowania hybrydowego).</text:span></text:p>
      <text:p text:style-name="P7"><text:tab/>Po kliknięciu przycisku <text:span text:style-name="T25">Szyfruj</text:span> uruchamiana jest metoda <text:span text:style-name="T25">encrypt() </text:span><text:span text:style-name="T55">(Listing 1.)</text:span><text:span text:style-name="T25">, </text:span><text:span text:style-name="T52">która w </text:span>pierwszej kolejności sprawdza czy użytkownik wskazał plik wejściowy oraz plik wyjściowy. Jeżeli wybrano opcję szyfrowania klucza <text:span text:style-name="T25">AES</text:span> za pomocą <text:span text:style-name="T25">RSA</text:span>, program sprawdza <text:span text:style-name="T47">również</text:span>, czy został podany plik klucza publicznego <text:span text:style-name="T25">RSA</text:span>.</text:p>
      <text:p text:style-name="P7"><text:tab/><text:span text:style-name="T47">W przypadku wykrycia błędów (</text:span><text:span text:style-name="T53">np.: </text:span><text:span text:style-name="T47">brak plików, niepowodzenie szyfrowania) </text:span><text:span text:style-name="T53">w polu tekstowym</text:span><text:span text:style-name="T47"> (</text:span><text:span text:style-name="T52">status</text:span><text:span text:style-name="T47">) obok przycisku szyfruj wyświetlany jest stosowny komunikat. Pole to służy do komunikacji statusu szyfrowania do użytkownika i jako prosty </text:span><text:span text:style-name="T52">„debugger”</text:span><text:span text:style-name="T47"> informujący o wystepujących błędach.</text:span></text:p>
      <text:p text:style-name="P7"><text:tab/>Właściwe szyfrowanie realizowane jest przez funkcję <text:span text:style-name="T25">encrypt_dispatcher() </text:span><text:span text:style-name="T56">(Listing </text:span><text:span text:style-name="T57">2</text:span><text:span text:style-name="T56">.)</text:span> znajdującą się w module <text:span text:style-name="T25">crypto_lib.py</text:span>. Funkcja ta sprawdza wybrany algorytm, a następnie generuje losowy klucz <text:span text:style-name="T25">AES</text:span> o długości 32 bajtów <text:span text:style-name="T53">(</text:span><text:span text:style-name="T58">AES-256</text:span><text:span text:style-name="T53">)</text:span> oraz wartość nonce o długości 12 bajtów. Dane z pliku wejściowego są odczytywane <text:span text:style-name="T47">są</text:span> binarn<text:span text:style-name="T47">ie</text:span> i szyfrowane przy użyciu klas <text:span text:style-name="T25">AES</text:span> z biblioteki <text:span text:style-name="T25">cryptography</text:span>.</text:p>
      <text:p text:style-name="P71"><text:tab/>Wynikiem działania modułu jest zestaw plików <text:span text:style-name="T59">zapisanych w postacji binarnej:</text:span></text:p>
      <text:list text:style-name="L29">
        <text:list-item>
          <text:p text:style-name="P72">plik główny (nazwa wskazana przez użytkownika) – zawierający zaszyfrowane dane,</text:p>
        </text:list-item>
        <text:list-item>
          <text:p text:style-name="P72">plik <text:span text:style-name="T25">.nonce</text:span> – zawierający wartości <text:span text:style-name="T25">Nonce/IV</text:span> wykorzystywane przez algorytm szyfrowania,</text:p>
        </text:list-item>
        <text:list-item>
          <text:p text:style-name="P73"><text:span text:style-name="T59">plik </text:span><text:span text:style-name="T60">.key</text:span><text:span text:style-name="T59"> - </text:span>zawierający klucz AES,</text:p>
        </text:list-item>
        <text:list-item>
          <text:p text:style-name="P73"><text:span text:style-name="T59">plik </text:span><text:span text:style-name="T25">.key.enc</text:span> – <text:span text:style-name="T59">alternatywa dla pliku </text:span><text:span text:style-name="T60">.key</text:span><text:span text:style-name="T59">, tworzony jest w przypadku wybrania opcji szyfrowania hybrydowego.</text:span></text:p>
        </text:list-item>
      </text:list>
      <text:p text:style-name="P74"><text:span text:style-name="Domyślna_20_czcionka_20_akapitu"><text:span text:style-name="T61">Listing 1. </text:span></text:span><text:span text:style-name="Domyślna_20_czcionka_20_akapitu"><text:span text:style-name="T62">Kod metody </text:span></text:span><text:span text:style-name="Domyślna_20_czcionka_20_akapitu"><text:span text:style-name="T62">encrypt() modułu szyfrującego</text:span></text:span><text:span text:style-name="Domyślna_20_czcionka_20_akapitu"><text:span text:style-name="T61">.</text:span></text:span></text:p>
      <table:table table:name="Table3" table:style-name="Table3">
        <table:table-column table:style-name="Table3.A"/>
        <table:table-row>
          <table:table-cell table:style-name="Table3.A1" office:value-type="string">
            <text:p text:style-name="P75"><text:span text:style-name="T63"><text:s text:c="4"/></text:span><text:span text:style-name="T64">def</text:span><text:span text:style-name="T63"> </text:span><text:span text:style-name="T65">encrypt</text:span><text:span text:style-name="T63">(</text:span><text:span text:style-name="T66">self</text:span><text:span text:style-name="T63">):</text:span></text:p>
            <text:p text:style-name="P76"/>
            <text:p text:style-name="P75"><text:span text:style-name="T63"><text:s text:c="8"/></text:span><text:span text:style-name="T64">if</text:span><text:span text:style-name="T63"> </text:span><text:span text:style-name="T67">not</text:span><text:span text:style-name="T63"> </text:span><text:span text:style-name="T66">self</text:span><text:span text:style-name="T68">.</text:span><text:span text:style-name="T63">input_file:</text:span></text:p>
            <text:p text:style-name="P75"><text:span text:style-name="T63"><text:s text:c="12"/>messagebox</text:span><text:span text:style-name="T68">.</text:span><text:span text:style-name="T63">showerror(</text:span><text:span text:style-name="T69"> </text:span><text:span text:style-name="T70">"Błąd"</text:span><text:span text:style-name="T63">,</text:span><text:span text:style-name="T70">"Nie wybrano pliku wejściowego"</text:span><text:span text:style-name="T63">)</text:span></text:p>
            <text:p text:style-name="P75"><text:span text:style-name="T63"><text:s text:c="12"/></text:span><text:span text:style-name="T64">return</text:span></text:p>
            <text:p text:style-name="P76"/>
            <text:p text:style-name="P75"><text:span text:style-name="T63"><text:s text:c="8"/></text:span><text:span text:style-name="T64">if</text:span><text:span text:style-name="T63"> </text:span><text:span text:style-name="T67">not</text:span><text:span text:style-name="T63"> </text:span><text:span text:style-name="T66">self</text:span><text:span text:style-name="T68">.</text:span><text:span text:style-name="T63">output_file:</text:span></text:p>
            <text:p text:style-name="P75"><text:span text:style-name="T63"><text:s text:c="12"/>messagebox</text:span><text:span text:style-name="T68">.</text:span><text:span text:style-name="T63">showerror(</text:span><text:span text:style-name="T70">"Błąd"</text:span><text:span text:style-name="T63">, </text:span><text:span text:style-name="T70">"Nie wybrano pliku wyjściowego"</text:span><text:span text:style-name="T63">)</text:span></text:p>
            <text:p text:style-name="P75"><text:span text:style-name="T63"><text:s text:c="12"/></text:span><text:span text:style-name="T64">return</text:span></text:p>
            <text:p text:style-name="P76"/>
            <text:p text:style-name="P75"><text:span text:style-name="T63"><text:s text:c="8"/>rsa_enabled </text:span><text:span text:style-name="T68">=</text:span><text:span text:style-name="T63"> </text:span><text:span text:style-name="T66">self</text:span><text:span text:style-name="T68">.</text:span><text:span text:style-name="T63">rsa_encrypt_var</text:span><text:span text:style-name="T68">.</text:span><text:span text:style-name="T63">get()</text:span></text:p>
            <text:p text:style-name="P76"/>
            <text:p text:style-name="P75"><text:span text:style-name="T63"><text:s text:c="8"/></text:span><text:span text:style-name="T64">if</text:span><text:span text:style-name="T63"> rsa_enabled </text:span><text:span text:style-name="T67">and</text:span><text:span text:style-name="T63"> </text:span><text:span text:style-name="T67">not</text:span><text:span text:style-name="T63"> </text:span><text:span text:style-name="T66">self</text:span><text:span text:style-name="T68">.</text:span><text:span text:style-name="T63">rsa_key_file_public:</text:span></text:p>
            <text:p text:style-name="P75"><text:span text:style-name="T63"><text:s text:c="12"/>messagebox</text:span><text:span text:style-name="T68">.</text:span><text:span text:style-name="T63">showerror(</text:span><text:span text:style-name="T70">"Błąd"</text:span><text:span text:style-name="T63">, </text:span><text:span text:style-name="T70">"Nie wybrano klucza publicznego RSA"</text:span><text:span text:style-name="T63">)</text:span></text:p>
            <text:p text:style-name="P75"><text:span text:style-name="T63"><text:s text:c="12"/></text:span><text:span text:style-name="T64">return</text:span></text:p>
            <text:p text:style-name="P76"/>
            <text:p text:style-name="P75"><text:span text:style-name="T63"><text:s text:c="8"/></text:span><text:span text:style-name="T64">try</text:span><text:span text:style-name="T63">:</text:span></text:p>
            <text:p text:style-name="P75"><text:span text:style-name="T63"><text:s text:c="12"/></text:span><text:span text:style-name="T66">self</text:span><text:span text:style-name="T68">.</text:span><text:span text:style-name="T63">busy_status_label</text:span><text:span text:style-name="T68">.</text:span><text:span text:style-name="T63">config(text</text:span><text:span text:style-name="T68">=</text:span><text:span text:style-name="T70">"Szyfrowanie..."</text:span><text:span text:style-name="T63">)</text:span></text:p>
            <text:p text:style-name="P76"/>
            <text:p text:style-name="P75"><text:span text:style-name="T63"><text:s text:c="12"/>selected_algorithm </text:span><text:span text:style-name="T68">=</text:span><text:span text:style-name="T63"> </text:span><text:span text:style-name="T66">self</text:span><text:span text:style-name="T68">.</text:span><text:span text:style-name="T63">selected_aes_mode</text:span><text:span text:style-name="T68">.</text:span><text:span text:style-name="T63">get()</text:span></text:p>
            <text:p text:style-name="P76"/>
            <text:p text:style-name="P75"><text:span text:style-name="T63"><text:s text:c="12"/>encrypt_dispatcher(</text:span></text:p>
            <text:p text:style-name="P75"><text:span text:style-name="T63"><text:s text:c="16"/>algorithm</text:span><text:span text:style-name="T68">=</text:span><text:span text:style-name="T63">selected_algorithm,</text:span></text:p>
            <text:p text:style-name="P75"><text:soft-page-break/><text:span text:style-name="T63"><text:s text:c="16"/>input_file</text:span><text:span text:style-name="T68">=</text:span><text:span text:style-name="T66">self</text:span><text:span text:style-name="T68">.</text:span><text:span text:style-name="T63">input_file,</text:span></text:p>
            <text:p text:style-name="P75"><text:span text:style-name="T63"><text:s text:c="16"/>output_file</text:span><text:span text:style-name="T68">=</text:span><text:span text:style-name="T66">self</text:span><text:span text:style-name="T68">.</text:span><text:span text:style-name="T63">output_file,</text:span></text:p>
            <text:p text:style-name="P75"><text:span text:style-name="T63"><text:s text:c="16"/>rsa_enabled</text:span><text:span text:style-name="T68">=</text:span><text:span text:style-name="T63">rsa_enabled,</text:span></text:p>
            <text:p text:style-name="P75"><text:span text:style-name="T63"><text:s text:c="16"/>rsa_public_key_file</text:span><text:span text:style-name="T68">=</text:span><text:span text:style-name="T66">self</text:span><text:span text:style-name="T68">.</text:span><text:span text:style-name="T63">rsa_key_file_public</text:span></text:p>
            <text:p text:style-name="P75"><text:span text:style-name="T63"><text:s text:c="12"/>)</text:span></text:p>
            <text:p text:style-name="P76"/>
            <text:p text:style-name="P75"><text:span text:style-name="T63"><text:s text:c="12"/></text:span><text:span text:style-name="T66">self</text:span><text:span text:style-name="T68">.</text:span><text:span text:style-name="T63">busy_status_label</text:span><text:span text:style-name="T68">.</text:span><text:span text:style-name="T63">config(text</text:span><text:span text:style-name="T68">=</text:span><text:span text:style-name="T70">"Szyfrowanie zakończone"</text:span><text:span text:style-name="T63">)</text:span></text:p>
            <text:p text:style-name="P76"/>
            <text:p text:style-name="P75"><text:span text:style-name="T63"><text:s text:c="12"/>messagebox</text:span><text:span text:style-name="T68">.</text:span><text:span text:style-name="T63">showinfo(</text:span><text:span text:style-name="T70">"Sukces"</text:span><text:span text:style-name="T63">, </text:span><text:span text:style-name="T70">"Plik został zaszyfrowany"</text:span><text:span text:style-name="T63">)</text:span></text:p>
            <text:p text:style-name="P76"/>
            <text:p text:style-name="P75"><text:span text:style-name="T63"><text:s text:c="8"/></text:span><text:span text:style-name="T64">except</text:span><text:span text:style-name="T63"> </text:span><text:span text:style-name="T71">Exception</text:span><text:span text:style-name="T63"> </text:span><text:span text:style-name="T64">as</text:span><text:span text:style-name="T63"> e:</text:span></text:p>
            <text:p text:style-name="P75"><text:span text:style-name="T63"><text:s text:c="12"/></text:span><text:span text:style-name="T66">self</text:span><text:span text:style-name="T68">.</text:span><text:span text:style-name="T63">busy_status_label</text:span><text:span text:style-name="T68">.</text:span><text:span text:style-name="T63">config(text</text:span><text:span text:style-name="T68">=</text:span><text:span text:style-name="T70">"Błąd"</text:span><text:span text:style-name="T63">)</text:span></text:p>
            <text:p text:style-name="P76"/>
            <text:p text:style-name="P75"><text:span text:style-name="T63"><text:s text:c="12"/>messagebox</text:span><text:span text:style-name="T68">.</text:span><text:span text:style-name="T63">showerror(</text:span><text:span text:style-name="T70">"Błąd szyfrowania"</text:span><text:span text:style-name="T63">,</text:span><text:span text:style-name="T66">str</text:span><text:span text:style-name="T63">(e))</text:span></text:p>
          </table:table-cell>
        </table:table-row>
      </table:table>
      <text:p text:style-name="P77"><text:span text:style-name="Domyślna_20_czcionka_20_akapitu"><text:span text:style-name="T72"/></text:span></text:p>
      <text:p text:style-name="P77"><text:span text:style-name="Domyślna_20_czcionka_20_akapitu"><text:span text:style-name="T73">Listing </text:span></text:span><text:span text:style-name="Domyślna_20_czcionka_20_akapitu"><text:span text:style-name="T74">2</text:span></text:span><text:span text:style-name="Domyślna_20_czcionka_20_akapitu"><text:span text:style-name="T73">. </text:span></text:span><text:span text:style-name="Domyślna_20_czcionka_20_akapitu"><text:span text:style-name="T62">Kod metody encrypt_dispatcher</text:span></text:span><text:span text:style-name="Domyślna_20_czcionka_20_akapitu"><text:span text:style-name="T62">().</text:span></text:span></text:p>
      <table:table table:name="Table4" table:style-name="Table4">
        <table:table-column table:style-name="Table4.A"/>
        <table:table-row>
          <table:table-cell table:style-name="Table4.A1" office:value-type="string">
            <text:p text:style-name="P78"><text:span text:style-name="T64">def</text:span><text:span text:style-name="T63"> </text:span><text:span text:style-name="T65">encrypt_dispatcher</text:span><text:span text:style-name="T63">(</text:span><text:span text:style-name="T69"></text:span><text:span text:style-name="T63">algorithm,</text:span><text:span text:style-name="T69"></text:span><text:span text:style-name="T63">input_file,</text:span><text:span text:style-name="T69"></text:span><text:span text:style-name="T63"> output_file, rsa_enabled</text:span><text:span text:style-name="T68">=</text:span><text:span text:style-name="T64">False</text:span><text:span text:style-name="T63">,</text:span><text:span text:style-name="T69"></text:span><text:span text:style-name="T75">r</text:span><text:span text:style-name="T63">sa_public_key_file</text:span><text:span text:style-name="T68">=</text:span><text:span text:style-name="T64">None</text:span><text:span text:style-name="T69"></text:span><text:span text:style-name="T63">)</text:span><text:span text:style-name="T69">:</text:span></text:p>
            <text:p text:style-name="P78"><text:span text:style-name="T63"><text:s/></text:span><text:span text:style-name="T64"><text:s text:c="2"/></text:span><text:span text:style-name="T63"><text:s/>if algorit</text:span><text:span text:style-name="T68">hm</text:span><text:span text:style-name="T63"> </text:span><text:span text:style-name="T70">== "AES-256-G</text:span><text:span text:style-name="T63">C</text:span><text:span text:style-name="T69">M"</text:span><text:span text:style-name="T63">:</text:span></text:p>
            <text:p text:style-name="P78"><text:span text:style-name="T63"><text:s text:c="8"/>aes</text:span><text:span text:style-name="T68">_</text:span><text:span text:style-name="T63">key = generate_aes_</text:span><text:span text:style-name="T69">ke</text:span><text:span text:style-name="T63">y()</text:span></text:p>
            <text:p text:style-name="P78"><text:span text:style-name="T63"><text:s text:c="7"/></text:span><text:span text:style-name="T68"><text:s/></text:span><text:span text:style-name="T63">nonce = generate_</text:span><text:span text:style-name="T69">no</text:span><text:span text:style-name="T63">nce()</text:span></text:p>
            <text:p text:style-name="P78"><text:span text:style-name="T63"><text:s text:c="8"/>encrypt_file</text:span><text:span text:style-name="T69">_</text:span><text:span text:style-name="T63">aes_gcm(</text:span><text:span text:style-name="T68">i</text:span><text:span text:style-name="T63">nput_file=i</text:span><text:span text:style-name="T69">n</text:span><text:span text:style-name="T63">put_file, </text:span><text:span text:style-name="T68">o</text:span><text:span text:style-name="T63">utput_file=o</text:span><text:span text:style-name="T69">u</text:span><text:span text:style-name="T63">tput_file, aes_</text:span><text:span text:style-name="T69">k</text:span><text:span text:style-name="T63">ey=aes_key, nonce=no</text:span><text:span text:style-name="T69">nc</text:span><text:span text:style-name="T63">e)</text:span></text:p>
            <text:p text:style-name="P78"><text:span text:style-name="T63"><text:s text:c="2"/></text:span><text:span text:style-name="T68"><text:s/></text:span><text:span text:style-name="T63"><text:s text:c="5"/>base_na</text:span><text:span text:style-name="T69">me</text:span><text:span text:style-name="T63"> = output_file</text:span></text:p>
            <text:p text:style-name="P79"><text:span text:style-name="T76"/></text:p>
            <text:p text:style-name="P78"><text:span text:style-name="T63"><text:s text:c="8"/>key</text:span><text:span text:style-name="T68">_</text:span><text:span text:style-name="T63">f</text:span><text:span text:style-name="T70">ile = </text:span><text:span text:style-name="T69">b</text:span><text:span text:style-name="T63">ase_name + ".key"</text:span></text:p>
            <text:p text:style-name="P78"><text:span text:style-name="T68"><text:s/></text:span><text:span text:style-name="T63"><text:s text:c="7"/>nonc</text:span><text:span text:style-name="T68">e</text:span><text:span text:style-name="T63">_</text:span><text:span text:style-name="T70">file = b</text:span><text:span text:style-name="T69">as</text:span><text:span text:style-name="T63">e_name +</text:span><text:span text:style-name="T64"> "</text:span><text:span text:style-name="T63">.nonce"</text:span></text:p>
            <text:p text:style-name="P79"></text:p>
            <text:p text:style-name="P78"><text:span text:style-name="T63"><text:s text:c="2"/></text:span><text:span text:style-name="T69"><text:s text:c="2"/></text:span><text:span text:style-name="T63"><text:s text:c="4"/>if rsa_enabled:</text:span></text:p>
            <text:p text:style-name="P80"><text:span text:style-name="T63"><text:s text:c="3"/></text:span><text:span text:style-name="T68"><text:s/></text:span><text:span text:style-name="T63"><text:s text:c="8"/>encrypted_key = en</text:span><text:span text:style-name="T69">c</text:span><text:span text:style-name="T63">rypt_aes_key_with_rsa(aes_key, rsa_publ</text:span><text:span text:style-name="T69">ic</text:span><text:span text:style-name="T63">_key_file)</text:span></text:p>
            <text:p text:style-name="P78"><text:span text:style-name="T63"><text:s/></text:span><text:span text:style-name="T69"><text:s/></text:span><text:span text:style-name="T63"><text:s text:c="10"/>save_binary_fil</text:span><text:span text:style-name="T68">e</text:span><text:span text:style-name="T77">(</text:span><text:span text:style-name="T63">key_file + ".enc", encrypt</text:span><text:span text:style-name="T64">ed_k</text:span><text:span text:style-name="T63">e</text:span><text:span text:style-name="T69">y</text:span><text:span text:style-name="T63">)</text:span></text:p>
            <text:p text:style-name="P78"><text:span text:style-name="T63"><text:s text:c="8"/>els</text:span><text:span text:style-name="T69">e</text:span><text:span text:style-name="T63">:</text:span></text:p>
            <text:p text:style-name="P78"><text:span text:style-name="T63"><text:s text:c="12"/>save_bin</text:span><text:span text:style-name="T69">a</text:span><text:span text:style-name="T63">ry_file(key_file, aes_key)</text:span></text:p>
            <text:p text:style-name="P79"></text:p>
            <text:p text:style-name="P78"><text:span text:style-name="T63"><text:s text:c="8"/>s</text:span><text:span text:style-name="T69">a</text:span><text:span text:style-name="T63">ve_binary_file(nonc</text:span><text:span text:style-name="T64">e_fi</text:span><text:span text:style-name="T63">l</text:span><text:span text:style-name="T69">e</text:span><text:span text:style-name="T63">, nonce</text:span><text:span text:style-name="T78">)</text:span></text:p>
            <text:p text:style-name="P78"><text:span text:style-name="T63"><text:s text:c="8"/></text:span><text:span text:style-name="T69">)</text:span><text:span text:style-name="T63"></text:span></text:p>
            <text:p text:style-name="P78"><text:span text:style-name="T63"><text:s text:c="4"/>else</text:span><text:span text:style-name="T70">:</text:span></text:p>
            <text:p text:style-name="P78"><text:span text:style-name="T70"><text:s text:c="8"/>raise Encryption</text:span><text:span text:style-name="T79">E</text:span><text:span text:style-name="T63">rror(f"</text:span>Nieobsługiwany algorytm: {algorithm}")</text:p>
          </table:table-cell>
        </table:table-row>
      </table:table>
      <text:p text:style-name="Text_20_body"/>
      <text:p text:style-name="P81"><text:span text:style-name="Domyślna_20_czcionka_20_akapitu"><text:span text:style-name="T72"/></text:span></text:p>
      <text:p text:style-name="P81"><text:span text:style-name="Domyślna_20_czcionka_20_akapitu"><text:span text:style-name="T73">Listing </text:span></text:span><text:span text:style-name="Domyślna_20_czcionka_20_akapitu"><text:span text:style-name="T80">3</text:span></text:span><text:span text:style-name="Domyślna_20_czcionka_20_akapitu"><text:span text:style-name="T73">. </text:span></text:span><text:span text:style-name="Domyślna_20_czcionka_20_akapitu"><text:span text:style-name="T81">Metody wykorzystywane przez</text:span></text:span><text:span text:style-name="Domyślna_20_czcionka_20_akapitu"><text:span text:style-name="T62"> encrypt_dispatcher</text:span></text:span><text:span text:style-name="Domyślna_20_czcionka_20_akapitu"><text:span text:style-name="T62">().</text:span></text:span></text:p>
      <table:table table:name="Table5" table:style-name="Table5">
        <table:table-column table:style-name="Table5.A"/>
        <table:table-row>
          <table:table-cell table:style-name="Table5.A1" office:value-type="string">
            <text:p text:style-name="P82"><text:span text:style-name="T64">def</text:span><text:span text:style-name="T63"> </text:span><text:span text:style-name="T65">generate_aes_key</text:span><text:span text:style-name="T63">():</text:span><text:span text:style-name="T69"></text:span></text:p>
            <text:p text:style-name="P83"><text:span text:style-name="T63"><text:s text:c="2"/></text:span><text:span text:style-name="T64"><text:s text:c="2"/>retu</text:span><text:span text:style-name="T63">rn </text:span><text:span text:style-name="T68">o</text:span><text:span text:style-name="T63">s.urando</text:span><text:span text:style-name="T68">m(</text:span><text:span text:style-name="T63">3</text:span><text:span text:style-name="T69">2)</text:span></text:p>
            <text:p text:style-name="P84"></text:p>
            <text:p text:style-name="P83"><text:span text:style-name="T65">def generate_</text:span><text:span text:style-name="T63">non</text:span><text:span text:style-name="T69">c</text:span><text:span text:style-name="T63">e():</text:span><text:span text:style-name="T82"></text:span></text:p>
            <text:p text:style-name="P83"><text:span text:style-name="T64"><text:s text:c="3"/></text:span><text:span text:style-name="T63"><text:s/>re</text:span><text:span text:style-name="T68">t</text:span><text:span text:style-name="T63">urn os.u</text:span><text:span text:style-name="T68">ra</text:span><text:span text:style-name="T63">n</text:span><text:span text:style-name="T69">dom</text:span><text:span text:style-name="T64">(12</text:span><text:span text:style-name="T63">)</text:span><text:span text:style-name="T65"></text:span></text:p>
            <text:p text:style-name="P85"></text:p>
            <text:p text:style-name="P83"><text:span text:style-name="T65">def save_b</text:span><text:span text:style-name="T63">inary_file(pa</text:span><text:span text:style-name="T69">t</text:span><text:span text:style-name="T63">h, d</text:span><text:span text:style-name="T64">ata)</text:span><text:span text:style-name="T63">:</text:span><text:span text:style-name="T66"></text:span></text:p>
            <text:p text:style-name="P83"><text:span text:style-name="T66"><text:s text:c="2"/></text:span><text:span text:style-name="T63"><text:s text:c="2"/>with </text:span><text:span text:style-name="T70">open</text:span><text:span text:style-name="T63">(p</text:span><text:span text:style-name="T64">at</text:span><text:span text:style-name="T63">h, </text:span><text:span text:style-name="T69">"</text:span><text:span text:style-name="T63">wb") as f</text:span><text:span text:style-name="T68">:</text:span><text:span text:style-name="T63"></text:span></text:p>
            <text:p text:style-name="P83"><text:span text:style-name="T63"><text:s text:c="8"/>f</text:span><text:span text:style-name="T69">.wr</text:span><text:span text:style-name="T64">ite</text:span><text:span text:style-name="T63">(</text:span><text:span text:style-name="T65">data)</text:span></text:p>
            <text:p text:style-name="P85"></text:p>
            <text:p text:style-name="P83"><text:span text:style-name="T65">def encry</text:span><text:span text:style-name="T63">p</text:span><text:span text:style-name="T69">t</text:span><text:span text:style-name="T63">_file_aes_gcm(input_file, output_f</text:span><text:span text:style-name="T69">i</text:span><text:span text:style-name="T63">le, </text:span><text:span text:style-name="T69">a</text:span><text:span text:style-name="T63">es</text:span><text:span text:style-name="T69">_</text:span><text:span text:style-name="T63">key,</text:span><text:span text:style-name="T69"> </text:span><text:span text:style-name="T63">nonce)</text:span><text:span text:style-name="T64">:</text:span></text:p>
            <text:p text:style-name="P83"><text:span text:style-name="T64"><text:s/></text:span><text:span text:style-name="T63"><text:s/></text:span><text:span text:style-name="T66"><text:s text:c="2"/>tr</text:span><text:span text:style-name="T63">y:</text:span></text:p>
            <text:p text:style-name="P86"> <text:s text:c="6"/><text:span text:style-name="T70"><text:s/>wit</text:span>h <text:span text:style-name="T64">op</text:span>en(<text:span text:style-name="T69">i</text:span>nput_file, "rb") as f:<text:span text:style-name="T68"></text:span></text:p>
            <text:p text:style-name="P83"><text:span text:style-name="T63"><text:s/></text:span><text:span text:style-name="T68"><text:s/></text:span><text:span text:style-name="T63"><text:s text:c="6"/></text:span><text:span text:style-name="T69"><text:s text:c="2"/></text:span><text:span text:style-name="T63"><text:s text:c="2"/>plaintext = f</text:span><text:span text:style-name="T68">.</text:span><text:span text:style-name="T63">read()</text:span></text:p>
            <text:p text:style-name="P86"></text:p>
            <text:p text:style-name="P83"><text:span text:style-name="T63"><text:s text:c="6"/></text:span><text:span text:style-name="T69"><text:s text:c="2"/></text:span><text:span text:style-name="T63">aesgcm = AESGCM(aes</text:span><text:span text:style-name="T68">_</text:span><text:span text:style-name="T63">key)</text:span></text:p>
            <text:p text:style-name="P86"></text:p>
            <text:p text:style-name="P83"><text:span text:style-name="T63"><text:s text:c="8"/></text:span><text:span text:style-name="T69">c</text:span><text:span text:style-name="T63">iphertext = aesgcm</text:span><text:span text:style-name="T69">.</text:span><text:span text:style-name="T63">encrypt(</text:span><text:span text:style-name="T69">n</text:span><text:span text:style-name="T63">once, plainte</text:span><text:span text:style-name="T69">xt</text:span><text:span text:style-name="T63">,</text:span><text:span text:style-name="T66"> No</text:span><text:span text:style-name="T63">ne)</text:span></text:p>
            <text:p text:style-name="P87"></text:p>
            <text:p text:style-name="P83"><text:span text:style-name="T70"><text:s/></text:span><text:span text:style-name="T63"><text:s text:c="2"/></text:span><text:span text:style-name="T64"><text:s text:c="2"/></text:span><text:span text:style-name="T63"><text:s text:c="3"/></text:span><text:span text:style-name="T69">w</text:span><text:span text:style-name="T63">ith open(outp</text:span><text:span text:style-name="T68">u</text:span><text:span text:style-name="T63">t_file, "wb") as </text:span><text:span text:style-name="T69">f:</text:span><text:span text:style-name="T63"></text:span></text:p>
            <text:p text:style-name="P83"><text:span text:style-name="T63"><text:s text:c="2"/></text:span><text:span text:style-name="T64"><text:s text:c="6"/></text:span><text:span text:style-name="T63"><text:s/></text:span><text:span text:style-name="T71"><text:s text:c="3"/>f.writ</text:span><text:span text:style-name="T63">e</text:span><text:span text:style-name="T64">(c</text:span><text:span text:style-name="T63">iph</text:span><text:span text:style-name="T69">e</text:span><text:span text:style-name="T63">rtext)</text:span></text:p>
            <text:p text:style-name="P84"></text:p>
            <text:p text:style-name="P83"><text:span text:style-name="T64"><text:s text:c="3"/></text:span><text:span text:style-name="T63"><text:s/>except Exception</text:span><text:span text:style-name="T70"> as e:</text:span></text:p>
            <text:p text:style-name="P83"><text:span text:style-name="T70"><text:s text:c="8"/>raise Encryp</text:span><text:span text:style-name="T79">t</text:span><text:span text:style-name="T66">ion</text:span><text:span text:style-name="T63">Err</text:span><text:span text:style-name="T79">o</text:span><text:span text:style-name="T70">r</text:span><text:span text:style-name="T63">(</text:span><text:span text:style-name="T69">f"B</text:span><text:span text:style-name="T64">łąd</text:span><text:span text:style-name="T63"> </text:span><text:span text:style-name="T65">szyfrowania AES-GCM: {st</text:span><text:span text:style-name="T63">r</text:span><text:span text:style-name="T69">(</text:span><text:span text:style-name="T63">e)}")</text:span></text:p>
            <text:p text:style-name="P86"></text:p>
            <text:p text:style-name="P83"><text:span text:style-name="T63">d</text:span><text:span text:style-name="T69">e</text:span><text:span text:style-name="T63">f encrypt_aes_key_w</text:span><text:span text:style-name="T69">i</text:span><text:span text:style-name="T63">th</text:span><text:span text:style-name="T69">_</text:span><text:span text:style-name="T63">rsa(</text:span><text:span text:style-name="T64"></text:span><text:span text:style-name="T69"> </text:span><text:span text:style-name="T63">aes_key,</text:span><text:span text:style-name="T66"> pub</text:span><text:span text:style-name="T63">lic_key_file):</text:span></text:p>
            <text:p text:style-name="P83"><text:span text:style-name="T70"><text:s text:c="4"/></text:span><text:span text:style-name="T63">tr</text:span><text:span text:style-name="T64">y:</text:span><text:span text:style-name="T63"></text:span></text:p>
            <text:p text:style-name="P83"><text:span text:style-name="T63"><text:s text:c="6"/></text:span><text:span text:style-name="T69"><text:s/></text:span><text:span text:style-name="T63"><text:s/>with open(public_key_f</text:span><text:span text:style-name="T68">i</text:span><text:span text:style-name="T63">le, "rb") as key_file</text:span><text:span text:style-name="T69">:</text:span><text:span text:style-name="T63"></text:span></text:p>
            <text:p text:style-name="P83"><text:soft-page-break/><text:span text:style-name="T63"><text:s text:c="12"/>public_key</text:span><text:span text:style-name="T68"> </text:span><text:span text:style-name="T63">= load</text:span><text:span text:style-name="T69">_</text:span><text:span text:style-name="T63">pem_public_ke</text:span><text:span text:style-name="T69">y(</text:span><text:span text:style-name="T63">key_</text:span><text:span text:style-name="T68">f</text:span><text:span text:style-name="T63">ile.read())</text:span></text:p>
            <text:p text:style-name="P86"></text:p>
            <text:p text:style-name="P82"><text:span text:style-name="T63"><text:s text:c="8"/>encr</text:span><text:span text:style-name="T69">y</text:span><text:span text:style-name="T63">pted_key = public_k</text:span><text:span text:style-name="T68">e</text:span><text:span text:style-name="T63">y.enc</text:span><text:span text:style-name="T69">r</text:span><text:span text:style-name="T63">ypt(a</text:span><text:span text:style-name="T68">e</text:span><text:span text:style-name="T63">s_key,</text:span></text:p>
            <text:p text:style-name="P82"><text:span text:style-name="T63"><text:s text:c="5"/></text:span><text:span text:style-name="T69"><text:s/></text:span><text:span text:style-name="T63"><text:s text:c="6"/>padding.OAEP(</text:span></text:p>
            <text:p text:style-name="P82"><text:span text:style-name="T63"><text:s text:c="8"/></text:span><text:span text:style-name="T68"><text:s/></text:span><text:span text:style-name="T63"><text:s text:c="6"/></text:span><text:span text:style-name="T68"><text:s/></text:span><text:span text:style-name="T63">mgf=padd</text:span><text:span text:style-name="T69">i</text:span><text:span text:style-name="T63">ng.MGF1(</text:span></text:p>
            <text:p text:style-name="P83"><text:span text:style-name="T63"><text:s text:c="8"/></text:span><text:span text:style-name="T69"><text:s/></text:span><text:span text:style-name="T63"><text:s text:c="11"/>algorithm=hash</text:span><text:span text:style-name="T68">e</text:span><text:span text:style-name="T63">s.SHA2</text:span><text:span text:style-name="T68">5</text:span><text:span text:style-name="T63">6()</text:span></text:p>
            <text:p text:style-name="P83"><text:span text:style-name="T63"><text:s text:c="4"/></text:span><text:span text:style-name="T69"><text:s/></text:span><text:span text:style-name="T63"><text:s text:c="11"/>),</text:span></text:p>
            <text:p text:style-name="P83"><text:span text:style-name="T63"><text:s text:c="6"/></text:span><text:span text:style-name="T68"><text:s/></text:span><text:span text:style-name="T64"><text:s text:c="4"/></text:span><text:span text:style-name="T69"><text:s/></text:span><text:span text:style-name="T63"><text:s text:c="4"/>algorithm</text:span><text:span text:style-name="T69">=</text:span><text:span text:style-name="T63">hashes.SH</text:span><text:span text:style-name="T69">A2</text:span><text:span text:style-name="T63">56(),</text:span></text:p>
            <text:p text:style-name="P83"><text:span text:style-name="T63"><text:s/></text:span><text:span text:style-name="T64"><text:s text:c="6"/></text:span><text:span text:style-name="T63"><text:s text:c="9"/>label</text:span><text:span text:style-name="T69">=N</text:span><text:span text:style-name="T63">one</text:span></text:p>
            <text:p text:style-name="P83"><text:span text:style-name="T64"><text:s text:c="5"/></text:span><text:span text:style-name="T63"><text:s/></text:span><text:span text:style-name="T71"><text:s text:c="6"/>)</text:span></text:p>
            <text:p text:style-name="P83"><text:span text:style-name="T63"><text:s/></text:span><text:span text:style-name="T64"><text:s text:c="2"/></text:span><text:span text:style-name="T63"><text:s text:c="3"/></text:span><text:span text:style-name="T69"><text:s/></text:span><text:span text:style-name="T63"><text:s/>)</text:span></text:p>
            <text:p text:style-name="P86"></text:p>
            <text:p text:style-name="P83"><text:span text:style-name="T63"><text:s text:c="2"/></text:span><text:span text:style-name="T64"><text:s text:c="5"/></text:span><text:span text:style-name="T63"><text:s/>return encrypted</text:span><text:span text:style-name="T69">_</text:span><text:span text:style-name="T63">key</text:span></text:p>
            <text:p text:style-name="P86"></text:p>
            <text:p text:style-name="P83"><text:span text:style-name="T63"><text:s text:c="4"/>e</text:span><text:span text:style-name="T70">xcept Exception as e:</text:span></text:p>
            <text:p text:style-name="P83"><text:span text:style-name="T70"><text:s text:c="8"/>raise Encryp</text:span><text:span text:style-name="T79">t</text:span><text:span text:style-name="T66">ion</text:span><text:span text:style-name="T63">Err</text:span><text:span text:style-name="T79">o</text:span><text:span text:style-name="T70">r</text:span><text:span text:style-name="T69">(</text:span><text:span text:style-name="T63"></text:span></text:p>
            <text:p text:style-name="P83"><text:span text:style-name="T63"><text:s text:c="7"/></text:span><text:s text:c="5"/>f"Błąd szyfrowania klucza AES kluczem RSA: {str(e)}"</text:p>
            <text:p text:style-name="P83"><text:s text:c="8"/>)</text:p>
          </table:table-cell>
        </table:table-row>
      </table:table>
      <text:h text:style-name="Nagłówek_20_3" text:outline-level="3"><text:bookmark-start text:name="__RefHeading___Toc6705_3721631286"/><text:span text:style-name="T44">5.2.2. </text:span>Moduł deszyfrowania<text:bookmark-end text:name="__RefHeading___Toc6705_3721631286"/></text:h>
      <text:p text:style-name="P88"><text:tab/>Moduł deszyfrowania odpowiada za odzyskiwanie danych, które zostały wcześniej zabezpieczone przy użyciu <text:span text:style-name="T83">modułu</text:span> szyfrowania.</text:p>
      <text:p text:style-name="P88">Interfejs modułu deszyfrowania został zaimplementowany w pliku <text:span text:style-name="T25">decrypt.py</text:span> jako klasa <text:span text:style-name="T25">DecryptFrame</text:span>, dziedzicząca z klasy bazowej <text:span text:style-name="T25">tk.Frame</text:span>. Odpowiada ona za utworzenie elementów graficznych widocznych w <text:span text:style-name="T84">interfejsie użytkownika</text:span>. Struktura ekranu modułu <text:span text:style-name="T25">Decrypt</text:span> przedstawiona została na poniższym rysunku <text:span text:style-name="T83">(</text:span><text:span text:style-name="T85">Rys. 3</text:span><text:span text:style-name="T83">)</text:span>.</text:p>
      <text:p text:style-name="P68"><text:span text:style-name="Strong_20_Emphasis"><text:span text:style-name="T51">Rys. 3. Okno modułu deszyfrowania.</text:span></text:span></text:p>
      <text:p text:style-name="P89"><text:soft-page-break/><text:span text:style-name="T86">W celu poprawnego odszyfrowania użytkownik musi zadeklarować:</text:span></text:p>
      <text:list text:style-name="L30">
        <text:list-item>
          <text:p text:style-name="P90"><text:span text:style-name="T25">Plik wejściowy</text:span> – plik zawierający zaszyfrowane dane w formacie binarnym,</text:p>
        </text:list-item>
        <text:list-item>
          <text:p text:style-name="P91"><text:span text:style-name="T25">Plik wyjściowy</text:span><text:span text:style-name="T87"> – </text:span><text:span text:style-name="T88">lokalizację oraz nazwę pliku, do którego zapisane zostaną dane po odszyfrowaniu,</text:span></text:p>
        </text:list-item>
        <text:list-item>
          <text:p text:style-name="P91"><text:span text:style-name="T25">Nonce/IV</text:span> - <text:s/>plik <text:span text:style-name="T25">.nonce,</text:span></text:p>
        </text:list-item>
        <text:list-item>
          <text:p text:style-name="P91">plik <text:span text:style-name="T25">.key</text:span> <text:span text:style-name="T86">lub</text:span> plik <text:span text:style-name="T25">.key.enc</text:span> – <text:span text:style-name="T86">plik </text:span>zawierający klucz AES <text:span text:style-name="T86">lub klucz AES</text:span> zaszyfrowany kluczem publicznym RSA,</text:p>
        </text:list-item>
        <text:list-item>
          <text:p text:style-name="P91"><text:span text:style-name="T86">plik klucza prywatnego – do rozszyfrownaia klucza AES (jeżeli zaszyfrowany).</text:span></text:p>
        </text:list-item>
      </text:list>
      <text:p text:style-name="P88"><text:tab/>Po kliknięciu przycisku <text:span text:style-name="T25">Odszyfruj</text:span> uruchamiana jest metoda <text:span text:style-name="T25">decrypt() </text:span><text:span text:style-name="T89">(Listing 4.)</text:span><text:span text:style-name="T25">, </text:span><text:span text:style-name="T90">która </text:span>sprawdza, czy użytkownik wskazał <text:span text:style-name="T86">wszystkie wspomniane wcześniej pliki</text:span>. <text:span text:style-name="T86">B</text:span>rak któregokolwiek z wymaganych elementów, <text:span text:style-name="T86">podobnie jak w przypadku modułu </text:span><text:span text:style-name="T87">Encrypt</text:span><text:span text:style-name="T86">,</text:span> powoduje wyświetlenie komunikatu błędu.</text:p>
      <text:p text:style-name="P92"><text:tab/>Właściwe odszyfrowanie realizowane jest przez funkcję <text:span text:style-name="T25">decrypt_dispatcher()</text:span> <text:span text:style-name="T91">(Listing </text:span><text:span text:style-name="T89">5</text:span><text:span text:style-name="T91">.) </text:span>znajdującą się w module <text:span text:style-name="T25">crypto_lib.py</text:span>. Funkcja ta sprawdza wybrany tryb <text:span text:style-name="T92">szyfrowania, pobiera </text:span>klucz AES <text:span text:style-name="T92">i wartość Nonce/IV</text:span>. Jeżeli nie użyto szyfrowania hybrydowego, klucz AES odczytywany jest bezpośrednio z pliku <text:span text:style-name="T25">.key</text:span>. W p<text:span text:style-name="T92">rzeciwnym wypadku</text:span> funkcja korzysta z <text:span text:style-name="T25">decrypt_aes_key_with_rsa() </text:span><text:span text:style-name="T93">(Listing </text:span><text:span text:style-name="T89">6</text:span><text:span text:style-name="T93">.)</text:span>, która odszyfrowuje plik <text:span text:style-name="T25">.key.enc</text:span> przy użyciu klucza prywatnego RSA odbiorcy.</text:p>
      <text:p text:style-name="P92"><text:tab/>Po pobraniu klucza AES oraz wartości nonce wywoływana jest funkcja <text:span text:style-name="T25">decrypt_file_aes_gcm()</text:span>. Funkcja ta odczytuje zaszyfrowany plik w postaci binarnej, tworzy obiekt klasy <text:span text:style-name="T25">AESGCM</text:span>, a następnie wykonuje operację odszyfrowania. Otrzymane dane jawne zapisywane są do wskazanego przez użytkownika pliku wyjściowego. Wynikiem działania modułu jest plik zawierający odszyfrowane dane w pierwotnej postaci.</text:p>
      <text:p text:style-name="P93"><text:span text:style-name="Source_20_Text"><text:span text:style-name="T94"><text:tab/>Moduł deszyfrowania posiada ograniczenie związane z koniecznością znajomości oryginalnego rozszerzenia szyfrowanego pliku. Aplikacja nie zapisuje informacji o typie pliku</text:span></text:span><text:span text:style-name="Source_20_Text"><text:span text:style-name="T95"> przy szyfrowaniu i nie narzuca rozszerzenia pliku wynikowego</text:span></text:span><text:span text:style-name="Source_20_Text"><text:span text:style-name="T94"> podczas odszyfrowywania. W związku z tym użytkownik </text:span></text:span><text:span text:style-name="Source_20_Text"><text:span text:style-name="T95">musi</text:span></text:span><text:span text:style-name="Source_20_Text"><text:span text:style-name="T94"> samodzielnie nadać plikowi wyjściowemu rozszerzenie odpowiadające jego pierwotnemu formatowi. W przypadku braku tej wiedzy </text:span></text:span><text:span text:style-name="Source_20_Text"><text:span text:style-name="T95">odczytanie/interpretacja </text:span></text:span><text:span text:style-name="Source_20_Text"><text:span text:style-name="T94">zawartości odszyfrowanego pliku może być </text:span></text:span><text:span text:style-name="Source_20_Text"><text:span text:style-name="T95">utrudnione lub niemożliwe</text:span></text:span><text:span text:style-name="Source_20_Text"><text:span text:style-name="T94">.</text:span></text:span></text:p>
      <text:p text:style-name="P94"><text:span text:style-name="Domyślna_20_czcionka_20_akapitu"><text:span text:style-name="T73">Listing </text:span></text:span><text:span text:style-name="Domyślna_20_czcionka_20_akapitu"><text:span text:style-name="T96">4</text:span></text:span><text:span text:style-name="Domyślna_20_czcionka_20_akapitu"><text:span text:style-name="T73">. </text:span></text:span><text:span text:style-name="Domyślna_20_czcionka_20_akapitu"><text:span text:style-name="T62">Kod metody </text:span></text:span><text:span text:style-name="Domyślna_20_czcionka_20_akapitu"><text:span text:style-name="T96">decrypt</text:span></text:span><text:span text:style-name="Domyślna_20_czcionka_20_akapitu"><text:span text:style-name="T62">().</text:span></text:span></text:p>
      <table:table table:name="Table6" table:style-name="Table6">
        <table:table-column table:style-name="Table6.A"/>
        <table:table-row>
          <table:table-cell table:style-name="Table6.A1" office:value-type="string">
            <text:p text:style-name="P95"><text:span text:style-name="T64">def</text:span><text:span text:style-name="T63"> </text:span><text:span text:style-name="T65">decrypt</text:span><text:span text:style-name="T63">(</text:span><text:span text:style-name="T66">self</text:span><text:span text:style-name="T63">):</text:span></text:p>
            <text:p text:style-name="P95"><text:span text:style-name="T63"><text:s text:c="8"/></text:span><text:span text:style-name="T64">if</text:span><text:span text:style-name="T63"> </text:span><text:span text:style-name="T67">not</text:span><text:span text:style-name="T63"> </text:span><text:span text:style-name="T66">self</text:span><text:span text:style-name="T68">.</text:span><text:span text:style-name="T63">input_file:</text:span></text:p>
            <text:p text:style-name="P95"><text:span text:style-name="T63"><text:s text:c="12"/>messagebox</text:span><text:span text:style-name="T68">.</text:span><text:span text:style-name="T63">showerror(</text:span><text:span text:style-name="T70">"Błąd"</text:span><text:span text:style-name="T63">, </text:span><text:span text:style-name="T70">"Brak pliku wejściowego"</text:span><text:span text:style-name="T63">)</text:span></text:p>
            <text:p text:style-name="P95"><text:span text:style-name="T63"><text:s text:c="12"/></text:span><text:span text:style-name="T64">return</text:span></text:p>
            <text:p text:style-name="P95"><text:span text:style-name="T63"><text:s text:c="8"/></text:span><text:span text:style-name="T64">if</text:span><text:span text:style-name="T63"> </text:span><text:span text:style-name="T67">not</text:span><text:span text:style-name="T63"> </text:span><text:span text:style-name="T66">self</text:span><text:span text:style-name="T68">.</text:span><text:span text:style-name="T63">output_file:</text:span></text:p>
            <text:p text:style-name="P95"><text:span text:style-name="T63"><text:s text:c="12"/>messagebox</text:span><text:span text:style-name="T68">.</text:span><text:span text:style-name="T63">showerror(</text:span><text:span text:style-name="T70">"Błąd"</text:span><text:span text:style-name="T63">, </text:span><text:span text:style-name="T70">"Brak pliku wyjściowego"</text:span><text:span text:style-name="T63">)</text:span></text:p>
            <text:p text:style-name="P95"><text:span text:style-name="T63"><text:s text:c="12"/></text:span><text:span text:style-name="T64">return</text:span></text:p>
            <text:p text:style-name="P95"><text:span text:style-name="T63"><text:s text:c="8"/></text:span><text:span text:style-name="T64">if</text:span><text:span text:style-name="T63"> </text:span><text:span text:style-name="T67">not</text:span><text:span text:style-name="T63"> </text:span><text:span text:style-name="T66">self</text:span><text:span text:style-name="T68">.</text:span><text:span text:style-name="T63">aes_key_file:</text:span></text:p>
            <text:p text:style-name="P95"><text:span text:style-name="T63"><text:s text:c="12"/>messagebox</text:span><text:span text:style-name="T68">.</text:span><text:span text:style-name="T63">showerror(</text:span><text:span text:style-name="T70">"Błąd"</text:span><text:span text:style-name="T63">, </text:span><text:span text:style-name="T70">"Brak klucza AES"</text:span><text:span text:style-name="T63">)</text:span></text:p>
            <text:p text:style-name="P95"><text:span text:style-name="T63"><text:s text:c="12"/></text:span><text:span text:style-name="T64">return</text:span></text:p>
            <text:p text:style-name="P95"><text:span text:style-name="T63"><text:s text:c="8"/>rsa_enabled </text:span><text:span text:style-name="T68">=</text:span><text:span text:style-name="T63"> </text:span><text:span text:style-name="T66">self</text:span><text:span text:style-name="T68">.</text:span><text:span text:style-name="T63">aes_key_var</text:span><text:span text:style-name="T68">.</text:span><text:span text:style-name="T63">get()</text:span></text:p>
            <text:p text:style-name="P95"><text:span text:style-name="T63"><text:s text:c="8"/></text:span><text:span text:style-name="T64">if</text:span><text:span text:style-name="T63"> rsa_enabled </text:span><text:span text:style-name="T67">and</text:span><text:span text:style-name="T63"> </text:span><text:span text:style-name="T67">not</text:span><text:span text:style-name="T63"> </text:span><text:span text:style-name="T66">self</text:span><text:span text:style-name="T68">.</text:span><text:span text:style-name="T63">rsa_key_file_private:</text:span></text:p>
            <text:p text:style-name="P95"><text:span text:style-name="T63"><text:s text:c="12"/>messagebox</text:span><text:span text:style-name="T68">.</text:span><text:span text:style-name="T63">showerror(</text:span><text:span text:style-name="T70">"Błąd"</text:span><text:span text:style-name="T63">, </text:span><text:span text:style-name="T70">"Brak klucza prywatnego RSA"</text:span><text:span text:style-name="T63">)</text:span></text:p>
            <text:p text:style-name="P95"><text:span text:style-name="T63"><text:s text:c="12"/></text:span><text:span text:style-name="T64">return</text:span></text:p>
            <text:p text:style-name="P96"><text:soft-page-break/></text:p>
            <text:p text:style-name="P95"><text:span text:style-name="T63"><text:s text:c="8"/></text:span><text:span text:style-name="T64">try</text:span><text:span text:style-name="T63">:</text:span></text:p>
            <text:p text:style-name="P95"><text:span text:style-name="T63"><text:s text:c="12"/></text:span><text:span text:style-name="T66">self</text:span><text:span text:style-name="T68">.</text:span><text:span text:style-name="T63">busy_status_label</text:span><text:span text:style-name="T68">.</text:span><text:span text:style-name="T63">config(text</text:span><text:span text:style-name="T68">=</text:span><text:span text:style-name="T70">"Odszyfrowywanie..."</text:span><text:span text:style-name="T63">)</text:span></text:p>
            <text:p text:style-name="P95"><text:span text:style-name="T63"><text:s text:c="12"/>algorithm </text:span><text:span text:style-name="T68">=</text:span><text:span text:style-name="T63"> </text:span><text:span text:style-name="T66">self</text:span><text:span text:style-name="T68">.</text:span><text:span text:style-name="T63">selected_aes_mode</text:span><text:span text:style-name="T68">.</text:span><text:span text:style-name="T63">get()</text:span></text:p>
            <text:p text:style-name="P97"><text:span text:style-name="T63"><text:s text:c="12"/>decrypt_dispatcher(</text:span></text:p>
            <text:p text:style-name="P97"><text:span text:style-name="T63"><text:s text:c="16"/>algorithm</text:span><text:span text:style-name="T68">=</text:span><text:span text:style-name="T63">algorithm,</text:span></text:p>
            <text:p text:style-name="P97"><text:span text:style-name="T63"><text:s text:c="16"/>input_file</text:span><text:span text:style-name="T68">=</text:span><text:span text:style-name="T66">self</text:span><text:span text:style-name="T68">.</text:span><text:span text:style-name="T63">input_file,</text:span></text:p>
            <text:p text:style-name="P97"><text:span text:style-name="T63"><text:s text:c="16"/>output_file</text:span><text:span text:style-name="T68">=</text:span><text:span text:style-name="T66">self</text:span><text:span text:style-name="T68">.</text:span><text:span text:style-name="T63">output_file,</text:span></text:p>
            <text:p text:style-name="P97"><text:span text:style-name="T63"><text:s text:c="16"/>aes_key_file</text:span><text:span text:style-name="T68">=</text:span><text:span text:style-name="T66">self</text:span><text:span text:style-name="T68">.</text:span><text:span text:style-name="T63">aes_key_file,</text:span></text:p>
            <text:p text:style-name="P95"><text:span text:style-name="T63"><text:s text:c="16"/>rsa_enabled</text:span><text:span text:style-name="T68">=</text:span><text:span text:style-name="T63">rsa_enabled,</text:span></text:p>
            <text:p text:style-name="P95"><text:span text:style-name="T63"><text:s text:c="16"/>rsa_private_key_file</text:span><text:span text:style-name="T68">=</text:span><text:span text:style-name="T66">self</text:span><text:span text:style-name="T68">.</text:span><text:span text:style-name="T63">rsa_key_file_private,</text:span></text:p>
            <text:p text:style-name="P95"><text:span text:style-name="T63"><text:s text:c="16"/>nonce_file</text:span><text:span text:style-name="T68">=</text:span><text:span text:style-name="T66">self</text:span><text:span text:style-name="T68">.</text:span><text:span text:style-name="T63">nonce_iv_file)</text:span></text:p>
            <text:p text:style-name="P96"/>
            <text:p text:style-name="P95"><text:span text:style-name="T63"><text:s text:c="12"/></text:span><text:span text:style-name="T66">self</text:span><text:span text:style-name="T68">.</text:span><text:span text:style-name="T63">busy_status_label</text:span><text:span text:style-name="T68">.</text:span><text:span text:style-name="T63">config(text</text:span><text:span text:style-name="T68">=</text:span><text:span text:style-name="T70">"Gotowe"</text:span><text:span text:style-name="T63">)</text:span></text:p>
            <text:p text:style-name="P95"><text:span text:style-name="T63"><text:s text:c="12"/>messagebox</text:span><text:span text:style-name="T68">.</text:span><text:span text:style-name="T63">showinfo(</text:span><text:span text:style-name="T70">"OK"</text:span><text:span text:style-name="T63">, </text:span><text:span text:style-name="T70">"Plik odszyfrowany"</text:span><text:span text:style-name="T63">)</text:span></text:p>
            <text:p text:style-name="P96"/>
            <text:p text:style-name="P95"><text:span text:style-name="T63"><text:s text:c="8"/></text:span><text:span text:style-name="T64">except</text:span><text:span text:style-name="T63"> </text:span><text:span text:style-name="T71">Exception</text:span><text:span text:style-name="T63"> </text:span><text:span text:style-name="T64">as</text:span><text:span text:style-name="T63"> e:</text:span></text:p>
            <text:p text:style-name="P95"><text:span text:style-name="T63"><text:s text:c="12"/></text:span><text:span text:style-name="T66">self</text:span><text:span text:style-name="T68">.</text:span><text:span text:style-name="T63">busy_status_label</text:span><text:span text:style-name="T68">.</text:span><text:span text:style-name="T63">config(text</text:span><text:span text:style-name="T68">=</text:span><text:span text:style-name="T70">"Błąd"</text:span><text:span text:style-name="T63">)</text:span></text:p>
            <text:p text:style-name="P95"><text:span text:style-name="T63"><text:s text:c="12"/>messagebox</text:span><text:span text:style-name="T68">.</text:span><text:span text:style-name="T63">showerror(</text:span><text:span text:style-name="T70">"Błąd odszyfrowania"</text:span><text:span text:style-name="T63">, </text:span><text:span text:style-name="T66">str</text:span><text:span text:style-name="T63">(e))</text:span></text:p>
          </table:table-cell>
        </table:table-row>
      </table:table>
      <text:p text:style-name="Text_20_body"/>
      <text:p text:style-name="P98"><text:span text:style-name="Domyślna_20_czcionka_20_akapitu"><text:span text:style-name="T73">Listing </text:span></text:span><text:span text:style-name="Domyślna_20_czcionka_20_akapitu"><text:span text:style-name="T97">5</text:span></text:span><text:span text:style-name="Domyślna_20_czcionka_20_akapitu"><text:span text:style-name="T73">. </text:span></text:span><text:span text:style-name="Domyślna_20_czcionka_20_akapitu"><text:span text:style-name="T62">Kod metody </text:span></text:span><text:span text:style-name="Domyślna_20_czcionka_20_akapitu"><text:span text:style-name="T97">decrypt_dispatcher</text:span></text:span><text:span text:style-name="Domyślna_20_czcionka_20_akapitu"><text:span text:style-name="T62">().</text:span></text:span></text:p>
      <table:table table:name="Table7" table:style-name="Table7">
        <table:table-column table:style-name="Table7.A"/>
        <table:table-row>
          <table:table-cell table:style-name="Table7.A1" office:value-type="string">
            <text:p text:style-name="P75"><text:span text:style-name="T64">def</text:span><text:span text:style-name="T63"> </text:span><text:span text:style-name="T65">decrypt_dispatcher</text:span><text:span text:style-name="T63">(</text:span><text:span text:style-name="T69"></text:span><text:span text:style-name="T63">algorithm</text:span><text:span text:style-name="T69">,</text:span><text:span text:style-name="T63"> input_fil</text:span><text:span text:style-name="T69">e</text:span><text:span text:style-name="T63">, output_fi</text:span><text:span text:style-name="T69">l</text:span><text:span text:style-name="T63">e, aes_key_</text:span><text:span text:style-name="T68">f</text:span><text:span text:style-name="T64">ile=</text:span><text:span text:style-name="T63">N</text:span><text:span text:style-name="T69">o</text:span><text:span text:style-name="T63">ne, nonce</text:span><text:span text:style-name="T68">_</text:span><text:span text:style-name="T64">file</text:span><text:span text:style-name="T63">=</text:span><text:span text:style-name="T69">N</text:span><text:span text:style-name="T63">one, rsa_e</text:span><text:span text:style-name="T68">n</text:span><text:span text:style-name="T64">abled</text:span><text:span text:style-name="T63">=</text:span><text:span text:style-name="T69">F</text:span><text:span text:style-name="T63">alse,</text:span></text:p>
            <text:p text:style-name="P75"><text:span text:style-name="T63"><text:s text:c="4"/>rsa_private_k</text:span><text:span text:style-name="T68">e</text:span><text:span text:style-name="T64">y_fi</text:span><text:span text:style-name="T69">l</text:span><text:span text:style-name="T63">e=</text:span><text:span text:style-name="T69">No</text:span><text:span text:style-name="T63">ne</text:span><text:span text:style-name="T64">):</text:span><text:span text:style-name="T63"></text:span></text:p>
            <text:p text:style-name="P99"></text:p>
            <text:p text:style-name="P75"><text:span text:style-name="T63"><text:s text:c="4"/>if </text:span><text:span text:style-name="T68">al</text:span><text:span text:style-name="T63">g</text:span><text:span text:style-name="T70">orithm != "AE</text:span><text:span text:style-name="T63">S</text:span><text:span text:style-name="T69">-</text:span><text:span text:style-name="T63">256-GCM"</text:span><text:span text:style-name="T64">:</text:span></text:p>
            <text:p text:style-name="P75"><text:span text:style-name="T64"><text:s text:c="2"/></text:span><text:span text:style-name="T63"><text:s/></text:span><text:span text:style-name="T71"><text:s text:c="5"/>raise</text:span><text:span text:style-name="T63"> </text:span><text:span text:style-name="T70">ValueError("Nieobsługiwan</text:span><text:span text:style-name="T63">y</text:span><text:span text:style-name="T69"> t</text:span><text:span text:style-name="T63">ryb </text:span><text:span text:style-name="T82">AES")</text:span></text:p>
            <text:p text:style-name="P100"></text:p>
            <text:p text:style-name="P75"><text:span text:style-name="T63"><text:s text:c="4"/>i</text:span><text:span text:style-name="T69">f</text:span><text:span text:style-name="T63"> rsa_enabled:</text:span></text:p>
            <text:p text:style-name="P75"><text:span text:style-name="T63"><text:s/></text:span><text:span text:style-name="T68"><text:s/></text:span><text:span text:style-name="T63"><text:s text:c="6"/>aes_key = decrypt_ae</text:span><text:span text:style-name="T69">s</text:span><text:span text:style-name="T63">_key_with_rsa(en</text:span><text:span text:style-name="T68">c</text:span><text:span text:style-name="T63">rypted_key_pa</text:span><text:span text:style-name="T69">t</text:span><text:span text:style-name="T63">h=aes_key_file,</text:span><text:span text:style-name="T68"> </text:span><text:span text:style-name="T63">private_key_path=rsa</text:span><text:span text:style-name="T69">_</text:span><text:span text:style-name="T63">private_k</text:span><text:span text:style-name="T69">e</text:span><text:span text:style-name="T63">y_fi</text:span><text:span text:style-name="T64">le</text:span><text:span text:style-name="T63">)</text:span></text:p>
            <text:p text:style-name="P75"><text:span text:style-name="T64"><text:s text:c="3"/></text:span><text:span text:style-name="T63"><text:s/></text:span><text:span text:style-name="T66">else</text:span><text:span text:style-name="T63">:</text:span></text:p>
            <text:p text:style-name="P75"><text:span text:style-name="T63"><text:s text:c="8"/>with</text:span><text:span text:style-name="T70"> ope</text:span><text:span text:style-name="T63">n(</text:span><text:span text:style-name="T64">ae</text:span><text:span text:style-name="T63">s_k</text:span><text:span text:style-name="T69">e</text:span><text:span text:style-name="T63">y_file, "rb") as f:</text:span></text:p>
            <text:p text:style-name="P75"><text:span text:style-name="T63"><text:s text:c="2"/></text:span><text:span text:style-name="T68"><text:s/></text:span><text:span text:style-name="T63"><text:s text:c="6"/></text:span><text:span text:style-name="T69"><text:s text:c="2"/></text:span><text:span text:style-name="T63"><text:s/>aes</text:span><text:span text:style-name="T82">_key = f.read()</text:span></text:p>
            <text:p text:style-name="P100"></text:p>
            <text:p text:style-name="P75"><text:span text:style-name="T63"><text:s text:c="4"/>if </text:span><text:span text:style-name="T64">not n</text:span><text:span text:style-name="T63">o</text:span><text:span text:style-name="T71">nce_file:</text:span></text:p>
            <text:p text:style-name="P75"><text:span text:style-name="T70"><text:s text:c="8"/>raise ValueEr</text:span><text:span text:style-name="T63">r</text:span><text:span text:style-name="T69">or</text:span><text:span text:style-name="T63">("Br</text:span><text:span text:style-name="T64">ak p</text:span><text:span text:style-name="T63">l</text:span><text:span text:style-name="T66">iku </text:span><text:span text:style-name="T63">nonce/IV")</text:span></text:p>
            <text:p text:style-name="P99"><text:span text:style-name="T98"/></text:p>
            <text:p text:style-name="P75"><text:span text:style-name="T70"><text:s text:c="3"/></text:span><text:span text:style-name="T63"><text:s/>w</text:span><text:span text:style-name="T64">it</text:span><text:span text:style-name="T63">h o</text:span><text:span text:style-name="T69">p</text:span><text:span text:style-name="T63">en(nonce_file,</text:span><text:span text:style-name="T68"> </text:span><text:span text:style-name="T63">"r</text:span><text:span text:style-name="T68">b</text:span><text:span text:style-name="T63">") as </text:span><text:span text:style-name="T69">f:</text:span><text:span text:style-name="T63"></text:span></text:p>
            <text:p text:style-name="P75"><text:span text:style-name="T63"><text:s text:c="2"/></text:span><text:span text:style-name="T82"><text:s text:c="6"/>nonce = f.r</text:span><text:span text:style-name="T69">e</text:span><text:span text:style-name="T63">ad()</text:span></text:p>
            <text:p text:style-name="P99"></text:p>
            <text:p text:style-name="P75"><text:span text:style-name="T63"><text:s text:c="4"/>decrypt_f</text:span><text:span text:style-name="T68">i</text:span><text:span text:style-name="T63">le_aes_gcm(</text:span><text:span text:style-name="T69"></text:span></text:p>
            <text:p text:style-name="P75"><text:span text:style-name="T63"><text:s text:c="8"/>input_file</text:span><text:span text:style-name="T68">=</text:span><text:span text:style-name="T63">input_file,</text:span></text:p>
            <text:p text:style-name="P75"><text:span text:style-name="T63"><text:s text:c="8"/>output_</text:span><text:span text:style-name="T68">f</text:span><text:span text:style-name="T63">ile=outp</text:span><text:span text:style-name="T69">u</text:span><text:span text:style-name="T63">t_file,</text:span></text:p>
            <text:p text:style-name="P75"><text:span text:style-name="T63"><text:s text:c="4"/></text:span><text:span text:style-name="T68"><text:s/></text:span><text:span text:style-name="T63"><text:s text:c="3"/>ae</text:span><text:span text:style-name="T69">s</text:span><text:span text:style-name="T63">_key=</text:span>aes_key,</text:p>
            <text:p text:style-name="P75"><text:s text:c="8"/>nonce=nonce)</text:p>
          </table:table-cell>
        </table:table-row>
      </table:table>
      <text:p text:style-name="P98"><text:span text:style-name="Domyślna_20_czcionka_20_akapitu"><text:span text:style-name="T62"/></text:span></text:p>
      <text:p text:style-name="P98"><text:span text:style-name="Domyślna_20_czcionka_20_akapitu"><text:span text:style-name="T73">Listing </text:span></text:span><text:span text:style-name="Domyślna_20_czcionka_20_akapitu"><text:span text:style-name="T97">6</text:span></text:span><text:span text:style-name="Domyślna_20_czcionka_20_akapitu"><text:span text:style-name="T73">. </text:span></text:span><text:span text:style-name="Domyślna_20_czcionka_20_akapitu"><text:span text:style-name="T81">Metody wykorzystywane przez</text:span></text:span><text:span text:style-name="Domyślna_20_czcionka_20_akapitu"><text:span text:style-name="T62"> </text:span></text:span><text:span text:style-name="Domyślna_20_czcionka_20_akapitu"><text:span text:style-name="T97">decrypt</text:span></text:span><text:span text:style-name="Domyślna_20_czcionka_20_akapitu"><text:span text:style-name="T62">_dispatcher().</text:span></text:span></text:p>
      <table:table table:name="Table8" table:style-name="Table8">
        <table:table-column table:style-name="Table8.A"/>
        <table:table-row>
          <table:table-cell table:style-name="Table8.A1" office:value-type="string">
            <text:p text:style-name="P75"><text:span text:style-name="T64">def</text:span><text:span text:style-name="T63"> </text:span><text:span text:style-name="T65">decrypt_aes_key_with_rsa</text:span><text:span text:style-name="T63">(encrypted_key_path, private_key_path):</text:span><text:span text:style-name="T69"></text:span></text:p>
            <text:p text:style-name="P75"><text:span text:style-name="T63"><text:s text:c="3"/></text:span><text:span text:style-name="T64"><text:s/>wit</text:span><text:span text:style-name="T63">h</text:span><text:span text:style-name="T66"> ope</text:span><text:span text:style-name="T63">n(private_key_path,</text:span><text:span text:style-name="T70"> "rb</text:span><text:span text:style-name="T63">")</text:span><text:span text:style-name="T64"> a</text:span><text:span text:style-name="T63">s f</text:span><text:span text:style-name="T69">:</text:span><text:span text:style-name="T63"> private_ke</text:span><text:span text:style-name="T68">y</text:span><text:span text:style-name="T63"> = load_pem_private_key</text:span><text:span text:style-name="T68">(</text:span><text:span text:style-name="T63">f.read(), passwo</text:span><text:span text:style-name="T68">r</text:span><text:span text:style-name="T64">d=No</text:span><text:span text:style-name="T63">n</text:span><text:span text:style-name="T69">e)</text:span><text:span text:style-name="T63"></text:span></text:p>
            <text:p text:style-name="P75"><text:span text:style-name="T64"><text:s text:c="4"/></text:span><text:span text:style-name="T63">w</text:span><text:span text:style-name="T66">ith </text:span><text:span text:style-name="T63">open(encrypted_key_pa</text:span><text:span text:style-name="T70">th, </text:span><text:span text:style-name="T63">"r</text:span><text:span text:style-name="T64">b"</text:span><text:span text:style-name="T63">) a</text:span><text:span text:style-name="T69">s</text:span><text:span text:style-name="T63"> f:</text:span></text:p>
            <text:p text:style-name="P75"><text:span text:style-name="T63"><text:s text:c="8"/>encrypted</text:span><text:span text:style-name="T68">_</text:span><text:span text:style-name="T63">ke</text:span><text:span text:style-name="T68">y</text:span><text:span text:style-name="T63"> = f.r</text:span><text:span text:style-name="T69">ea</text:span><text:span text:style-name="T63">d()</text:span></text:p>
            <text:p text:style-name="P99"></text:p>
            <text:p text:style-name="P75"><text:span text:style-name="T63"><text:s text:c="4"/>a</text:span><text:span text:style-name="T68">e</text:span><text:span text:style-name="T63">s_key = priv</text:span><text:span text:style-name="T68">a</text:span><text:span text:style-name="T63">te_key.d</text:span><text:span text:style-name="T69">e</text:span><text:span text:style-name="T63">crypt(encryp</text:span><text:span text:style-name="T69">t</text:span><text:span text:style-name="T63">ed_key,</text:span></text:p>
            <text:p text:style-name="P75"><text:span text:style-name="T63"><text:s text:c="6"/></text:span><text:span text:style-name="T68"><text:s/></text:span><text:span text:style-name="T63"><text:s/>padd</text:span><text:span text:style-name="T69">i</text:span><text:span text:style-name="T63">ng.OAEP( m</text:span><text:span text:style-name="T68">g</text:span><text:span text:style-name="T63">f=padding.MGF1</text:span><text:span text:style-name="T68">(</text:span><text:span text:style-name="T63">algori</text:span><text:span text:style-name="T68">t</text:span><text:span text:style-name="T63">hm=hashes.</text:span><text:span text:style-name="T69">S</text:span><text:span text:style-name="T63">HA256()), algor</text:span><text:span text:style-name="T68">i</text:span><text:span text:style-name="T63">thm=hashe</text:span><text:span text:style-name="T69">s</text:span><text:span text:style-name="T63">.SHA256(), label=No</text:span><text:span text:style-name="T69">n</text:span><text:span text:style-name="T63">e</text:span><text:span text:style-name="T64">)</text:span><text:span text:style-name="T63">)</text:span></text:p>
            <text:p text:style-name="P75"><text:span text:style-name="T63"><text:s text:c="2"/></text:span><text:span text:style-name="T69"><text:s text:c="2"/></text:span><text:span text:style-name="T64">ret</text:span><text:span text:style-name="T63">u</text:span><text:span text:style-name="T65">rn aes_key</text:span></text:p>
            <text:p text:style-name="P101"></text:p>
            <text:p text:style-name="P75"><text:span text:style-name="T65">def de</text:span><text:span text:style-name="T63">crypt_file_aes_gcm(input_file, output_file</text:span><text:span text:style-name="T69">,</text:span><text:span text:style-name="T63"> aes</text:span><text:span text:style-name="T64">_ke</text:span><text:span text:style-name="T63">y</text:span><text:span text:style-name="T69">,</text:span><text:span text:style-name="T63"> nonce):</text:span><text:span text:style-name="T64"></text:span></text:p>
            <text:p text:style-name="P75"><text:span text:style-name="T64"><text:s text:c="2"/></text:span><text:span text:style-name="T63"><text:s/></text:span><text:span text:style-name="T66"><text:s/>try</text:span><text:span text:style-name="T63">:</text:span></text:p>
            <text:p text:style-name="P75"><text:span text:style-name="T63"><text:s text:c="8"/>wi</text:span><text:span text:style-name="T70">th o</text:span><text:span text:style-name="T63">pe</text:span><text:span text:style-name="T64">n(</text:span><text:span text:style-name="T63">inp</text:span><text:span text:style-name="T69">u</text:span><text:span text:style-name="T63">t_file, "rb") as f:</text:span></text:p>
            <text:p text:style-name="P75"><text:span text:style-name="T63"><text:s text:c="2"/></text:span><text:span text:style-name="T68"><text:s/></text:span><text:span text:style-name="T63"><text:s text:c="2"/></text:span><text:span text:style-name="T68"><text:s/></text:span><text:span text:style-name="T63"><text:s text:c="6"/></text:span><text:span text:style-name="T69">ci</text:span><text:span text:style-name="T63">phertext = f.re</text:span><text:span text:style-name="T68">a</text:span><text:span text:style-name="T63">d()</text:span></text:p>
            <text:p text:style-name="P75"><text:span text:style-name="T63"><text:s text:c="8"/>a</text:span><text:span text:style-name="T69">es</text:span><text:span text:style-name="T63">gcm = AESGCM(aes_k</text:span><text:span text:style-name="T68">e</text:span><text:span text:style-name="T63">y)</text:span></text:p>
            <text:p text:style-name="P75"><text:span text:style-name="T63"><text:s/></text:span><text:span text:style-name="T68"><text:s/></text:span><text:span text:style-name="T63"><text:s text:c="6"/>pl</text:span><text:span text:style-name="T69">a</text:span><text:span text:style-name="T63">intext = aesgcm.de</text:span><text:span text:style-name="T69">c</text:span><text:span text:style-name="T63">rypt(nonc</text:span><text:span text:style-name="T69">e</text:span><text:span text:style-name="T63">,</text:span><text:span text:style-name="T64"> c</text:span><text:span text:style-name="T69">i</text:span><text:span text:style-name="T63">phertext,</text:span><text:span text:style-name="T69"></text:span><text:span text:style-name="T64"> </text:span><text:span text:style-name="T63">N</text:span><text:span text:style-name="T66">one</text:span><text:span text:style-name="T63">)</text:span></text:p>
            <text:p text:style-name="P99"><text:span text:style-name="T99"/></text:p>
            <text:p text:style-name="P75"><text:span text:style-name="T70"><text:s text:c="4"/></text:span><text:span text:style-name="T63"><text:s text:c="2"/></text:span><text:span text:style-name="T64"><text:s text:c="2"/></text:span><text:span text:style-name="T63">wit</text:span><text:span text:style-name="T69">h</text:span><text:span text:style-name="T63"> open(output_</text:span><text:span text:style-name="T68">f</text:span><text:span text:style-name="T63">ile, "wb") as f:</text:span><text:span text:style-name="T69"></text:span></text:p>
            <text:p text:style-name="P75"><text:span text:style-name="T63"><text:s text:c="4"/></text:span><text:span text:style-name="T64"><text:s text:c="6"/></text:span><text:span text:style-name="T63"><text:s/></text:span><text:span text:style-name="T71"><text:s/>f.write(</text:span><text:span text:style-name="T63">p</text:span><text:span text:style-name="T64">la</text:span><text:span text:style-name="T63">int</text:span><text:span text:style-name="T69">e</text:span><text:span text:style-name="T63">xt)</text:span></text:p>
            <text:p text:style-name="P75"><text:span text:style-name="T63"><text:s/></text:span><text:span text:style-name="T64"><text:s text:c="3"/>ex</text:span><text:span text:style-name="T63">cept Exception as</text:span><text:span text:style-name="T70"> e:</text:span></text:p>
            <text:p text:style-name="P75"><text:span text:style-name="T70"><text:s text:c="8"/>raise EncryptionE</text:span><text:span text:style-name="T79">r</text:span><text:span text:style-name="T66">ror</text:span><text:span text:style-name="T63">(f"</text:span><text:span text:style-name="T79">B</text:span><text:span text:style-name="T70">ł</text:span><text:span text:style-name="T63">ą</text:span>d odszyfrowania AES-GCM: {str(e)}")</text:p>
          </table:table-cell>
        </table:table-row>
      </table:table>
      <text:h text:style-name="Nagłówek_20_3" text:outline-level="3"><text:bookmark-start text:name="__RefHeading___Toc6707_3721631286"/><text:soft-page-break/><text:span text:style-name="T44">5.2.3. </text:span>Moduł podpisu cyfrowego<text:bookmark-end text:name="__RefHeading___Toc6707_3721631286"/></text:h>
      <text:p text:style-name="P7"><text:tab/>Moduł podpisu cyfrowego odpowiada za generowanie oraz weryfikację podpisów z wykorzystaniem algorytmu RSA oraz funkcji SHA-256. </text:p>
      <text:p text:style-name="P7"><text:tab/>Interfejs modułu został zaimplementowany w pliku <text:span text:style-name="T25">sign.py</text:span> jako klasa <text:span text:style-name="T25">SignFrame</text:span>, dziedzicząca z klasy bazowej <text:span text:style-name="T25">tk.Frame</text:span>. Odpowiada ona za utworzenie elementów graficznych widocznych w zakładce <text:span text:style-name="T25">Sign. </text:span>Struktura ekranu modułu przedstawiona została na poniższym rysunku.</text:p>
      <text:p text:style-name="P102"><text:span text:style-name="Strong_20_Emphasis"><text:span text:style-name="T51">Rys. 4. Okno modułu podpisu cyfrowego i weryfikacji podpisu.</text:span></text:span></text:p>
      <text:p text:style-name="P7"><text:tab/>W części odpowiedzialnej za podpisywanie użytkownik wskazuje plik przeznaczony do podpisania, klucz prywatny RSA nadawcy oraz lokalizację pliku podpisu. Aplikacja umożliwia podpisywanie dowolnych typów plików. Wygenerowany podpis zapisywany jest jako osobny plik binarny.</text:p>
      <text:p text:style-name="P7"><text:tab/>Po kliknięciu przycisku Podpisz uruchamiana jest metoda <text:span text:style-name="T25">sign() </text:span><text:span text:style-name="T100">(Listing 7.)</text:span>, która sprawdza poprawność wprowadzonych danych <text:span text:style-name="T101">(</text:span>obecność pliku przeznaczonego do podpisania, klucza prywatnego RSA oraz lokalizacji pliku podpisu<text:span text:style-name="T101">)</text:span>. W przypadku braku wymaganych danych <text:span text:style-name="T101">wyświetlany jest odpowiedni komunikat w polu statusu</text:span>.</text:p>
      <text:p text:style-name="P103"><text:tab/><text:span text:style-name="T101">P</text:span>roces podpisywania realizowany jest przez funkcję <text:span text:style-name="T25">sign_file() </text:span><text:span text:style-name="T100">(Listing 8.)</text:span> znajdującą się w module <text:span text:style-name="T25">rsa_signature.py</text:span>. Funkcja odczytuje klucz prywatny RSA zapisany w formacie <text:span text:style-name="T25">PEM</text:span>, a <text:soft-page-break/>następnie pobiera zawartość wskazanego pliku. Kolejnym krokiem jest wygenerowanie podpisu cyfrowego przy użyciu metody <text:span text:style-name="T25">private_key.sign() </text:span><text:span text:style-name="T100">(Listing 8.)</text:span>. W procesie tym wykorzystywany jest algorytm RSA wraz z mechanizmem dopełniania PSS (Probabilistic Signature Scheme) oraz funkcją skrótu SHA-256.</text:p>
      <text:p text:style-name="P104"><text:tab/>Druga część modułu odpowiada za weryfikację podpisu cyfrowego. W tym celu <text:span text:style-name="T101">poprawnej weryfikacji podpisu użytkownik</text:span> wskazuje plik do weryfikacji, klucz publiczny RSA nadawcy oraz plik zawierający podpis cyfrowy. Po <text:span text:style-name="T101">wybraniu</text:span> przycisku <text:span text:style-name="T25">Zweryfikuj</text:span> uruchamiana jest metoda <text:span text:style-name="T25">verify_signature() </text:span><text:span text:style-name="T100">(Listing 7.)</text:span>, która sprawdza kompletność wymaganych danych, a następnie wywołuje funkcję <text:span text:style-name="T25">verify_signature() </text:span><text:span text:style-name="T100">(Listing 8.)</text:span> znajdującą się w module <text:span text:style-name="T25">rsa_signature.py</text:span>.</text:p>
      <text:p text:style-name="P7"><text:tab/>Proces weryfikacji polega na odczytaniu klucza publicznego <text:span text:style-name="T25">RSA</text:span>, danych z pliku oraz podpisu cyfrowego. Następnie wykonywana jest operacja <text:span text:style-name="T25">public_key.verify()</text:span>, wykorzystująca ten sam schemat <text:span text:style-name="T25">RSA-PSS</text:span> oraz funkcję <text:span text:style-name="T25">SHA-256</text:span>, które zostały użyte podczas podpisywania. Jeżeli podpis jest poprawny użytkownik otrzymuje komunikat „Podpis poprawny”. W przeciwnym przypadku zgłaszany jest wyjątek, a aplikacja informuje użytkownika o niepoprawnym podpisie.</text:p>
      <text:p text:style-name="P104">Zastosowane rozwiązanie pozwala wykryć każdą modyfikację podpisanego pliku (niewielka zmiana zawartości powoduje wygenerowanie innego skrótu). Dzięki temu moduł zapewnia integralność danych oraz umożliwia potwierdzenie tożsamości nadawcy.</text:p>
      <text:p text:style-name="P105"><text:span text:style-name="Domyślna_20_czcionka_20_akapitu"><text:span text:style-name="T73">Listing </text:span></text:span><text:span text:style-name="Domyślna_20_czcionka_20_akapitu"><text:span text:style-name="T102">7</text:span></text:span><text:span text:style-name="Domyślna_20_czcionka_20_akapitu"><text:span text:style-name="T73">. </text:span></text:span><text:span text:style-name="Domyślna_20_czcionka_20_akapitu"><text:span text:style-name="T81">Metody </text:span></text:span><text:span text:style-name="Domyślna_20_czcionka_20_akapitu"><text:span text:style-name="T103">sign(</text:span></text:span><text:span text:style-name="Domyślna_20_czcionka_20_akapitu"><text:span text:style-name="T62">) </text:span></text:span><text:span text:style-name="Domyślna_20_czcionka_20_akapitu"><text:span text:style-name="T103">i verify_signature()</text:span></text:span><text:span text:style-name="Domyślna_20_czcionka_20_akapitu"><text:span text:style-name="T62">.</text:span></text:span></text:p>
      <table:table table:name="Table9" table:style-name="Table9">
        <table:table-column table:style-name="Table9.A"/>
        <table:table-row>
          <table:table-cell table:style-name="Table9.A1" office:value-type="string">
            <text:p text:style-name="P75"><text:span text:style-name="T63"><text:s text:c="3"/></text:span><text:span text:style-name="T64">def</text:span><text:span text:style-name="T63"> </text:span><text:span text:style-name="T65">sign</text:span><text:span text:style-name="T63">(</text:span><text:span text:style-name="T66">self</text:span><text:span text:style-name="T63">):</text:span></text:p>
            <text:p text:style-name="P75"><text:span text:style-name="T63"><text:s text:c="8"/></text:span><text:span text:style-name="T64">try</text:span><text:span text:style-name="T63">:</text:span></text:p>
            <text:p text:style-name="P75"><text:span text:style-name="T63"><text:s text:c="12"/></text:span><text:span text:style-name="T64">if</text:span><text:span text:style-name="T63"> </text:span><text:span text:style-name="T67">not</text:span><text:span text:style-name="T63"> </text:span><text:span text:style-name="T66">self</text:span><text:span text:style-name="T68">.</text:span><text:span text:style-name="T63">to_sign_file:</text:span></text:p>
            <text:p text:style-name="P75"><text:span text:style-name="T63"><text:s text:c="16"/></text:span><text:span text:style-name="T66">self</text:span><text:span text:style-name="T68">.</text:span><text:span text:style-name="T63">busy_status_label_1</text:span><text:span text:style-name="T68">.</text:span><text:span text:style-name="T63">config(text</text:span><text:span text:style-name="T68">=</text:span><text:span text:style-name="T70">"Wybierz plik"</text:span><text:span text:style-name="T63">)</text:span></text:p>
            <text:p text:style-name="P75"><text:span text:style-name="T63"><text:s text:c="16"/></text:span><text:span text:style-name="T64">return</text:span></text:p>
            <text:p text:style-name="P75"><text:span text:style-name="T63"><text:s text:c="12"/></text:span><text:span text:style-name="T64">if</text:span><text:span text:style-name="T63"> </text:span><text:span text:style-name="T67">not</text:span><text:span text:style-name="T63"> </text:span><text:span text:style-name="T66">self</text:span><text:span text:style-name="T68">.</text:span><text:span text:style-name="T63">private_rsa_key_file:</text:span></text:p>
            <text:p text:style-name="P75"><text:span text:style-name="T63"><text:s text:c="16"/></text:span><text:span text:style-name="T66">self</text:span><text:span text:style-name="T68">.</text:span><text:span text:style-name="T63">busy_status_label_1</text:span><text:span text:style-name="T68">.</text:span><text:span text:style-name="T63">config(text</text:span><text:span text:style-name="T68">=</text:span><text:span text:style-name="T70">"Wybierz klucz prywatny"</text:span><text:span text:style-name="T63">)</text:span></text:p>
            <text:p text:style-name="P75"><text:span text:style-name="T63"><text:s text:c="16"/></text:span><text:span text:style-name="T64">return</text:span></text:p>
            <text:p text:style-name="P75"><text:span text:style-name="T63"><text:s text:c="12"/></text:span><text:span text:style-name="T64">if</text:span><text:span text:style-name="T63"> </text:span><text:span text:style-name="T67">not</text:span><text:span text:style-name="T63"> </text:span><text:span text:style-name="T66">self</text:span><text:span text:style-name="T68">.</text:span><text:span text:style-name="T63">output_file:</text:span></text:p>
            <text:p text:style-name="P75"><text:span text:style-name="T63"><text:s text:c="16"/></text:span><text:span text:style-name="T66">self</text:span><text:span text:style-name="T68">.</text:span><text:span text:style-name="T63">busy_status_label_1</text:span><text:span text:style-name="T68">.</text:span><text:span text:style-name="T63">config(text</text:span><text:span text:style-name="T68">=</text:span><text:span text:style-name="T70">"Wybierz plik podpisu"</text:span><text:span text:style-name="T63">)</text:span></text:p>
            <text:p text:style-name="P75"><text:span text:style-name="T63"><text:s text:c="16"/></text:span><text:span text:style-name="T64">return</text:span></text:p>
            <text:p text:style-name="P75"><text:span text:style-name="T63"><text:s text:c="12"/>sign_file(</text:span><text:span text:style-name="T66">self</text:span><text:span text:style-name="T68">.</text:span><text:span text:style-name="T63">to_sign_file, </text:span><text:span text:style-name="T66">self</text:span><text:span text:style-name="T68">.</text:span><text:span text:style-name="T63">private_rsa_key_file, </text:span><text:span text:style-name="T66">self</text:span><text:span text:style-name="T68">.</text:span><text:span text:style-name="T63">output_file)</text:span></text:p>
            <text:p text:style-name="P75"><text:span text:style-name="T63"><text:s text:c="12"/></text:span><text:span text:style-name="T66">self</text:span><text:span text:style-name="T68">.</text:span><text:span text:style-name="T63">busy_status_label_1</text:span><text:span text:style-name="T68">.</text:span><text:span text:style-name="T63">config(text</text:span><text:span text:style-name="T68">=</text:span><text:span text:style-name="T70">"Plik podpisany"</text:span><text:span text:style-name="T63">)</text:span></text:p>
            <text:p text:style-name="P76"/>
            <text:p text:style-name="P75"><text:span text:style-name="T63"><text:s text:c="8"/></text:span><text:span text:style-name="T64">except</text:span><text:span text:style-name="T63"> </text:span><text:span text:style-name="T71">Exception</text:span><text:span text:style-name="T63"> </text:span><text:span text:style-name="T64">as</text:span><text:span text:style-name="T63"> e:</text:span></text:p>
            <text:p text:style-name="P75"><text:span text:style-name="T63"><text:s text:c="12"/></text:span><text:span text:style-name="T66">self</text:span><text:span text:style-name="T68">.</text:span><text:span text:style-name="T63">busy_status_label_1</text:span><text:span text:style-name="T68">.</text:span><text:span text:style-name="T63">config(text</text:span><text:span text:style-name="T68">=</text:span><text:span text:style-name="T70">f"Błąd: </text:span><text:span text:style-name="T79">{</text:span><text:span text:style-name="T63">e</text:span><text:span text:style-name="T79">}</text:span><text:span text:style-name="T70">"</text:span><text:span text:style-name="T63">)</text:span></text:p>
            <text:p text:style-name="P76"/>
            <text:p text:style-name="P75"><text:span text:style-name="T63"><text:s text:c="4"/></text:span><text:span text:style-name="T64">def</text:span><text:span text:style-name="T63"> </text:span><text:span text:style-name="T65">verify_signature</text:span><text:span text:style-name="T63">(</text:span><text:span text:style-name="T66">self</text:span><text:span text:style-name="T63">):</text:span></text:p>
            <text:p text:style-name="P75"><text:span text:style-name="T63"><text:s text:c="8"/></text:span><text:span text:style-name="T64">try</text:span><text:span text:style-name="T63">:</text:span></text:p>
            <text:p text:style-name="P75"><text:span text:style-name="T63"><text:s text:c="12"/></text:span><text:span text:style-name="T64">if</text:span><text:span text:style-name="T63"> </text:span><text:span text:style-name="T67">not</text:span><text:span text:style-name="T63"> </text:span><text:span text:style-name="T66">self</text:span><text:span text:style-name="T68">.</text:span><text:span text:style-name="T63">to_verify_file:</text:span></text:p>
            <text:p text:style-name="P75"><text:span text:style-name="T63"><text:s text:c="16"/></text:span><text:span text:style-name="T66">self</text:span><text:span text:style-name="T68">.</text:span><text:span text:style-name="T63">busy_status_label_2</text:span><text:span text:style-name="T68">.</text:span><text:span text:style-name="T63">config(text</text:span><text:span text:style-name="T68">=</text:span><text:span text:style-name="T70">"Wybierz plik"</text:span><text:span text:style-name="T63">)</text:span></text:p>
            <text:p text:style-name="P75"><text:span text:style-name="T63"><text:s text:c="16"/></text:span><text:span text:style-name="T64">return</text:span></text:p>
            <text:p text:style-name="P75"><text:span text:style-name="T63"><text:s text:c="12"/></text:span><text:span text:style-name="T64">if</text:span><text:span text:style-name="T63"> </text:span><text:span text:style-name="T67">not</text:span><text:span text:style-name="T63"> </text:span><text:span text:style-name="T66">self</text:span><text:span text:style-name="T68">.</text:span><text:span text:style-name="T63">rsa_key_file_public:</text:span></text:p>
            <text:p text:style-name="P75"><text:span text:style-name="T63"><text:s text:c="16"/></text:span><text:span text:style-name="T66">self</text:span><text:span text:style-name="T68">.</text:span><text:span text:style-name="T63">busy_status_label_2</text:span><text:span text:style-name="T68">.</text:span><text:span text:style-name="T63">config(text</text:span><text:span text:style-name="T68">=</text:span><text:span text:style-name="T70">"Wybierz klucz publiczny"</text:span><text:span text:style-name="T63">)</text:span></text:p>
            <text:p text:style-name="P75"><text:span text:style-name="T63"><text:s text:c="16"/></text:span><text:span text:style-name="T64">return</text:span></text:p>
            <text:p text:style-name="P75"><text:span text:style-name="T63"><text:s text:c="12"/></text:span><text:span text:style-name="T64">if</text:span><text:span text:style-name="T63"> </text:span><text:span text:style-name="T67">not</text:span><text:span text:style-name="T63"> </text:span><text:span text:style-name="T66">self</text:span><text:span text:style-name="T68">.</text:span><text:span text:style-name="T63">signature_file:</text:span></text:p>
            <text:p text:style-name="P75"><text:span text:style-name="T63"><text:s text:c="16"/></text:span><text:span text:style-name="T66">self</text:span><text:span text:style-name="T68">.</text:span><text:span text:style-name="T63">busy_status_label_2</text:span><text:span text:style-name="T68">.</text:span><text:span text:style-name="T63">config(text</text:span><text:span text:style-name="T68">=</text:span><text:span text:style-name="T70">"Wybierz podpis"</text:span><text:span text:style-name="T63">)</text:span></text:p>
            <text:p text:style-name="P75"><text:span text:style-name="T63"><text:s text:c="16"/></text:span><text:span text:style-name="T64">return</text:span></text:p>
            <text:p text:style-name="P75"><text:span text:style-name="T63"><text:s text:c="12"/>result </text:span><text:span text:style-name="T68">=</text:span><text:span text:style-name="T63"> verify_signature(</text:span><text:span text:style-name="T66">self</text:span><text:span text:style-name="T68">.</text:span><text:span text:style-name="T63">to_verify_file, </text:span><text:span text:style-name="T66">self</text:span><text:span text:style-name="T68">.</text:span><text:span text:style-name="T63">rsa_key_file_public, </text:span><text:span text:style-name="T66">self</text:span><text:span text:style-name="T68">.</text:span><text:span text:style-name="T63">signature_file)</text:span></text:p>
            <text:p text:style-name="P76"/>
            <text:p text:style-name="P75"><text:span text:style-name="T63"><text:s text:c="12"/></text:span><text:span text:style-name="T64">if</text:span><text:span text:style-name="T63"> result:</text:span></text:p>
            <text:p text:style-name="P75"><text:span text:style-name="T63"><text:s text:c="16"/></text:span><text:span text:style-name="T66">self</text:span><text:span text:style-name="T68">.</text:span><text:span text:style-name="T63">busy_status_label_2</text:span><text:span text:style-name="T68">.</text:span><text:span text:style-name="T63">config(text</text:span><text:span text:style-name="T68">=</text:span><text:span text:style-name="T70">"Podpis poprawny"</text:span><text:span text:style-name="T63">)</text:span></text:p>
            <text:p text:style-name="P75"><text:span text:style-name="T63"><text:s text:c="12"/></text:span><text:span text:style-name="T64">else</text:span><text:span text:style-name="T63">:</text:span></text:p>
            <text:p text:style-name="P75"><text:span text:style-name="T63"><text:s text:c="16"/></text:span><text:span text:style-name="T66">self</text:span><text:span text:style-name="T68">.</text:span><text:span text:style-name="T63">busy_status_label_2</text:span><text:span text:style-name="T68">.</text:span><text:span text:style-name="T63">config(text</text:span><text:span text:style-name="T68">=</text:span><text:span text:style-name="T70">"Podpis NIEPOPRAWNY"</text:span><text:span text:style-name="T63">)</text:span></text:p>
            <text:p text:style-name="P76"/>
            <text:p text:style-name="P75"><text:span text:style-name="T63"><text:s text:c="8"/></text:span><text:span text:style-name="T64">except</text:span><text:span text:style-name="T63"> </text:span><text:span text:style-name="T71">Exception</text:span><text:span text:style-name="T63"> </text:span><text:span text:style-name="T64">as</text:span><text:span text:style-name="T63"> e:</text:span></text:p>
            <text:p text:style-name="P75"><text:span text:style-name="T63"><text:s text:c="12"/></text:span><text:span text:style-name="T66">self</text:span><text:span text:style-name="T68">.</text:span><text:span text:style-name="T63">busy_status_label_2</text:span><text:span text:style-name="T68">.</text:span><text:span text:style-name="T63">config(text</text:span><text:span text:style-name="T68">=</text:span><text:span text:style-name="T70">f"Błąd: </text:span><text:span text:style-name="T79">{</text:span><text:span text:style-name="T63">e</text:span><text:span text:style-name="T79">}</text:span><text:span text:style-name="T70">"</text:span><text:span text:style-name="T63">)</text:span></text:p>
          </table:table-cell>
        </table:table-row>
      </table:table>
      <text:p text:style-name="P105"><text:span text:style-name="Domyślna_20_czcionka_20_akapitu"><text:span text:style-name="T62"/></text:span></text:p>
      <text:p text:style-name="P106"><text:soft-page-break/><text:span text:style-name="Domyślna_20_czcionka_20_akapitu"><text:span text:style-name="T73">Listing </text:span></text:span><text:span text:style-name="Domyślna_20_czcionka_20_akapitu"><text:span text:style-name="T102">7</text:span></text:span><text:span text:style-name="Domyślna_20_czcionka_20_akapitu"><text:span text:style-name="T73">. </text:span></text:span><text:span text:style-name="Domyślna_20_czcionka_20_akapitu"><text:span text:style-name="T81">Metody </text:span></text:span><text:span text:style-name="Domyślna_20_czcionka_20_akapitu"><text:span text:style-name="T104">v</text:span></text:span><text:span text:style-name="Domyślna_20_czcionka_20_akapitu"><text:span text:style-name="T81">erify_signature() </text:span></text:span><text:span text:style-name="Domyślna_20_czcionka_20_akapitu"><text:span text:style-name="T104">i sign_file().</text:span></text:span></text:p>
      <table:table table:name="Table10" table:style-name="Table10">
        <table:table-column table:style-name="Table10.A"/>
        <table:table-row>
          <table:table-cell table:style-name="Table10.A1" office:value-type="string">
            <text:p text:style-name="P75"><text:span text:style-name="T63">def sign_file(file_path, private_k</text:span><text:span text:style-name="T69">ey</text:span><text:span text:style-name="T63">_pat</text:span><text:span text:style-name="T64">h, o</text:span><text:span text:style-name="T63">u</text:span><text:span text:style-name="T66">tput</text:span><text:span text:style-name="T63">_signature_path):</text:span></text:p>
            <text:p text:style-name="P75"><text:span text:style-name="T70"><text:s text:c="2"/></text:span><text:span text:style-name="T63"><text:s text:c="2"/></text:span><text:span text:style-name="T64">wi</text:span><text:span text:style-name="T63">th </text:span><text:span text:style-name="T69">o</text:span><text:span text:style-name="T63">pen(private_key_path</text:span><text:span text:style-name="T68">,</text:span><text:span text:style-name="T63"> "rb") as f:</text:span></text:p>
            <text:p text:style-name="P75"><text:span text:style-name="T68"><text:s/></text:span><text:span text:style-name="T63"><text:s text:c="7"/>private_key = </text:span><text:span text:style-name="T69">s</text:span><text:span text:style-name="T63">erialization.</text:span><text:span text:style-name="T68">l</text:span><text:span text:style-name="T63">oad_pem</text:span><text:span text:style-name="T69">_</text:span><text:span text:style-name="T63">private_key(f.read(),</text:span><text:span text:style-name="T66"> p</text:span><text:span text:style-name="T63">assword=None</text:span><text:span text:style-name="T70"></text:span><text:span text:style-name="T63">)</text:span><text:span text:style-name="T69"></text:span></text:p>
            <text:p text:style-name="P99"></text:p>
            <text:p text:style-name="P75"><text:span text:style-name="T63"><text:s text:c="4"/>with o</text:span><text:span text:style-name="T68">p</text:span><text:span text:style-name="T63">en</text:span><text:span text:style-name="T68">(</text:span><text:span text:style-name="T63">file_p</text:span><text:span text:style-name="T69">at</text:span><text:span text:style-name="T63">h, "rb") as f:</text:span><text:span text:style-name="T68"></text:span></text:p>
            <text:p text:style-name="P75"><text:span text:style-name="T63"><text:s text:c="8"/>dat</text:span><text:span text:style-name="T68">a</text:span><text:span text:style-name="T63"> = f.</text:span><text:span text:style-name="T69">r</text:span><text:span text:style-name="T63">ead()</text:span></text:p>
            <text:p text:style-name="P99"><text:span text:style-name="T99"/></text:p>
            <text:p text:style-name="P75"><text:span text:style-name="T63"><text:s text:c="4"/></text:span><text:span text:style-name="T69">s</text:span><text:span text:style-name="T63">ignature = priv</text:span><text:span text:style-name="T68">a</text:span><text:span text:style-name="T63">te_k</text:span><text:span text:style-name="T69">e</text:span><text:span text:style-name="T63">y.sign(</text:span></text:p>
            <text:p text:style-name="P75"><text:span text:style-name="T63"><text:s text:c="6"/></text:span><text:span text:style-name="T68"><text:s/></text:span><text:span text:style-name="T63"><text:s/>data,</text:span></text:p>
            <text:p text:style-name="P75"><text:span text:style-name="T63"><text:s text:c="8"/>pad</text:span><text:span text:style-name="T68">d</text:span><text:span text:style-name="T63">ing.PSS(mgf=padding.</text:span><text:span text:style-name="T68">M</text:span><text:span text:style-name="T63">GF1(has</text:span><text:span text:style-name="T68">h</text:span><text:span text:style-name="T63">es.</text:span><text:span text:style-name="T68">S</text:span><text:span text:style-name="T63">HA256()),salt_length=p</text:span><text:span text:style-name="T68">a</text:span><text:span text:style-name="T63">dding.PS</text:span><text:span text:style-name="T69">S</text:span><text:span text:style-name="T63">.MAX_</text:span><text:span text:style-name="T69">LE</text:span><text:span text:style-name="T63">NGTH</text:span><text:span text:style-name="T64"></text:span><text:span text:style-name="T63">),hashes.SHA2</text:span><text:span text:style-name="T70">56()</text:span><text:span text:style-name="T63">)</text:span><text:span text:style-name="T69"></text:span></text:p>
            <text:p text:style-name="P99"></text:p>
            <text:p text:style-name="P75"><text:span text:style-name="T63"><text:s text:c="4"/>wi</text:span><text:span text:style-name="T68">t</text:span><text:span text:style-name="T63">h open(output_si</text:span><text:span text:style-name="T69">gna</text:span><text:span text:style-name="T64">tur</text:span><text:span text:style-name="T63">e</text:span><text:span text:style-name="T65">_path, "wb") as </text:span><text:span text:style-name="T63">f:</text:span></text:p>
            <text:p text:style-name="P75"><text:span text:style-name="T63"><text:s text:c="8"/>f.write(signature)</text:span></text:p>
            <text:p text:style-name="P99">def verif<text:span text:style-name="T69">y_</text:span>sign<text:span text:style-name="T64">atur</text:span>e<text:span text:style-name="T66">(fil</text:span>e_path, public_key<text:span text:style-name="T70">_pat</text:span>h,<text:span text:style-name="T64"> s</text:span>ign<text:span text:style-name="T69">a</text:span>ture_path):</text:p>
            <text:p text:style-name="P99"> <text:s text:c="3"/><text:span text:style-name="T68">w</text:span>ith open(publi<text:span text:style-name="T68">c</text:span>_key_path, "rb") as f<text:span text:style-name="T68">:</text:span></text:p>
            <text:p text:style-name="P75"><text:span text:style-name="T63"><text:s text:c="5"/></text:span><text:span text:style-name="T69"><text:s text:c="2"/></text:span><text:span text:style-name="T63"><text:s/>pub</text:span><text:span text:style-name="T64">lic_</text:span><text:span text:style-name="T63">k</text:span><text:span text:style-name="T66">ey =</text:span><text:span text:style-name="T63"> serializati</text:span><text:span text:style-name="T70">on.l</text:span><text:span text:style-name="T63">oa</text:span><text:span text:style-name="T64">d_</text:span><text:span text:style-name="T63">pem</text:span><text:span text:style-name="T69">_</text:span><text:span text:style-name="T63">public_key(f.</text:span><text:span text:style-name="T68">r</text:span><text:span text:style-name="T63">ea</text:span><text:span text:style-name="T68">d</text:span><text:span text:style-name="T63">())</text:span></text:p>
            <text:p text:style-name="P99"><text:span text:style-name="T105"/></text:p>
            <text:p text:style-name="P75"><text:span text:style-name="T69"><text:s/></text:span><text:span text:style-name="T63"><text:s text:c="3"/>w</text:span><text:span text:style-name="T64">ith </text:span><text:span text:style-name="T63">o</text:span><text:span text:style-name="T66">pen(</text:span><text:span text:style-name="T63">file_path, "rb") </text:span><text:span text:style-name="T70">as f</text:span><text:span text:style-name="T63">:</text:span></text:p>
            <text:p text:style-name="P75"><text:span text:style-name="T64"><text:s/></text:span><text:span text:style-name="T63"><text:s text:c="3"/></text:span><text:span text:style-name="T69"><text:s/></text:span><text:span text:style-name="T63"><text:s text:c="3"/>data = f.read()</text:span><text:span text:style-name="T68"></text:span></text:p>
            <text:p text:style-name="P99"><text:span text:style-name="T76"/></text:p>
            <text:p text:style-name="P75"><text:span text:style-name="T63"><text:s text:c="4"/>wi</text:span><text:span text:style-name="T69">th</text:span><text:span text:style-name="T63"> ope</text:span><text:span text:style-name="T64">n(s</text:span><text:span text:style-name="T63">i</text:span><text:span text:style-name="T69">g</text:span><text:span text:style-name="T63">nature_path, "rb")</text:span><text:span text:style-name="T68"> </text:span><text:span text:style-name="T63">as f:</text:span></text:p>
            <text:p text:style-name="P75"><text:span text:style-name="T69"><text:s/></text:span><text:span text:style-name="T63"><text:s text:c="7"/>signature = f.r</text:span><text:span text:style-name="T69">e</text:span><text:span text:style-name="T63">ad()</text:span></text:p>
            <text:p text:style-name="P99"></text:p>
            <text:p text:style-name="P75"><text:span text:style-name="T63"><text:s text:c="4"/>try:</text:span><text:span text:style-name="T105"/></text:p>
            <text:p text:style-name="P107"><text:span text:style-name="T63"><text:s text:c="8"/>public_key.</text:span><text:span text:style-name="T68">v</text:span><text:span text:style-name="T63">erif</text:span><text:span text:style-name="T69">y</text:span><text:span text:style-name="T63">(sign</text:span><text:span text:style-name="T68">a</text:span><text:span text:style-name="T63">ture,</text:span><text:span text:style-name="T68">d</text:span><text:span text:style-name="T63">ata,padding.PSS(mg</text:span><text:span text:style-name="T68">f</text:span><text:span text:style-name="T63">=padding.M</text:span><text:span text:style-name="T69">G</text:span><text:span text:style-name="T63">F1(hashes.SHA2</text:span><text:span text:style-name="T69">5</text:span><text:span text:style-name="T63">6()),</text:span></text:p>
            <text:p text:style-name="P107"><text:span text:style-name="T63"><text:s text:c="11"/></text:span><text:span text:style-name="T68"><text:s/></text:span><text:span text:style-name="T63">salt</text:span><text:span text:style-name="T69">_</text:span><text:span text:style-name="T63">length=pa</text:span><text:span text:style-name="T69">dd</text:span><text:span text:style-name="T63">ing.PSS.</text:span><text:span text:style-name="T64">MAX_LE</text:span><text:span text:style-name="T63">N</text:span><text:span text:style-name="T64">GTH</text:span><text:span text:style-name="T63">),h</text:span><text:span text:style-name="T69">a</text:span><text:span text:style-name="T63">shes.SHA</text:span><text:span text:style-name="T64">256()</text:span>)</text:p>
            <text:p text:style-name="P75"><text:s text:c="8"/>return True</text:p>
            <text:p text:style-name="P75"></text:p>
            <text:p text:style-name="P75"><text:s text:c="4"/>except InvalidSignature:</text:p>
            <text:p text:style-name="P75"><text:s text:c="8"/>return False</text:p>
          </table:table-cell>
        </table:table-row>
      </table:table>
      <text:h text:style-name="Nagłówek_20_3" text:outline-level="3"/>
      <text:h text:style-name="Nagłówek_20_3" text:outline-level="3"><text:bookmark-start text:name="__RefHeading___Toc6709_3721631286"/><text:span text:style-name="T44">5.2.5. </text:span>Moduł generowania kluczy<text:bookmark-end text:name="__RefHeading___Toc6709_3721631286"/></text:h>
      <text:p text:style-name="P7"><text:tab/>Moduł generowania kluczy odpowiada za tworzenie par kluczy RSA, które są następnie wykorzystywane w pozostałych częściach aplikacji. Klucz publiczny może być używany do szyfrowania klucza AE<text:span text:style-name="T106">S</text:span> oraz do weryfikacji podpisu cyfrowego. Klucz prywatny służy natomiast do odszyfrowywania klucza AES oraz tworzenia podpisów cyfrowych.</text:p>
      <text:p text:style-name="P7"><text:tab/>Interfejs modułu generowania kluczy został zaimplementowany w pliku <text:span text:style-name="T25">keys.py</text:span> jako klasa <text:span text:style-name="T25">KeysFrame</text:span>, dziedzicząca z klasy bazowej <text:span text:style-name="T25">tk.Frame</text:span>. Odpowiada ona za utworzenie elementów graficznych widocznych w zakładce Keys, takich jak lista wyboru rozmiaru klucza, przyciski wskazania lokalizacji oraz przycisk uruchamiający proces generowania kluczy. Struktura ekranu modułu przedstawiona została na poniższym rysunku <text:span text:style-name="T107">(Rys. 5)</text:span><text:span text:style-name="T106">.</text:span></text:p>
      <text:p text:style-name="P108"><text:tab/>Użytkownik wybiera rozmiar klucza <text:span text:style-name="T25">RSA</text:span> z dostępnej listy, wskazuje lokalizację zapisu pliku klucza prywatnego oraz pliku klucza publicznego. W prezentowanym module dostępny jest m.in. <text:span text:style-name="T108">1024 i 2048 bitowy </text:span>rozmiar klucza, jednak konstrukcja interfejsu pozwala na rozszerzenie listy o kolejne wartośc<text:span text:style-name="T108">i.</text:span></text:p>
      <text:p text:style-name="P108"><text:tab/>Po kliknięciu przycisku Generuj klucze uruchamiana jest metoda <text:span text:style-name="T25">generate_keys(</text:span>) <text:span text:style-name="T109">(Listing 8.)</text:span>, która w sprawdza, czy użytkownik wskazał lokalizacje obu plików wyjściowych. Jeżeli nie wybrano pliku klucza prywatnego lub publicznego, w polu statusu wyświetlany jest <text:span text:style-name="T110">stosowny </text:span>komunikat.</text:p>
      <text:p text:style-name="P109"><text:span text:style-name="Strong_20_Emphasis"><text:span text:style-name="T38">Rys. </text:span></text:span><text:span text:style-name="Strong_20_Emphasis"><text:span text:style-name="T111">5.</text:span></text:span><text:span text:style-name="Strong_20_Emphasis"><text:span text:style-name="T38"> </text:span></text:span><text:span text:style-name="Strong_20_Emphasis"><text:span text:style-name="T51">Okno modułu </text:span></text:span><text:span text:style-name="Strong_20_Emphasis"><text:span text:style-name="T111">zarządzania kluczami</text:span></text:span><text:span text:style-name="Strong_20_Emphasis"><text:span text:style-name="T112">.</text:span></text:span></text:p>
      <text:p text:style-name="P7"><text:tab/>Właściwe generowanie kluczy realizowane jest przez funkcję <text:span text:style-name="T25">generate_keys() </text:span><text:span text:style-name="T109">(Listing 9.)</text:span> znajdującą się w module <text:span text:style-name="T25">rsa_signature.py</text:span>. Funkcja ta wykorzystuje metodę <text:span text:style-name="T25">rsa.generate_private_key()</text:span> z biblioteki <text:span text:style-name="T25">cryptography</text:span>, przyjmując wykładnik publiczny <text:span text:style-name="T25">65537</text:span> oraz rozmiar klucza wybrany przez użytkownika. <text:span text:style-name="T110">Kolejno</text:span> na podstawie wygenerowanego klucza prywatnego tworzony jest odpowiadający mu klucz publiczny.</text:p>
      <text:p text:style-name="P7">Wynikiem działania modułu są dwa pliki:</text:p>
      <text:list text:style-name="L31">
        <text:list-item>
          <text:p text:style-name="P110">plik klucza prywatnego RSA – <text:span text:style-name="T113">zapisany</text:span> jest w formacie <text:span text:style-name="T25">PKCS8</text:span>,</text:p>
        </text:list-item>
        <text:list-item>
          <text:p text:style-name="P110">plik klucza publicznego RSA – <text:span text:style-name="T113">zapisany </text:span>w formacie <text:span text:style-name="T25">SubjectPublicKeyInfo</text:span>.</text:p>
        </text:list-item>
      </text:list>
      <text:p text:style-name="P111"><text:span text:style-name="Domyślna_20_czcionka_20_akapitu"><text:span text:style-name="T73">Listing </text:span></text:span><text:span text:style-name="Domyślna_20_czcionka_20_akapitu"><text:span text:style-name="T114">8</text:span></text:span><text:span text:style-name="Domyślna_20_czcionka_20_akapitu"><text:span text:style-name="T73">. </text:span></text:span><text:span text:style-name="Domyślna_20_czcionka_20_akapitu"><text:span text:style-name="T81">Metod</text:span></text:span><text:span text:style-name="Domyślna_20_czcionka_20_akapitu"><text:span text:style-name="T114">a generate_ketys()</text:span></text:span><text:span text:style-name="Domyślna_20_czcionka_20_akapitu"><text:span text:style-name="T104">.</text:span></text:span></text:p>
      <table:table table:name="Table11" table:style-name="Table11">
        <table:table-column table:style-name="Table11.A"/>
        <table:table-row>
          <table:table-cell table:style-name="Table11.A1" office:value-type="string">
            <text:p text:style-name="P112"><text:span text:style-name="T63"><text:s text:c="4"/></text:span><text:span text:style-name="T64">def</text:span><text:span text:style-name="T63"> </text:span><text:span text:style-name="T65">generate_keys</text:span><text:span text:style-name="T63">(</text:span><text:span text:style-name="T66">self</text:span><text:span text:style-name="T63">):</text:span></text:p>
            <text:p text:style-name="P112"><text:span text:style-name="T63"><text:s text:c="8"/></text:span><text:span text:style-name="T64">try</text:span><text:span text:style-name="T63">:</text:span></text:p>
            <text:p text:style-name="P112"><text:span text:style-name="T63"><text:s text:c="12"/></text:span><text:span text:style-name="T64">if</text:span><text:span text:style-name="T63"> </text:span><text:span text:style-name="T67">not</text:span><text:span text:style-name="T63"> </text:span><text:span text:style-name="T66">self</text:span><text:span text:style-name="T68">.</text:span><text:span text:style-name="T63">output_private_key_file </text:span><text:span text:style-name="T67">or</text:span><text:span text:style-name="T63"> </text:span><text:span text:style-name="T67">not</text:span><text:span text:style-name="T63"> </text:span><text:span text:style-name="T66">self</text:span><text:span text:style-name="T68">.</text:span><text:span text:style-name="T63">output_public_key_file:</text:span></text:p>
            <text:p text:style-name="P112"><text:span text:style-name="T63"><text:s text:c="16"/></text:span><text:span text:style-name="T66">self</text:span><text:span text:style-name="T68">.</text:span><text:span text:style-name="T63">busy_status_label</text:span><text:span text:style-name="T68">.</text:span><text:span text:style-name="T63">config(text</text:span><text:span text:style-name="T68">=</text:span><text:span text:style-name="T70">"Wybierz pliki wyjściowe"</text:span><text:span text:style-name="T63">)</text:span></text:p>
            <text:p text:style-name="P112"><text:span text:style-name="T63"><text:s text:c="16"/></text:span><text:span text:style-name="T64">return</text:span></text:p>
            <text:p text:style-name="P112"><text:span text:style-name="T63"><text:s text:c="12"/>key_size </text:span><text:span text:style-name="T68">=</text:span><text:span text:style-name="T63"> </text:span><text:span text:style-name="T66">int</text:span><text:span text:style-name="T63">(</text:span><text:span text:style-name="T66">self</text:span><text:span text:style-name="T68">.</text:span><text:span text:style-name="T63">selected_key_size</text:span><text:span text:style-name="T68">.</text:span><text:span text:style-name="T63">get())</text:span></text:p>
            <text:p text:style-name="P112"><text:span text:style-name="T63"><text:s text:c="12"/>generate_keys(</text:span><text:span text:style-name="T66">self</text:span><text:span text:style-name="T68">.</text:span><text:span text:style-name="T63">output_private_key_file, </text:span><text:span text:style-name="T66">self</text:span><text:span text:style-name="T68">.</text:span><text:span text:style-name="T63">output_public_key_file, key_size)</text:span></text:p>
            <text:p text:style-name="P113"/>
            <text:p text:style-name="P112"><text:span text:style-name="T63"><text:s text:c="12"/></text:span><text:span text:style-name="T66">self</text:span><text:span text:style-name="T68">.</text:span><text:span text:style-name="T63">busy_status_label</text:span><text:span text:style-name="T68">.</text:span><text:span text:style-name="T63">config(text</text:span><text:span text:style-name="T68">=</text:span><text:span text:style-name="T70">"Klucze wygenerowane"</text:span><text:span text:style-name="T63">)</text:span></text:p>
            <text:p text:style-name="P113"/>
            <text:p text:style-name="P112"><text:span text:style-name="T63"><text:s text:c="8"/></text:span><text:span text:style-name="T64">except</text:span><text:span text:style-name="T63"> </text:span><text:span text:style-name="T71">Exception</text:span><text:span text:style-name="T63"> </text:span><text:span text:style-name="T64">as</text:span><text:span text:style-name="T63"> e:</text:span></text:p>
            <text:p text:style-name="P112"><text:span text:style-name="T63"><text:s text:c="12"/></text:span><text:span text:style-name="T66">self</text:span><text:span text:style-name="T68">.</text:span><text:span text:style-name="T63">busy_status_label</text:span><text:span text:style-name="T68">.</text:span><text:span text:style-name="T63">config(text</text:span><text:span text:style-name="T68">=</text:span><text:span text:style-name="T70">f"Błąd: </text:span><text:span text:style-name="T79">{</text:span><text:span text:style-name="T63">e</text:span><text:span text:style-name="T79">}</text:span><text:span text:style-name="T70">"</text:span><text:span text:style-name="T63">)</text:span></text:p>
          </table:table-cell>
        </table:table-row>
      </table:table>
      <text:p text:style-name="P111"><text:span text:style-name="Domyślna_20_czcionka_20_akapitu"><text:span text:style-name="T104"/></text:span></text:p>
      <text:p text:style-name="P111"><text:span text:style-name="Domyślna_20_czcionka_20_akapitu"><text:span text:style-name="T73"/></text:span></text:p>
      <text:p text:style-name="P114"><text:span text:style-name="Domyślna_20_czcionka_20_akapitu"><text:span text:style-name="T73">Listing </text:span></text:span><text:span text:style-name="Domyślna_20_czcionka_20_akapitu"><text:span text:style-name="T114">9</text:span></text:span><text:span text:style-name="Domyślna_20_czcionka_20_akapitu"><text:span text:style-name="T73">. </text:span></text:span><text:span text:style-name="Domyślna_20_czcionka_20_akapitu"><text:span text:style-name="T81">Metod</text:span></text:span><text:span text:style-name="Domyślna_20_czcionka_20_akapitu"><text:span text:style-name="T61">a generate_ketys() </text:span></text:span><text:span text:style-name="Domyślna_20_czcionka_20_akapitu"><text:span text:style-name="T114">modułu rsa_signature.py</text:span></text:span><text:span text:style-name="Domyślna_20_czcionka_20_akapitu"><text:span text:style-name="T104">.</text:span></text:span></text:p>
      <table:table table:name="Table12" table:style-name="Table12">
        <table:table-column table:style-name="Table12.A"/>
        <table:table-row>
          <table:table-cell table:style-name="Table12.A1" office:value-type="string">
            <text:p text:style-name="P112"><text:span text:style-name="T64">def</text:span><text:span text:style-name="T63"> </text:span><text:span text:style-name="T65">generate_keys</text:span><text:span text:style-name="T63">(private_key_path, public_key_path, key_size</text:span><text:span text:style-name="T68">=2048</text:span><text:span text:style-name="T63">):</text:span><text:span text:style-name="T69"></text:span></text:p>
            <text:p text:style-name="P115"></text:p>
            <text:p text:style-name="P112"><text:span text:style-name="T63"><text:s text:c="4"/>private_ke</text:span><text:span text:style-name="T68">y</text:span><text:span text:style-name="T63"> = r</text:span><text:span text:style-name="T68">s</text:span><text:span text:style-name="T63">a.generate_private_ke</text:span><text:span text:style-name="T69">y</text:span><text:span text:style-name="T63">(</text:span></text:p>
            <text:p text:style-name="P112"><text:span text:style-name="T63"><text:s text:c="8"/>public_expon</text:span><text:span text:style-name="T68">ent=65</text:span><text:span text:style-name="T63">5</text:span><text:span text:style-name="T69">3</text:span><text:span text:style-name="T63">7,</text:span></text:p>
            <text:p text:style-name="P112"><text:span text:style-name="T63"><text:s text:c="8"/>key_</text:span><text:span text:style-name="T68">s</text:span><text:span text:style-name="T63">ize=key_</text:span><text:span text:style-name="T69">s</text:span><text:span text:style-name="T63">ize</text:span></text:p>
            <text:p text:style-name="P112"><text:span text:style-name="T69"><text:s text:c="2"/></text:span><text:span text:style-name="T63"><text:s text:c="2"/>)</text:span></text:p>
            <text:p text:style-name="P115"></text:p>
            <text:p text:style-name="P112"><text:span text:style-name="T63"><text:s text:c="4"/>publ</text:span><text:span text:style-name="T68">i</text:span><text:span text:style-name="T63">c_key = priv</text:span><text:span text:style-name="T68">a</text:span><text:span text:style-name="T63">te_key.publi</text:span><text:span text:style-name="T69">c_</text:span><text:span text:style-name="T63">key(</text:span><text:span text:style-name="T64">)</text:span></text:p>
            <text:p text:style-name="P116"><text:span text:style-name="T99"/></text:p>
            <text:p text:style-name="P112"><text:span text:style-name="T66"><text:s text:c="4"/></text:span><text:span text:style-name="T63">with open(private_k</text:span><text:span text:style-name="T70">ey_p</text:span><text:span text:style-name="T63">at</text:span><text:span text:style-name="T64">h,</text:span><text:span text:style-name="T63"> "w</text:span><text:span text:style-name="T69">b</text:span><text:span text:style-name="T63">") as f:</text:span></text:p>
            <text:p text:style-name="P112"><text:span text:style-name="T63"><text:s text:c="6"/></text:span><text:span text:style-name="T69"><text:s/></text:span><text:span text:style-name="T63"><text:s/>f.write(</text:span></text:p>
            <text:p text:style-name="P112"><text:span text:style-name="T63"><text:s text:c="12"/></text:span><text:span text:style-name="T68">p</text:span><text:span text:style-name="T63">rivate_key.pri</text:span><text:span text:style-name="T69">v</text:span><text:span text:style-name="T63">ate_bytes(</text:span></text:p>
            <text:p text:style-name="P112"><text:span text:style-name="T63"><text:s text:c="12"/></text:span><text:span text:style-name="T68"><text:s/></text:span><text:span text:style-name="T63"><text:s text:c="3"/>encoding=s</text:span><text:span text:style-name="T68">e</text:span><text:span text:style-name="T63">rializat</text:span><text:span text:style-name="T68">i</text:span><text:span text:style-name="T63">on.E</text:span><text:span text:style-name="T69">n</text:span><text:span text:style-name="T63">coding.PEM,</text:span></text:p>
            <text:p text:style-name="P112"><text:span text:style-name="T63"><text:s text:c="3"/></text:span><text:span text:style-name="T66"><text:s text:c="6"/></text:span><text:span text:style-name="T68"><text:s/></text:span><text:span text:style-name="T63"><text:s text:c="6"/>format=</text:span><text:span text:style-name="T68">s</text:span><text:span text:style-name="T63">erialization.</text:span><text:span text:style-name="T68">P</text:span><text:span text:style-name="T63">rivate</text:span><text:span text:style-name="T69">F</text:span><text:span text:style-name="T63">ormat.PKCS8,</text:span></text:p>
            <text:p text:style-name="P112"><text:span text:style-name="T63"><text:s text:c="16"/>encryp</text:span><text:span text:style-name="T68">t</text:span><text:span text:style-name="T63">ion_algorithm</text:span><text:span text:style-name="T68">=</text:span><text:span text:style-name="T63">serialization.</text:span><text:span text:style-name="T69">N</text:span><text:span text:style-name="T63">oEncryption()</text:span><text:span text:style-name="T69"></text:span></text:p>
            <text:p text:style-name="P112"><text:span text:style-name="T63"><text:s text:c="8"/></text:span><text:span text:style-name="T69"><text:s text:c="2"/></text:span><text:span text:style-name="T63"><text:s text:c="2"/>)</text:span></text:p>
            <text:p text:style-name="P112"><text:span text:style-name="T64"><text:s text:c="3"/></text:span><text:span text:style-name="T63"><text:s/></text:span><text:span text:style-name="T66"><text:s text:c="4"/></text:span><text:span text:style-name="T63">)</text:span></text:p>
            <text:p text:style-name="P115"></text:p>
            <text:p text:style-name="P112"><text:span text:style-name="T63"><text:s text:c="4"/>with open</text:span><text:span text:style-name="T70">(pub</text:span><text:span text:style-name="T63">li</text:span><text:span text:style-name="T64">c_</text:span><text:span text:style-name="T63">key</text:span><text:span text:style-name="T69">_</text:span><text:span text:style-name="T63">path, "wb</text:span><text:span text:style-name="T68">"</text:span><text:span text:style-name="T63">) as f</text:span><text:span text:style-name="T69">:</text:span><text:span text:style-name="T63"></text:span></text:p>
            <text:p text:style-name="P112"><text:span text:style-name="T63"><text:s text:c="8"/>f.write(</text:span></text:p>
            <text:p text:style-name="P112"><text:span text:style-name="T63"><text:s text:c="2"/></text:span><text:span text:style-name="T68"><text:s/></text:span><text:span text:style-name="T63"><text:s text:c="9"/>publ</text:span><text:span text:style-name="T69">i</text:span><text:span text:style-name="T63">c_key.public_bytes(</text:span></text:p>
            <text:p text:style-name="P112"><text:span text:style-name="T63"><text:s text:c="3"/></text:span><text:span text:style-name="T68"><text:s/></text:span><text:span text:style-name="T63"><text:s text:c="12"/>e</text:span><text:span text:style-name="T68">n</text:span><text:span text:style-name="T63">coding=s</text:span><text:span text:style-name="T68">e</text:span><text:span text:style-name="T63">rial</text:span><text:span text:style-name="T69">i</text:span><text:span text:style-name="T63">zation.Encoding.</text:span><text:span text:style-name="T66">PEM,</text:span></text:p>
            <text:p text:style-name="P112"><text:span text:style-name="T68"><text:s/></text:span><text:span text:style-name="T63"><text:s text:c="13"/></text:span><text:span text:style-name="T68"><text:s/></text:span><text:span text:style-name="T63"><text:s/>format=seri</text:span><text:span text:style-name="T68">a</text:span><text:span text:style-name="T63">lization.PublicForma</text:span><text:span text:style-name="T69">t</text:span><text:span text:style-name="T63">.SubjectPubli</text:span><text:span text:style-name="T69">c</text:span><text:span text:style-name="T63">KeyInfo</text:span></text:p>
            <text:p text:style-name="P112"><text:s text:c="12"/>)</text:p>
            <text:p text:style-name="P112"><text:s text:c="8"/>)</text:p>
          </table:table-cell>
        </table:table-row>
      </table:table>
      <text:p text:style-name="P111"><text:span text:style-name="Domyślna_20_czcionka_20_akapitu"><text:span text:style-name="T104"/></text:span></text:p>
      <text:p text:style-name="P117"/>
      <text:h text:style-name="P118" text:outline-level="1"><text:span text:style-name="Strong_20_Emphasis"/></text:h>
      <text:h text:style-name="P13" text:outline-level="1"><text:bookmark-start text:name="__RefHeading___Toc12128_3356077753"/><text:span text:style-name="Strong_20_Emphasis">6.<text:tab/>Diagram przepływu danych (szyfrowanie/odszyfrowanie itp.)</text:span><text:bookmark-end text:name="__RefHeading___Toc12128_3356077753"/></text:h>
      <text:h text:style-name="Nagłówek_20_1" text:outline-level="1"><text:bookmark-start text:name="__RefHeading___Toc7243_1429308687"/><text:span text:style-name="Strong_20_Emphasis">7.<text:tab/>Bezpieczeństwo systemu i możliwe zagrożenia </text:span><text:span text:style-name="Strong_20_Emphasis"><text:span text:style-name="T115">(w odniesieniu do tematu projektu)</text:span></text:span><text:bookmark-end text:name="__RefHeading___Toc7243_1429308687"/></text:h>
      <text:h text:style-name="Nagłówek_20_1" text:outline-level="1"><text:bookmark-start text:name="__RefHeading___Toc7245_1429308687"/><text:span text:style-name="Strong_20_Emphasis">8. <text:tab/>Implementacja systemu </text:span><text:span text:style-name="Strong_20_Emphasis"><text:span text:style-name="T116">(teoretyczna, </text:span></text:span><text:span text:style-name="Strong_20_Emphasis"><text:span text:style-name="T117">jak zaimplenetować w organizajci czy cuś???</text:span></text:span><text:span text:style-name="Strong_20_Emphasis"><text:span text:style-name="T116">)</text:span></text:span><text:bookmark-end text:name="__RefHeading___Toc7245_1429308687"/></text:h>
      <text:h text:style-name="Nagłówek_20_1" text:outline-level="1"><text:bookmark-start text:name="__RefHeading___Toc7245_1429308687_kopia_"/><text:span text:style-name="Strong_20_Emphasis">9. <text:tab/>Przykład użycia / testowanie systemu</text:span><text:bookmark-end text:name="__RefHeading___Toc7245_1429308687_kopia_"/></text:h>
      <text:h text:style-name="Nagłówek_20_1" text:outline-level="1"><text:bookmark-start text:name="__RefHeading___Toc3006_1804544189"/><text:span text:style-name="Strong_20_Emphasis"><text:span text:style-name="T118">10</text:span></text:span><text:span text:style-name="Strong_20_Emphasis">.<text:tab/>Podsumowanie i wnioski</text:span><text:bookmark-end text:name="__RefHeading___Toc3006_1804544189"/></text:h>
      <text:p text:style-name="P119"><text:span text:style-name="Strong_20_Emphasis">czy cele osiągnięte</text:span></text:p>
      <text:h text:style-name="P13" text:outline-level="1"><text:bookmark-start text:name="__RefHeading___Toc12132_3356077753_Copy_"/><text:span text:style-name="Strong_20_Emphasis">14.<text:tab/>Załączniki</text:span><text:bookmark-end text:name="__RefHeading___Toc12132_3356077753_Copy_"/></text:h>
      <text:p text:style-name="Text_20_body"><text:span text:style-name="Strong_20_Emphasis"><text:span text:style-name="T63">repo github ew. listingi</text:span></text:span></text:p>
      <text:p text:style-name="P120"><text:span text:style-name="Domyślna_20_czcionka_20_akapitu"><text:span text:style-name="T119">Tabela 1. PLACEHOLDER</text:span></text:span></text:p>
      <table:table table:name="Table1" table:style-name="Table1">
        <table:table-column table:style-name="Table1.A"/>
        <table:table-column table:style-name="Table1.B" table:number-columns-repeated="2"/>
        <table:table-row>
          <table:table-cell table:style-name="Table1.A1" office:value-type="string">
            <text:p text:style-name="P121">PLACEHOLDER</text:p>
          </table:table-cell>
          <table:table-cell table:style-name="Table1.A1" office:value-type="string">
            <text:p text:style-name="P121">PLACEHOLDER</text:p>
          </table:table-cell>
          <table:table-cell table:style-name="Table1.C1" office:value-type="string">
            <text:p text:style-name="P121">PLACEHOLDER</text:p>
          </table:table-cell>
        </table:table-row>
        <table:table-row>
          <table:table-cell table:style-name="Table1.A2" office:value-type="string">
            <text:p text:style-name="P121">PLACEHOLDER</text:p>
          </table:table-cell>
          <table:table-cell table:style-name="Table1.A2" office:value-type="string">
            <text:p text:style-name="P121">PLACEHOLDER</text:p>
          </table:table-cell>
          <table:table-cell table:style-name="Table1.C2" office:value-type="string">
            <text:p text:style-name="P121">PLACEHOLDER</text:p>
          </table:table-cell>
        </table:table-row>
      </table:table>
      <text:p text:style-name="P121"/>
      <text:p text:style-name="Text_20_body"><draw:frame draw:style-name="fr2" draw:name="Image7" text:anchor-type="paragraph" svg:x="6.463cm" svg:y="0.157cm" svg:width="3.6cm" style:rel-width="scale" svg:height="5.271cm" style:rel-height="scale" draw:z-index="1"><draw:image xlink:href="Pictures/100000010000009A000000E29439C70F.png" xlink:type="simple" xlink:show="embed" xlink:actuate="onLoad" draw:mime-type="image/png"/></draw:frame><text:tab/></text:p>
      <text:p text:style-name="Text_20_body"/>
      <text:p text:style-name="P102"/>
      <text:p text:style-name="P102"/>
      <text:p text:style-name="P102"/>
      <text:p text:style-name="P102"/>
      <text:p text:style-name="P102"/>
      <text:p text:style-name="P102"/>
      <text:p text:style-name="P102"><text:span text:style-name="Strong_20_Emphasis"><text:span text:style-name="T120">Rys. 1. PLACEHOLDER</text:span></text:span></text:p>
      <text:p text:style-name="P102"><text:bookmark text:name="__RefHeading___Toc425_2443504791_Copy_1"/></text:p>
      <text:p text:style-name="Text_20_body"><text:span text:style-name="Domyślna_20_czcionka_20_akapitu"><text:span text:style-name="T119">Listing 1 PLACEHOLDER.</text:span></text:span></text:p>
      <table:table table:name="Table2" table:style-name="Table2">
        <table:table-column table:style-name="Table2.A"/>
        <table:table-row>
          <table:table-cell table:style-name="Table2.A1" office:value-type="string">
            <text:p text:style-name="P122"><text:span text:style-name="Domyślna_20_czcionka_20_akapitu"><text:span text:style-name="T121">import</text:span></text:span><text:span text:style-name="Domyślna_20_czcionka_20_akapitu"><text:span text:style-name="T122"> placeholder </text:span></text:span><text:span text:style-name="Domyślna_20_czcionka_20_akapitu"><text:span text:style-name="T121">as</text:span></text:span><text:span text:style-name="Domyślna_20_czcionka_20_akapitu"><text:span text:style-name="T122"> pholder</text:span></text:span></text:p>
            <text:p text:style-name="P123"/>
          </table:table-cell>
        </table:table-row>
      </table:table>
      <text:h text:style-name="Nagłówek_20_1" text:outline-level="1"/>
      <text:h text:style-name="P13" text:outline-level="1"><text:bookmark-start text:name="__RefHeading___Toc431_2443504791"/><text:span text:style-name="Strong_20_Emphasis">14.<text:tab/></text:span><text:span text:style-name="Strong_20_Emphasis"><text:span text:style-name="T123">Bibliografia</text:span></text:span><text:bookmark-end text:name="__RefHeading___Toc431_2443504791"/></text:h>
      <text:p text:style-name="Text_20_body"><text:span text:style-name="Strong_20_Emphasis">[1] PlatformIO</text:span></text:p>
      <text:p text:style-name="Text_20_body"><text:a xlink:type="simple" xlink:href="https://platformio.org/" text:style-name="Internet_20_link" text:visited-style-name="Visited_20_Internet_20_Link"><text:span text:style-name="Strong_20_Emphasis"><text:span text:style-name="T11">https://platformio.org/</text:span></text:span></text:a></text:p>
      <text:p text:style-name="P124"><text:span text:style-name="Strong_20_Emphasis"><text:span text:style-name="T88">[</text:span></text:span><text:span text:style-name="Strong_20_Emphasis"><text:span text:style-name="T124">2</text:span></text:span><text:span text:style-name="Strong_20_Emphasis"><text:span text:style-name="T88">] </text:span></text:span><text:span text:style-name="Strong_20_Emphasis"><text:span text:style-name="T124">Wikipedia</text:span></text:span></text:p>
      <text:p text:style-name="P125">https://pl.wikipedia.org/wiki/Kryptologia</text:p>
      <text:p text:style-name="P126"/>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JetBrains Mono" svg:font-family="'JetBrains Mono'" style:font-family-generic="system" style:font-pitch="fixed"/>
    <style:font-face style:name="JetBrains Mono ExtraLight" svg:font-family="'JetBrains Mono ExtraLigh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1" style:display-name="Nagłówek 1" style:family="paragraph" style:parent-style-name="Heading" style:next-style-name="Text_20_body" style:default-outline-level="1">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agłówek_20_2" style:display-name="Nagłówek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agłówek_20_3" style:display-name="Nagłówek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agłówek_20_4" style:display-name="Nagłówek 4" style:family="paragraph" style:parent-style-name="Heading" style:next-style-name="Text_20_body" style:default-outline-level="4">
      <style:paragraph-properties fo:margin-top="0.212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5" style:display-name="Nagłówek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loext:hyphenation-keep-line="false"/>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6" style:display-name="Nagłówek 6" style:family="paragraph" style:parent-style-name="Heading" style:next-style-name="Text_20_body" style:default-outline-level="6">
      <style:paragraph-properties fo:margin-top="0.106cm" fo:margin-bottom="0.106cm" style:contextual-spacing="false" fo:hyphenation-ladder-count="no-limit" fo:hyphenation-keep="auto" loext:hyphenation-keep-type="column" loext:hyphenation-keep-line="false"/>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Nagłówek_20_7" style:display-name="Nagłówek 7" style:family="paragraph" style:parent-style-name="Heading" style:next-style-name="Text_20_body" style:default-outline-level="7">
      <style:paragraph-properties fo:margin-top="0.106cm" fo:margin-bottom="0.106cm" style:contextual-spacing="false"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agłówek_20_8" style:display-name="Nagłówek 8" style:family="paragraph" style:parent-style-name="Heading" style:next-style-name="Text_20_body" style:default-outline-level="8">
      <style:paragraph-properties fo:margin-top="0.106cm" fo:margin-bottom="0.106cm" style:contextual-spacing="false" fo:hyphenation-ladder-count="no-limit" fo:hyphenation-keep="auto" loext:hyphenation-keep-type="column" loext:hyphenation-keep-line="false"/>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Nagłówek_20_9" style:display-name="Nagłówek 9" style:family="paragraph" style:parent-style-name="Heading" style:next-style-name="Text_20_body" style:default-outline-level="9">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ny"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egenda"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Stopka"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indeksu" style:display-name="Nagłówek indeksu"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Nagłówek_20_indeksu" style:class="index">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Appendix" style:family="paragraph" style:parent-style-name="Heading" style:next-style-name="Text_20_body" style:class="chapter">
      <style:paragraph-properties fo:text-align="center" style:justify-single-word="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loext:hyphenation-keep-line="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loext:hyphenation-keep-line="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fo:hyphenation-keep="auto" loext:hyphenation-keep-type="column" loext:hyphenation-keep-line="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2cm" fo:hyphenation-ladder-count="no-limit" fo:hyphenation-keep="auto" loext:hyphenation-keep-type="column" loext:hyphenation-keep-line="false">
        <style:tab-stops>
          <style:tab-stop style:position="1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chapter">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agłówek"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de" style:family="paragraph" style:parent-style-name="Standard">
      <loext:graphic-properties draw:fill="solid" draw:fill-color="#f8f8f8" draw:opacity="100%"/>
      <style:paragraph-properties style:line-height-at-least="0.503cm" fo:hyphenation-ladder-count="no-limit" fo:hyphenation-keep="auto" loext:hyphenation-keep-type="column" loext:hyphenation-keep-line="false" fo:background-color="#f8f8f8"/>
      <style:text-properties style:font-name="JetBrains Mono" fo:font-family="'JetBrains Mono'" style:font-family-generic="system" style:font-pitch="fixed" fo:font-size="10.5pt" style:font-name-asian="JetBrains Mono" style:font-family-asian="'JetBrains Mono'" style:font-family-generic-asian="system" style:font-pitch-asian="fixed" style:font-size-asian="10.5pt" style:font-name-complex="JetBrains Mono" style:font-family-complex="'JetBrains Mono'" style:font-family-generic-complex="system" style:font-pitch-complex="fixe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Akapit_20_z_20_listą" style:display-name="Akapit z listą" style:family="paragraph">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chapter">
      <style:paragraph-properties fo:margin-top="0.247cm" fo:margin-bottom="0.212cm" style:contextual-spacing="false"/>
      <style:text-properties style:font-name="Liberation Sans1" fo:font-family="'Liberation Sans'" style:font-style-name="Bold"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wydatnieni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agłówek">
      <style:text-properties fo:font-size="6pt" style:font-size-asian="6pt" style:font-size-complex="6pt"/>
    </style:style>
    <style:style style:name="MP2" style:family="paragraph" style:parent-style-name="Stopka">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P. Torba, J.Lewandowski, Cyberbezpieczeństwo – Projekt, Szyfrowanie plików i bezpieczna wymiana kluczy</text:p>
      </style:header>
      <style:footer>
        <text:p text:style-name="MP2"><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7.3$Linux_X86_64 LibreOffice_project/580$Build-3</meta:generator>
    <meta:creation-date>2026-05-19T04:15:00Z</meta:creation-date>
    <dc:date>2026-06-06T12:22:27.688421252</dc:date>
    <meta:print-date>2026-06-05T22:31:57.232714382</meta:print-date>
    <meta:editing-cycles>692</meta:editing-cycles>
    <meta:editing-duration>PT5H30M8S</meta:editing-duration>
    <meta:printed-by>PDF files</meta:printed-by>
    <meta:document-statistic meta:table-count="12" meta:image-count="6" meta:object-count="0" meta:page-count="28" meta:paragraph-count="586" meta:word-count="4644" meta:character-count="41544" meta:non-whitespace-character-count="34803"/>
    <meta:template xlink:type="simple" xlink:actuate="onRequest" xlink:title="" xlink:href="../../../../../Pobrane/CB_PT_JL%20(1)%20(1).odt/Normal.dotm"/>
  </office:meta>
</office:document-meta>
</file>