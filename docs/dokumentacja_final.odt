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4DF000000F7EE70C626.png" manifest:media-type="image/png"/>
  <manifest:file-entry manifest:full-path="Pictures/100000010000042E000002C693DCDE50.png" manifest:media-type="image/png"/>
  <manifest:file-entry manifest:full-path="Pictures/10000001000002A7000001A7A4770449.png" manifest:media-type="image/png"/>
  <manifest:file-entry manifest:full-path="Pictures/100000010000031B0000026E1E0A3211.png" manifest:media-type="image/png"/>
  <manifest:file-entry manifest:full-path="Pictures/100000010000031B00000270B3B5B453.png" manifest:media-type="image/png"/>
  <manifest:file-entry manifest:full-path="Pictures/10000001000003180000026E4600DD65.png" manifest:media-type="image/png"/>
  <manifest:file-entry manifest:full-path="Pictures/100000010000028F000000D54CE9C8B2.png" manifest:media-type="image/png"/>
  <manifest:file-entry manifest:full-path="Pictures/100000010000077C000003A0FB7AFBA6.png" manifest:media-type="image/png"/>
  <manifest:file-entry manifest:full-path="Pictures/100000010000028E000001AC6A122E6E.png" manifest:media-type="image/png"/>
  <manifest:file-entry manifest:full-path="Pictures/10000001000003F9000002F7D78E24CC.png" manifest:media-type="image/png"/>
  <manifest:file-entry manifest:full-path="Pictures/10000001000002F7000000DE5C4F8AD7.png" manifest:media-type="image/png"/>
  <manifest:file-entry manifest:full-path="Pictures/10000001000003F9000002F7DD28357A.png" manifest:media-type="image/png"/>
  <manifest:file-entry manifest:full-path="Pictures/10000001000003F7000002F84638A3E9.png" manifest:media-type="image/png"/>
  <manifest:file-entry manifest:full-path="Pictures/10000001000004A70000019D3F59D96F.png" manifest:media-type="image/png"/>
  <manifest:file-entry manifest:full-path="Pictures/10000001000004B500000442B9723C88.png" manifest:media-type="image/png"/>
  <manifest:file-entry manifest:full-path="Pictures/10000001000007100000027669D82A71.png" manifest:media-type="image/png"/>
  <manifest:file-entry manifest:full-path="Pictures/10000001000003F9000002F7D10B757C.png" manifest:media-type="image/png"/>
  <manifest:file-entry manifest:full-path="Pictures/100000010000028E000001A633808EFB.png" manifest:media-type="image/png"/>
  <manifest:file-entry manifest:full-path="Pictures/10000001000003DD0000028FEB023D41.png" manifest:media-type="image/png"/>
  <manifest:file-entry manifest:full-path="Pictures/100000010000032200000270D6FFB418.png" manifest:media-type="image/png"/>
  <manifest:file-entry manifest:full-path="Pictures/1000000100000371000002C960B2AFFE.png" manifest:media-type="image/png"/>
  <manifest:file-entry manifest:full-path="Pictures/1000000000000CFA000003D11ECAF20F.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Display" svg:font-family="'Aptos Display'" style:font-family-generic="swiss" style:font-pitch="variable"/>
    <style:font-face style:name="Courier New" svg:font-family="'Courier New'" style:font-family-generic="modern" style:font-pitch="fixed"/>
    <style:font-face style:name="JetBrains Mono" svg:font-family="'JetBrains Mono'" style:font-family-generic="system" style:font-pitch="fixed"/>
    <style:font-face style:name="JetBrains Mono ExtraLight" svg:font-family="'JetBrains Mono ExtraLight'"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7cm" fo:margin-left="0cm" table:align="left"/>
    </style:style>
    <style:style style:name="Table1.A" style:family="table-column">
      <style:table-column-properties style:column-width="17cm"/>
    </style:style>
    <style:style style:name="Table1.A1" style:family="table-cell">
      <style:table-cell-properties fo:padding="0.049cm" fo:border="0.25pt solid #000000" style:writing-mode="lr-tb"/>
    </style:style>
    <style:style style:name="Table2" style:family="table">
      <style:table-properties style:width="17cm" fo:margin-left="0cm" table:align="left"/>
    </style:style>
    <style:style style:name="Table2.A" style:family="table-column">
      <style:table-column-properties style:column-width="17cm"/>
    </style:style>
    <style:style style:name="Table2.A1" style:family="table-cell">
      <style:table-cell-properties fo:padding="0.049cm" fo:border="0.25pt solid #000000" style:writing-mode="lr-tb"/>
    </style:style>
    <style:style style:name="Table3" style:family="table">
      <style:table-properties style:width="17cm" fo:margin-left="0cm" table:align="left"/>
    </style:style>
    <style:style style:name="Table3.A" style:family="table-column">
      <style:table-column-properties style:column-width="17cm"/>
    </style:style>
    <style:style style:name="Table3.A1" style:family="table-cell">
      <style:table-cell-properties fo:padding="0.049cm" fo:border="0.25pt solid #000000" style:writing-mode="lr-tb"/>
    </style:style>
    <style:style style:name="Table4" style:family="table">
      <style:table-properties style:width="17cm" fo:margin-left="0cm" table:align="left"/>
    </style:style>
    <style:style style:name="Table4.A" style:family="table-column">
      <style:table-column-properties style:column-width="17cm"/>
    </style:style>
    <style:style style:name="Table4.A1" style:family="table-cell">
      <style:table-cell-properties fo:padding="0.049cm" fo:border="0.25pt solid #000000" style:writing-mode="lr-tb"/>
    </style:style>
    <style:style style:name="Table5" style:family="table">
      <style:table-properties style:width="17cm" fo:margin-left="0cm" table:align="left"/>
    </style:style>
    <style:style style:name="Table5.A" style:family="table-column">
      <style:table-column-properties style:column-width="17cm"/>
    </style:style>
    <style:style style:name="Table5.A1" style:family="table-cell">
      <style:table-cell-properties fo:padding="0.049cm" fo:border="0.25pt solid #000000" style:writing-mode="lr-tb"/>
    </style:style>
    <style:style style:name="Table6" style:family="table">
      <style:table-properties style:width="17cm" fo:margin-left="0cm" table:align="left"/>
    </style:style>
    <style:style style:name="Table6.A" style:family="table-column">
      <style:table-column-properties style:column-width="17cm"/>
    </style:style>
    <style:style style:name="Table6.A1" style:family="table-cell">
      <style:table-cell-properties fo:padding="0.049cm" fo:border="0.25pt solid #000000" style:writing-mode="lr-tb"/>
    </style:style>
    <style:style style:name="Table7" style:family="table">
      <style:table-properties style:width="17cm" fo:margin-left="0cm" table:align="left"/>
    </style:style>
    <style:style style:name="Table7.A" style:family="table-column">
      <style:table-column-properties style:column-width="17cm"/>
    </style:style>
    <style:style style:name="Table7.A1" style:family="table-cell">
      <style:table-cell-properties fo:padding="0.049cm" fo:border="0.25pt solid #000000" style:writing-mode="lr-tb"/>
    </style:style>
    <style:style style:name="Table8" style:family="table">
      <style:table-properties style:width="17cm" fo:margin-left="0cm" table:align="left"/>
    </style:style>
    <style:style style:name="Table8.A" style:family="table-column">
      <style:table-column-properties style:column-width="17cm"/>
    </style:style>
    <style:style style:name="Table8.A1" style:family="table-cell">
      <style:table-cell-properties fo:padding="0.049cm" fo:border="0.25pt solid #000000" style:writing-mode="lr-tb"/>
    </style:style>
    <style:style style:name="Table9" style:family="table">
      <style:table-properties style:width="17cm" fo:margin-left="0cm" table:align="left"/>
    </style:style>
    <style:style style:name="Table9.A" style:family="table-column">
      <style:table-column-properties style:column-width="17cm"/>
    </style:style>
    <style:style style:name="Table9.A1" style:family="table-cell">
      <style:table-cell-properties fo:padding="0.049cm" fo:border="0.25pt solid #000000" style:writing-mode="lr-tb"/>
    </style:style>
    <style:style style:name="Table10" style:family="table">
      <style:table-properties style:width="17cm" fo:margin-left="0cm" table:align="left"/>
    </style:style>
    <style:style style:name="Table10.A" style:family="table-column">
      <style:table-column-properties style:column-width="17cm"/>
    </style:style>
    <style:style style:name="Table10.A1" style:family="table-cell">
      <style:table-cell-properties fo:padding="0.049cm" fo:border="0.25pt solid #000000" style:writing-mode="lr-tb"/>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1" style:family="table-row">
      <style:table-row-properties style:min-row-height="0.661cm"/>
    </style:style>
    <style:style style:name="Table13.A1" style:family="table-cell">
      <style:table-cell-properties style:vertical-align="middle" fo:padding="0.049cm" fo:border-left="0.05pt solid #000000" fo:border-right="none" fo:border-top="0.05pt solid #000000" fo:border-bottom="0.05pt solid #000000" style:writing-mode="page"/>
    </style:style>
    <style:style style:name="Table13.B1" style:family="table-cell">
      <style:table-cell-properties style:vertical-align="middle" fo:padding="0.049cm" fo:border="0.05pt solid #000000" style:writing-mode="page"/>
    </style:style>
    <style:style style:name="Table13.A2" style:family="table-cell">
      <style:table-cell-properties style:vertical-align="middle" fo:padding="0.049cm" fo:border-left="0.05pt solid #000000" fo:border-right="none" fo:border-top="none" fo:border-bottom="0.05pt solid #000000" style:writing-mode="page"/>
    </style:style>
    <style:style style:name="Table13.B2" style:family="table-cell">
      <style:table-cell-properties fo:padding="0.049cm" fo:border-left="0.05pt solid #000000" fo:border-right="0.05pt solid #000000" fo:border-top="none" fo:border-bottom="0.05pt solid #000000" style:writing-mode="page"/>
    </style:style>
    <style:style style:name="Table13.3" style:family="table-row">
      <style:table-row-properties style:min-row-height="0.926cm"/>
    </style:style>
    <style:style style:name="Table13.B3" style:family="table-cell">
      <style:table-cell-properties fo:padding="0.049cm" fo:border-left="0.05pt solid #000000" fo:border-right="0.05pt solid #000000" fo:border-top="none" fo:border-bottom="0.05pt solid #000000" style:writing-mode="page"/>
    </style:style>
    <style:style style:name="Table13.4" style:family="table-row">
      <style:table-row-properties style:min-row-height="1.198cm"/>
    </style:style>
    <style:style style:name="Table13.B4" style:family="table-cell">
      <style:table-cell-properties fo:padding="0.049cm" fo:border-left="0.05pt solid #000000" fo:border-right="0.05pt solid #000000" fo:border-top="none" fo:border-bottom="0.05pt solid #000000"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49cm" fo:border-left="0.05pt solid #000000" fo:border-right="none" fo:border-top="0.05pt solid #000000" fo:border-bottom="0.05pt solid #000000" style:writing-mode="page"/>
    </style:style>
    <style:style style:name="Table14.B1" style:family="table-cell">
      <style:table-cell-properties fo:padding="0.049cm" fo:border="0.05pt solid #000000" style:writing-mode="page"/>
    </style:style>
    <style:style style:name="Table14.A2" style:family="table-cell">
      <style:table-cell-properties style:vertical-align="middle" fo:padding="0.049cm" fo:border-left="0.05pt solid #000000" fo:border-right="none" fo:border-top="none" fo:border-bottom="0.05pt solid #000000" style:writing-mode="page"/>
    </style:style>
    <style:style style:name="Table14.B2" style:family="table-cell">
      <style:table-cell-properties fo:padding="0.049cm" fo:border-left="0.05pt solid #000000" fo:border-right="0.05pt solid #000000" fo:border-top="none" fo:border-bottom="0.05pt solid #000000" style:writing-mode="page"/>
    </style:style>
    <style:style style:name="Table14.B3" style:family="table-cell">
      <style:table-cell-properties fo:padding="0.049cm" fo:border-left="0.05pt solid #000000" fo:border-right="0.05pt solid #000000" fo:border-top="none" fo:border-bottom="0.05pt solid #000000" style:writing-mode="page"/>
    </style:style>
    <style:style style:name="Table14.B4" style:family="table-cell">
      <style:table-cell-properties fo:padding="0.049cm" fo:border-left="0.05pt solid #000000" fo:border-right="0.05pt solid #000000" fo:border-top="none" fo:border-bottom="0.05pt solid #000000" style:writing-mode="page"/>
    </style:style>
    <style:style style:name="Table14.B5"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master-page-name="MP0">
      <style:paragraph-properties style:page-number="auto" fo:break-before="pag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fo:text-align="center" style:justify-single-word="false"/>
      <style:text-properties fo:font-size="13pt"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P5" style:family="paragraph" style:parent-style-name="Contents_20_Heading">
      <style:paragraph-properties fo:break-before="page"/>
      <style:text-properties officeooo:rsid="0049f3ce" officeooo:paragraph-rsid="0049f3ce"/>
    </style:style>
    <style:style style:name="P6" style:family="paragraph" style:parent-style-name="Normal">
      <style:paragraph-properties>
        <style:tab-stops>
          <style:tab-stop style:position="16.999cm" style:type="right" style:leader-style="dotted" style:leader-text="."/>
        </style:tab-stops>
      </style:paragraph-properties>
    </style:style>
    <style:style style:name="P7" style:family="paragraph" style:parent-style-name="Nagłówek_20_1">
      <style:paragraph-properties fo:break-before="page"/>
    </style:style>
    <style:style style:name="P8" style:family="paragraph" style:parent-style-name="Text_20_body">
      <style:paragraph-properties fo:text-align="justify" style:justify-single-word="false"/>
    </style:style>
    <style:style style:name="P9" style:family="paragraph" style:parent-style-name="Nagłówek_20_1">
      <style:paragraph-properties fo:text-align="justify" style:justify-single-word="false"/>
    </style:style>
    <style:style style:name="P10" style:family="paragraph" style:parent-style-name="Nagłówek_20_2">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style style:name="P13" style:family="paragraph" style:parent-style-name="Text_20_body" style:list-style-name="L3">
      <style:paragraph-properties fo:text-align="justify" style:justify-single-word="false"/>
      <style:text-properties fo:font-style="italic" style:font-style-asian="italic" style:font-style-complex="italic"/>
    </style:style>
    <style:style style:name="P14" style:family="paragraph" style:parent-style-name="Text_20_body" style:list-style-name="L4">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7">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9">
      <style:paragraph-properties fo:text-align="justify" style:justify-single-word="false"/>
    </style:style>
    <style:style style:name="P20" style:family="paragraph" style:parent-style-name="Text_20_body" style:list-style-name="L10">
      <style:paragraph-properties fo:text-align="justify" style:justify-single-word="false"/>
    </style:style>
    <style:style style:name="P21" style:family="paragraph" style:parent-style-name="Nagłówek_20_2">
      <style:paragraph-properties fo:break-before="page"/>
    </style:style>
    <style:style style:name="P22" style:family="paragraph" style:parent-style-name="Text_20_body" style:list-style-name="L11">
      <style:paragraph-properties fo:text-align="justify" style:justify-single-word="false"/>
    </style:style>
    <style:style style:name="P23" style:family="paragraph" style:parent-style-name="Text_20_body" style:list-style-name="L12">
      <style:paragraph-properties fo:text-align="justify" style:justify-single-word="false"/>
    </style:style>
    <style:style style:name="P24" style:family="paragraph" style:parent-style-name="Nagłówek_20_3">
      <style:paragraph-properties fo:break-before="page"/>
    </style:style>
    <style:style style:name="P25" style:family="paragraph" style:parent-style-name="Text_20_body" style:list-style-name="L13">
      <style:paragraph-properties fo:text-align="justify" style:justify-single-word="false"/>
    </style:style>
    <style:style style:name="P26" style:family="paragraph" style:parent-style-name="Text_20_body" style:list-style-name="L14">
      <style:paragraph-properties fo:text-align="justify" style:justify-single-word="false"/>
    </style:style>
    <style:style style:name="P27" style:family="paragraph" style:parent-style-name="Text_20_body" style:list-style-name="L15">
      <style:paragraph-properties fo:text-align="justify" style:justify-single-word="false"/>
    </style:style>
    <style:style style:name="P28" style:family="paragraph" style:parent-style-name="Text_20_body" style:list-style-name="L16">
      <style:paragraph-properties fo:text-align="justify" style:justify-single-word="false"/>
    </style:style>
    <style:style style:name="P29" style:family="paragraph" style:parent-style-name="Text_20_body" style:list-style-name="L17">
      <style:paragraph-properties fo:text-align="justify" style:justify-single-word="false"/>
    </style:style>
    <style:style style:name="P30" style:family="paragraph" style:parent-style-name="Text_20_body" style:list-style-name="L18">
      <style:paragraph-properties fo:text-align="justify" style:justify-single-word="false"/>
    </style:style>
    <style:style style:name="P31" style:family="paragraph" style:parent-style-name="Text_20_body" style:list-style-name="L19">
      <style:paragraph-properties fo:text-align="justify" style:justify-single-word="false"/>
    </style:style>
    <style:style style:name="P32" style:family="paragraph" style:parent-style-name="Text_20_body" style:list-style-name="L20">
      <style:paragraph-properties fo:text-align="justify" style:justify-single-word="false"/>
    </style:style>
    <style:style style:name="P33" style:family="paragraph" style:parent-style-name="Nagłówek_20_3">
      <style:paragraph-properties fo:text-align="justify" style:justify-single-word="false"/>
    </style:style>
    <style:style style:name="P34" style:family="paragraph" style:parent-style-name="Nagłówek_20_3">
      <style:paragraph-properties fo:text-align="justify" style:justify-single-word="false" fo:break-before="page"/>
    </style:style>
    <style:style style:name="P35" style:family="paragraph" style:parent-style-name="Text_20_body" style:list-style-name="L21">
      <style:paragraph-properties fo:text-align="justify" style:justify-single-word="false"/>
    </style:style>
    <style:style style:name="P36" style:family="paragraph" style:parent-style-name="Text_20_body" style:list-style-name="L22">
      <style:paragraph-properties fo:text-align="justify" style:justify-single-word="false"/>
    </style:style>
    <style:style style:name="P37" style:family="paragraph" style:parent-style-name="Text_20_body" style:list-style-name="L23">
      <style:paragraph-properties fo:text-align="justify" style:justify-single-word="false"/>
    </style:style>
    <style:style style:name="P38" style:family="paragraph" style:parent-style-name="Normalny">
      <style:paragraph-properties fo:margin-top="0.423cm" fo:margin-bottom="0.423cm" style:contextual-spacing="false" fo:text-align="justify" style:justify-single-word="false"/>
    </style:style>
    <style:style style:name="P39" style:family="paragraph" style:parent-style-name="Text_20_body" style:list-style-name="L24">
      <style:paragraph-properties fo:text-align="justify" style:justify-single-word="false"/>
    </style:style>
    <style:style style:name="P40" style:family="paragraph" style:parent-style-name="Text_20_body" style:list-style-name="L25">
      <style:paragraph-properties fo:text-align="justify" style:justify-single-word="false"/>
    </style:style>
    <style:style style:name="P41" style:family="paragraph" style:parent-style-name="Text_20_body" style:list-style-name="L26">
      <style:paragraph-properties fo:text-align="justify" style:justify-single-word="false"/>
    </style:style>
    <style:style style:name="P42" style:family="paragraph" style:parent-style-name="Text_20_body" style:list-style-name="L27">
      <style:paragraph-properties fo:text-align="justify" style:justify-single-word="false"/>
    </style:style>
    <style:style style:name="P43" style:family="paragraph" style:parent-style-name="Text_20_body" style:list-style-name="L28">
      <style:paragraph-properties fo:text-align="justify" style:justify-single-word="false"/>
    </style:style>
    <style:style style:name="P44" style:family="paragraph" style:parent-style-name="Text_20_body" style:list-style-name="L28">
      <style:paragraph-properties fo:margin-top="0cm" fo:margin-bottom="0cm" style:contextual-spacing="false" fo:text-align="justify" style:justify-single-word="false"/>
    </style:style>
    <style:style style:name="P45" style:family="paragraph" style:parent-style-name="Text_20_body">
      <style:paragraph-properties fo:text-align="center" style:justify-single-word="false"/>
    </style:style>
    <style:style style:name="P46" style:family="paragraph" style:parent-style-name="Nagłówek_20_2">
      <style:text-properties officeooo:paragraph-rsid="002e93f5"/>
    </style:style>
    <style:style style:name="P47" style:family="paragraph" style:parent-style-name="Text_20_body" style:list-style-name="L29">
      <style:paragraph-properties fo:text-align="justify" style:justify-single-word="false"/>
    </style:style>
    <style:style style:name="P4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style>
    <style:style style:name="P4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fo:color="#bbbbbb" loext:opacity="100%" style:font-name="JetBrains Mono ExtraLight" fo:font-size="7pt" fo:language="zxx" fo:country="none" fo:font-style="normal" style:text-underline-style="none" fo:font-weight="normal" fo:background-color="transparent" style:font-size-asian="7pt" style:font-size-complex="7pt"/>
    </style:style>
    <style:style style:name="P50" style:family="paragraph" style:parent-style-name="Text_20_body">
      <style:paragraph-properties fo:text-align="justify" style:justify-single-word="false"/>
      <style:text-properties fo:language="en" fo:country="US"/>
    </style:style>
    <style:style style:name="P5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style>
    <style:style style:name="P5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style:font-name="JetBrains Mono ExtraLight" fo:font-size="7pt" fo:language="zxx" fo:country="none" fo:font-style="normal" style:text-underline-style="none" fo:font-weight="normal" fo:background-color="transparent" style:font-name-asian="Noto Sans CJK SC" style:font-size-asian="7pt" style:font-weight-asian="bold" style:font-size-complex="7pt" style:font-weight-complex="bold"/>
    </style:style>
    <style:style style:name="P53" style:family="paragraph" style:parent-style-name="Text_20_body">
      <style:text-properties fo:language="en" fo:country="US"/>
    </style:style>
    <style:style style:name="P54" style:family="paragraph" style:parent-style-name="Table_20_Contents">
      <style:text-properties fo:color="#008000" loext:opacity="100%" style:font-name="JetBrains Mono ExtraLight" fo:font-size="7pt" fo:language="en" fo:country="US" fo:font-weight="bold" style:font-name-asian="Noto Sans CJK SC" style:font-size-asian="7pt" style:font-weight-asian="bold" style:font-size-complex="7pt"/>
    </style:style>
    <style:style style:name="P55" style:family="paragraph" style:parent-style-name="Table_20_Contents">
      <style:text-properties fo:color="#0000ff" loext:opacity="100%" style:font-name="JetBrains Mono ExtraLight" fo:font-size="7pt" fo:language="en" fo:country="US" style:font-name-asian="Noto Sans CJK SC" style:font-size-asian="7pt" style:font-size-complex="7pt"/>
    </style:style>
    <style:style style:name="P56" style:family="paragraph" style:parent-style-name="Table_20_Contents">
      <style:text-properties fo:color="#000000" loext:opacity="100%" style:font-name="JetBrains Mono ExtraLight" fo:font-size="7pt" fo:language="en" fo:country="US" style:font-name-asian="Noto Sans CJK SC" style:font-size-asian="7pt" style:font-size-complex="7pt"/>
    </style:style>
    <style:style style:name="P57" style:family="paragraph" style:parent-style-name="Table_20_Contents">
      <style:text-properties fo:color="#ba2121" loext:opacity="100%" style:font-name="JetBrains Mono ExtraLight" fo:font-size="7pt" fo:language="en" fo:country="US" style:font-name-asian="Noto Sans CJK SC" style:font-size-asian="7pt" style:font-size-complex="7pt"/>
    </style:style>
    <style:style style:name="P58" style:family="paragraph" style:parent-style-name="Text_20_body" style:list-style-name="L30">
      <style:paragraph-properties fo:text-align="justify" style:justify-single-word="false"/>
    </style:style>
    <style:style style:name="P59" style:family="paragraph" style:parent-style-name="Table_20_Contents">
      <style:text-properties fo:color="#bbbbbb" loext:opacity="100%" style:font-name="JetBrains Mono ExtraLight" fo:font-size="7pt" fo:language="en" fo:country="US" style:font-size-asian="7pt" style:font-size-complex="7pt"/>
    </style:style>
    <style:style style:name="P60" style:family="paragraph" style:parent-style-name="Table_20_Contents">
      <style:text-properties fo:color="#bbbbbb" loext:opacity="100%" style:font-name="JetBrains Mono ExtraLight" fo:font-size="7pt" style:font-size-asian="7pt" style:font-size-complex="7pt"/>
    </style:style>
    <style:style style:name="P61" style:family="paragraph" style:parent-style-name="Table_20_Contents">
      <style:paragraph-properties fo:text-align="justify" style:justify-single-word="false"/>
    </style:style>
    <style:style style:name="P62" style:family="paragraph" style:parent-style-name="Table_20_Contents">
      <style:paragraph-properties fo:text-align="justify" style:justify-single-word="false"/>
      <style:text-properties fo:color="#000000" loext:opacity="100%" style:font-name="JetBrains Mono ExtraLight" fo:font-size="7pt" fo:language="en" fo:country="US" style:font-size-asian="7pt" style:font-size-complex="7pt"/>
    </style:style>
    <style:style style:name="P63" style:family="paragraph" style:parent-style-name="Table_20_Contents">
      <style:paragraph-properties fo:text-align="justify" style:justify-single-word="false"/>
      <style:text-properties fo:color="#3d7b7b" loext:opacity="100%" style:font-name="JetBrains Mono ExtraLight" fo:font-size="7pt" fo:language="en" fo:country="US" fo:font-style="italic" style:font-size-asian="7pt" style:font-style-asian="italic" style:font-size-complex="7pt"/>
    </style:style>
    <style:style style:name="P64" style:family="paragraph" style:parent-style-name="Table_20_Contents">
      <style:paragraph-properties fo:text-align="justify" style:justify-single-word="false"/>
      <style:text-properties style:font-name="JetBrains Mono ExtraLight" fo:font-size="7pt" fo:language="en" fo:country="US" style:font-size-asian="7pt" style:font-size-complex="7pt"/>
    </style:style>
    <style:style style:name="P65" style:family="paragraph" style:parent-style-name="Table_20_Contents">
      <style:paragraph-properties fo:text-align="justify" style:justify-single-word="false"/>
      <style:text-properties fo:color="#0000ff" loext:opacity="100%" style:font-name="JetBrains Mono ExtraLight" fo:font-size="7pt" fo:language="en" fo:country="US" style:font-size-asian="7pt" style:font-size-complex="7pt"/>
    </style:style>
    <style:style style:name="P66" style:family="paragraph" style:parent-style-name="Nagłówek_20_3">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67" style:family="paragraph" style:parent-style-name="Table_20_Contents">
      <style:paragraph-properties fo:text-align="justify" style:justify-single-word="false"/>
      <style:text-properties fo:color="#bbbbbb" loext:opacity="100%" style:font-name="JetBrains Mono ExtraLight" fo:font-size="7pt" fo:language="en" fo:country="US" style:font-size-asian="7pt" style:font-size-complex="7pt"/>
    </style:style>
    <style:style style:name="P68" style:family="paragraph" style:parent-style-name="Nagłówek_20_3">
      <style:text-properties fo:language="en" fo:country="US"/>
    </style:style>
    <style:style style:name="P69" style:family="paragraph" style:parent-style-name="Text_20_body">
      <style:paragraph-properties fo:text-align="center" style:justify-single-word="false" fo:break-before="page"/>
    </style:style>
    <style:style style:name="P70" style:family="paragraph" style:parent-style-name="Text_20_body" style:list-style-name="L31">
      <style:paragraph-properties fo:text-align="justify" style:justify-single-word="false"/>
    </style:style>
    <style:style style:name="P7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fo:color="#bbbbbb" loext:opacity="100%" style:font-name="JetBrains Mono ExtraLight" fo:font-size="7pt" fo:language="zxx" fo:country="none" fo:font-style="normal" style:text-underline-style="none" fo:font-weight="normal" fo:background-color="transparent" style:font-size-asian="7pt" style:font-weight-asian="bold" style:font-size-complex="7pt"/>
    </style:style>
    <style:style style:name="P7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fo:color="#000000" loext:opacity="100%" style:font-name="JetBrains Mono ExtraLight" fo:font-size="7pt" fo:language="zxx" fo:country="none" fo:font-style="normal" style:text-underline-style="none" fo:font-weight="normal" fo:background-color="transparent" style:font-size-asian="7pt" style:font-size-complex="7pt"/>
    </style:style>
    <style:style style:name="P73" style:family="paragraph" style:parent-style-name="Text_20_body" style:list-style-name="L32">
      <style:paragraph-properties fo:text-align="justify" style:justify-single-word="false"/>
    </style:style>
    <style:style style:name="P74" style:family="paragraph" style:parent-style-name="Text_20_body">
      <style:paragraph-properties fo:text-align="justify" style:justify-single-word="false" fo:break-before="page"/>
    </style:style>
    <style:style style:name="P75" style:family="paragraph" style:parent-style-name="Text_20_body" style:list-style-name="L33">
      <style:paragraph-properties fo:text-align="justify" style:justify-single-word="false"/>
    </style:style>
    <style:style style:name="P76" style:family="paragraph" style:parent-style-name="Text_20_body" style:list-style-name="L34">
      <style:paragraph-properties fo:text-align="justify" style:justify-single-word="false"/>
    </style:style>
    <style:style style:name="P77" style:family="paragraph" style:parent-style-name="Text_20_body" style:list-style-name="L35">
      <style:paragraph-properties fo:margin-top="0cm" fo:margin-bottom="0cm" style:contextual-spacing="false" fo:text-align="justify" style:justify-single-word="false"/>
    </style:style>
    <style:style style:name="P78" style:family="paragraph" style:parent-style-name="Text_20_body" style:list-style-name="L35">
      <style:paragraph-properties fo:text-align="justify" style:justify-single-word="false"/>
    </style:style>
    <style:style style:name="P79" style:family="paragraph" style:parent-style-name="Heading_20_2">
      <style:paragraph-properties fo:margin-top="0cm" fo:margin-bottom="0.247cm" style:contextual-spacing="false" fo:line-height="115%"/>
    </style:style>
    <style:style style:name="P80" style:family="paragraph" style:parent-style-name="Text_20_body" style:list-style-name="L36">
      <style:paragraph-properties fo:text-align="justify" style:justify-single-word="false"/>
    </style:style>
    <style:style style:name="P81" style:family="paragraph" style:parent-style-name="Text_20_body">
      <style:paragraph-properties fo:text-align="justify" style:justify-single-word="false" fo:text-indent="1.251cm" style:auto-text-indent="false"/>
    </style:style>
    <style:style style:name="P82" style:family="paragraph" style:parent-style-name="Text_20_body" style:list-style-name="L37"/>
    <style:style style:name="P83" style:family="paragraph" style:parent-style-name="Text_20_body">
      <style:paragraph-properties fo:text-align="justify" style:justify-single-word="false" fo:text-indent="0.635cm" style:auto-text-indent="false"/>
    </style:style>
    <style:style style:name="P84" style:family="paragraph" style:parent-style-name="Text_20_body" style:list-style-name="L38">
      <style:paragraph-properties fo:text-align="justify" style:justify-single-word="false"/>
    </style:style>
    <style:style style:name="P85" style:family="paragraph" style:parent-style-name="Text_20_body">
      <style:paragraph-properties fo:text-align="center" style:justify-single-word="false"/>
      <style:text-properties officeooo:paragraph-rsid="0020e4c1"/>
    </style:style>
    <style:style style:name="P86" style:family="paragraph" style:parent-style-name="Heading_20_2"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87" style:family="paragraph" style:parent-style-name="Heading_20_2">
      <style:paragraph-properties fo:break-before="page"/>
    </style:style>
    <style:style style:name="P88" style:family="paragraph" style:parent-style-name="Text_20_body">
      <style:text-properties officeooo:paragraph-rsid="00290d53"/>
    </style:style>
    <style:style style:name="P89" style:family="paragraph" style:parent-style-name="Text_20_body">
      <style:paragraph-properties fo:text-align="center" style:justify-single-word="false"/>
      <style:text-properties officeooo:paragraph-rsid="00290d53"/>
    </style:style>
    <style:style style:name="P90" style:family="paragraph" style:parent-style-name="Text_20_body" style:list-style-name="L39">
      <style:paragraph-properties fo:text-align="justify" style:justify-single-word="false"/>
    </style:style>
    <style:style style:name="P91" style:family="paragraph" style:parent-style-name="Text_20_body" style:list-style-name="L39">
      <style:paragraph-properties fo:text-align="justify" style:justify-single-word="false"/>
      <style:text-properties officeooo:paragraph-rsid="00290d53"/>
    </style:style>
    <style:style style:name="P92" style:family="paragraph" style:parent-style-name="Text_20_body">
      <style:text-properties officeooo:paragraph-rsid="0023da64"/>
    </style:style>
    <style:style style:name="P93" style:family="paragraph" style:parent-style-name="Text_20_body">
      <style:paragraph-properties fo:break-before="page"/>
      <style:text-properties officeooo:paragraph-rsid="002be1d5"/>
    </style:style>
    <style:style style:name="P94" style:family="paragraph" style:parent-style-name="Text_20_body">
      <style:paragraph-properties fo:text-align="center" style:justify-single-word="false"/>
      <style:text-properties fo:font-weight="bold" officeooo:rsid="00255796" officeooo:paragraph-rsid="00255796" style:font-weight-asian="bold" style:font-weight-complex="bold"/>
    </style:style>
    <style:style style:name="P95" style:family="paragraph" style:parent-style-name="Text_20_body">
      <style:paragraph-properties fo:text-align="center" style:justify-single-word="false"/>
      <style:text-properties officeooo:paragraph-rsid="00255796"/>
    </style:style>
    <style:style style:name="P96" style:family="paragraph" style:parent-style-name="Text_20_body">
      <style:paragraph-properties fo:text-align="justify" style:justify-single-word="false"/>
      <style:text-properties fo:font-weight="normal" officeooo:paragraph-rsid="00255796" style:font-weight-asian="normal" style:font-weight-complex="normal"/>
    </style:style>
    <style:style style:name="P97" style:family="paragraph" style:parent-style-name="Text_20_body">
      <style:paragraph-properties fo:text-align="justify" style:justify-single-word="false"/>
      <style:text-properties officeooo:paragraph-rsid="002be1d5"/>
    </style:style>
    <style:style style:name="P98" style:family="paragraph" style:parent-style-name="Table_20_Contents">
      <style:paragraph-properties fo:text-align="center" style:justify-single-word="false"/>
      <style:text-properties fo:font-weight="bold" officeooo:rsid="00255796" officeooo:paragraph-rsid="00255796" style:font-weight-asian="bold" style:font-weight-complex="bold"/>
    </style:style>
    <style:style style:name="P99" style:family="paragraph" style:parent-style-name="Table_20_Contents">
      <style:paragraph-properties fo:text-align="center" style:justify-single-word="false"/>
      <style:text-properties officeooo:rsid="00255796" officeooo:paragraph-rsid="00255796"/>
    </style:style>
    <style:style style:name="P100" style:family="paragraph" style:parent-style-name="Text_20_body">
      <style:paragraph-properties fo:text-align="justify" style:justify-single-word="false"/>
      <style:text-properties officeooo:paragraph-rsid="002d46c0"/>
    </style:style>
    <style:style style:name="P101" style:family="paragraph" style:parent-style-name="Text_20_body">
      <style:paragraph-properties fo:text-align="center" style:justify-single-word="false"/>
      <style:text-properties officeooo:paragraph-rsid="002d46c0"/>
    </style:style>
    <style:style style:name="P102" style:family="paragraph" style:parent-style-name="Heading_20_2">
      <style:text-properties officeooo:paragraph-rsid="00382b5d"/>
    </style:style>
    <style:style style:name="P103" style:family="paragraph" style:parent-style-name="Text_20_body">
      <style:paragraph-properties fo:text-align="justify" style:justify-single-word="false"/>
      <style:text-properties officeooo:paragraph-rsid="00382b5d"/>
    </style:style>
    <style:style style:name="P104" style:family="paragraph" style:parent-style-name="Text_20_body">
      <style:text-properties officeooo:paragraph-rsid="00382b5d"/>
    </style:style>
    <style:style style:name="P105" style:family="paragraph" style:parent-style-name="Text_20_body">
      <style:paragraph-properties fo:text-align="center" style:justify-single-word="false"/>
      <style:text-properties officeooo:paragraph-rsid="003bdd99"/>
    </style:style>
    <style:style style:name="P106" style:family="paragraph" style:parent-style-name="Text_20_body">
      <style:paragraph-properties fo:text-align="center" style:justify-single-word="false" fo:break-before="page"/>
      <style:text-properties officeooo:paragraph-rsid="0041b7e7"/>
    </style:style>
    <style:style style:name="P107" style:family="paragraph" style:parent-style-name="Text_20_body">
      <style:paragraph-properties fo:text-align="center" style:justify-single-word="false"/>
      <style:text-properties officeooo:paragraph-rsid="0041b7e7"/>
    </style:style>
    <style:style style:name="P108" style:family="paragraph" style:parent-style-name="Text_20_body" style:list-style-name="L40">
      <style:paragraph-properties fo:text-align="justify" style:justify-single-word="false"/>
    </style:style>
    <style:style style:name="P109" style:family="paragraph" style:parent-style-name="Text_20_body">
      <style:paragraph-properties fo:text-align="justify" style:justify-single-word="false"/>
      <style:text-properties officeooo:paragraph-rsid="0020e4c1"/>
    </style:style>
    <style:style style:name="P110" style:family="paragraph" style:parent-style-name="Nagłówek_20_1">
      <style:text-properties officeooo:paragraph-rsid="0020e4c1"/>
    </style:style>
    <style:style style:name="P111" style:family="paragraph" style:parent-style-name="Text_20_body">
      <style:paragraph-properties fo:text-align="justify" style:justify-single-word="false"/>
      <style:text-properties officeooo:paragraph-rsid="003514f5"/>
    </style:style>
    <style:style style:name="P112" style:family="paragraph" style:parent-style-name="Text_20_body">
      <style:text-properties officeooo:paragraph-rsid="0021fed2"/>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ize="8pt" fo:font-weight="normal" style:font-size-asian="8pt" style:font-weight-asian="normal" style:font-size-complex="8pt" style:font-weight-complex="normal"/>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000000"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9" style:family="text">
      <style:text-properties fo:color="#008000"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10" style:family="text">
      <style:text-properties fo:color="#0000ff"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1" style:family="text">
      <style:text-properties fo:color="#008000"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2" style:family="text">
      <style:text-properties fo:color="#aa22ff"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13" style:family="text">
      <style:text-properties fo:color="#666666"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4" style:family="text">
      <style:text-properties fo:color="#ba2121"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5" style:family="text">
      <style:text-properties fo:color="#cb3f38"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16" style:family="text">
      <style:text-properties fo:font-size="8pt" fo:language="en" fo:country="US" fo:font-style="italic" style:font-size-asian="8pt" style:font-style-asian="italic" style:font-size-complex="8pt" style:font-style-complex="italic"/>
    </style:style>
    <style:style style:name="T17" style:family="text">
      <style:text-properties fo:color="#008000" loext:opacity="100%" style:font-name="JetBrains Mono ExtraLight" fo:font-size="7pt" fo:language="zxx" fo:country="none" fo:font-style="normal" style:text-underline-style="none" fo:font-weight="bold" fo:background-color="transparent" loext:char-shading-value="0" style:font-name-asian="Noto Sans CJK SC" style:font-size-asian="7pt" style:font-weight-asian="bold" style:font-size-complex="7pt" style:font-weight-complex="bold"/>
    </style:style>
    <style:style style:name="T18" style:family="text">
      <style:text-properties fo:color="#000000"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19" style:family="text">
      <style:text-properties fo:color="#0000ff"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20" style:family="text">
      <style:text-properties fo:color="#666666"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21" style:family="text">
      <style:text-properties fo:color="#ba2121"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22" style:family="text">
      <style:text-properties fo:color="#a45a77" loext:opacity="100%" style:font-name="JetBrains Mono ExtraLight" fo:font-size="7pt" fo:language="zxx" fo:country="none" fo:font-style="normal" style:text-underline-style="none" fo:font-weight="bold" fo:background-color="transparent" loext:char-shading-value="0" style:font-name-asian="Noto Sans CJK SC" style:font-size-asian="7pt" style:font-weight-asian="bold" style:font-size-complex="7pt" style:font-weight-complex="bold"/>
    </style:style>
    <style:style style:name="T23" style:family="text">
      <style:text-properties fo:color="#008000" loext:opacity="100%" style:font-name="JetBrains Mono ExtraLight" fo:font-size="7pt" fo:language="en" fo:country="US" fo:font-weight="bold" style:font-name-asian="Noto Sans CJK SC" style:font-size-asian="7pt" style:font-weight-asian="bold" style:font-size-complex="7pt"/>
    </style:style>
    <style:style style:name="T24" style:family="text">
      <style:text-properties fo:color="#000000" loext:opacity="100%" style:font-name="JetBrains Mono ExtraLight" fo:font-size="7pt" fo:language="en" fo:country="US" style:font-name-asian="Noto Sans CJK SC" style:font-size-asian="7pt" style:font-size-complex="7pt"/>
    </style:style>
    <style:style style:name="T25" style:family="text">
      <style:text-properties fo:color="#0000ff" loext:opacity="100%" style:font-name="JetBrains Mono ExtraLight" fo:font-size="7pt" fo:language="en" fo:country="US" style:font-name-asian="Noto Sans CJK SC" style:font-size-asian="7pt" style:font-size-complex="7pt"/>
    </style:style>
    <style:style style:name="T26" style:family="text">
      <style:text-properties fo:color="#666666" loext:opacity="100%" style:font-name="JetBrains Mono ExtraLight" fo:font-size="7pt" fo:language="en" fo:country="US" style:font-name-asian="Noto Sans CJK SC" style:font-size-asian="7pt" style:font-size-complex="7pt"/>
    </style:style>
    <style:style style:name="T27" style:family="text">
      <style:text-properties fo:color="#bbbbbb" loext:opacity="100%" style:font-name="JetBrains Mono ExtraLight" fo:font-size="7pt" fo:language="en" fo:country="US" style:font-name-asian="Noto Sans CJK SC" style:font-size-asian="7pt" style:font-size-complex="7pt"/>
    </style:style>
    <style:style style:name="T28" style:family="text">
      <style:text-properties fo:color="#008000" loext:opacity="100%" style:font-name="JetBrains Mono ExtraLight" fo:font-size="7pt" fo:language="en" fo:country="US" style:font-name-asian="Noto Sans CJK SC" style:font-size-asian="7pt" style:font-size-complex="7pt"/>
    </style:style>
    <style:style style:name="T29" style:family="text">
      <style:text-properties fo:color="#ba2121" loext:opacity="100%" style:font-name="JetBrains Mono ExtraLight" fo:font-size="7pt" fo:language="en" fo:country="US" style:font-name-asian="Noto Sans CJK SC" style:font-size-asian="7pt" style:font-size-complex="7pt"/>
    </style:style>
    <style:style style:name="T30" style:family="text">
      <style:text-properties fo:color="#cb3f38" loext:opacity="100%" style:font-name="JetBrains Mono ExtraLight" fo:font-size="7pt" fo:language="en" fo:country="US" fo:font-weight="bold" style:font-name-asian="Noto Sans CJK SC" style:font-size-asian="7pt" style:font-weight-asian="bold" style:font-size-complex="7pt"/>
    </style:style>
    <style:style style:name="T31" style:family="text">
      <style:text-properties fo:color="#a45a77" loext:opacity="100%" style:font-name="JetBrains Mono ExtraLight" fo:font-size="7pt" fo:language="en" fo:country="US" fo:font-weight="bold" style:font-name-asian="Noto Sans CJK SC" style:font-size-asian="7pt" style:font-weight-asian="bold" style:font-size-complex="7pt"/>
    </style:style>
    <style:style style:name="T32" style:family="text">
      <style:text-properties style:font-name="JetBrains Mono ExtraLight" fo:font-size="7pt" fo:language="en" fo:country="US" style:font-name-asian="Noto Sans CJK SC" style:font-size-asian="7pt" style:font-size-complex="7pt"/>
    </style:style>
    <style:style style:name="T33" style:family="text">
      <style:text-properties style:font-name="JetBrains Mono ExtraLight" fo:font-size="7pt" style:font-name-asian="Noto Sans CJK SC" style:font-size-asian="7pt" style:font-size-complex="7pt"/>
    </style:style>
    <style:style style:name="T34" style:family="text">
      <style:text-properties style:font-name="Liberation Serif"/>
    </style:style>
    <style:style style:name="T35" style:family="text">
      <style:text-properties fo:color="#008000" loext:opacity="100%" style:font-name="JetBrains Mono ExtraLight" fo:font-size="7pt" fo:language="en" fo:country="US" fo:font-weight="bold" style:font-size-asian="7pt" style:font-weight-asian="bold" style:font-size-complex="7pt"/>
    </style:style>
    <style:style style:name="T36" style:family="text">
      <style:text-properties fo:color="#000000" loext:opacity="100%" style:font-name="JetBrains Mono ExtraLight" fo:font-size="7pt" fo:language="en" fo:country="US" style:font-size-asian="7pt" style:font-size-complex="7pt"/>
    </style:style>
    <style:style style:name="T37" style:family="text">
      <style:text-properties fo:color="#0000ff" loext:opacity="100%" style:font-name="JetBrains Mono ExtraLight" fo:font-size="7pt" fo:language="en" fo:country="US" style:font-size-asian="7pt" style:font-size-complex="7pt"/>
    </style:style>
    <style:style style:name="T38" style:family="text">
      <style:text-properties fo:color="#008000" loext:opacity="100%" style:font-name="JetBrains Mono ExtraLight" fo:font-size="7pt" fo:language="en" fo:country="US" style:font-size-asian="7pt" style:font-size-complex="7pt"/>
    </style:style>
    <style:style style:name="T39" style:family="text">
      <style:text-properties fo:color="#aa22ff" loext:opacity="100%" style:font-name="JetBrains Mono ExtraLight" fo:font-size="7pt" fo:language="en" fo:country="US" fo:font-weight="bold" style:font-size-asian="7pt" style:font-weight-asian="bold" style:font-size-complex="7pt"/>
    </style:style>
    <style:style style:name="T40" style:family="text">
      <style:text-properties fo:color="#666666" loext:opacity="100%" style:font-name="JetBrains Mono ExtraLight" fo:font-size="7pt" fo:language="en" fo:country="US" style:font-size-asian="7pt" style:font-size-complex="7pt"/>
    </style:style>
    <style:style style:name="T41" style:family="text">
      <style:text-properties fo:color="#000000" loext:opacity="100%" style:font-name="JetBrains Mono ExtraLight" fo:font-size="7pt" style:font-size-asian="7pt" style:font-size-complex="7pt"/>
    </style:style>
    <style:style style:name="T42" style:family="text">
      <style:text-properties fo:color="#666666" loext:opacity="100%" style:font-name="JetBrains Mono ExtraLight" fo:font-size="7pt" style:font-size-asian="7pt" style:font-size-complex="7pt"/>
    </style:style>
    <style:style style:name="T43" style:family="text">
      <style:text-properties fo:color="#ba2121" loext:opacity="100%" style:font-name="JetBrains Mono ExtraLight" fo:font-size="7pt" style:font-size-asian="7pt" style:font-size-complex="7pt"/>
    </style:style>
    <style:style style:name="T44" style:family="text">
      <style:text-properties fo:color="#ba2121" loext:opacity="100%" style:font-name="JetBrains Mono ExtraLight" fo:font-size="7pt" fo:language="en" fo:country="US" style:font-size-asian="7pt" style:font-size-complex="7pt"/>
    </style:style>
    <style:style style:name="T45" style:family="text">
      <style:text-properties fo:color="#cb3f38" loext:opacity="100%" style:font-name="JetBrains Mono ExtraLight" fo:font-size="7pt" fo:language="en" fo:country="US" fo:font-weight="bold" style:font-size-asian="7pt" style:font-weight-asian="bold" style:font-size-complex="7pt"/>
    </style:style>
    <style:style style:name="T46" style:family="text">
      <style:text-properties fo:color="#008000" loext:opacity="100%" style:font-name="JetBrains Mono ExtraLight" fo:font-size="7pt" style:font-size-asian="7pt" style:font-size-complex="7pt"/>
    </style:style>
    <style:style style:name="T47" style:family="text">
      <style:text-properties fo:color="#bbbbbb" loext:opacity="100%" style:font-name="JetBrains Mono ExtraLight" fo:font-size="7pt" fo:language="en" fo:country="US" style:font-size-asian="7pt" style:font-size-complex="7pt"/>
    </style:style>
    <style:style style:name="T48" style:family="text">
      <style:text-properties fo:color="#3d7b7b" loext:opacity="100%" style:font-name="JetBrains Mono ExtraLight" fo:font-size="7pt" fo:language="en" fo:country="US" fo:font-style="italic" style:font-size-asian="7pt" style:font-style-asian="italic" style:font-size-complex="7pt"/>
    </style:style>
    <style:style style:name="T49" style:family="text">
      <style:text-properties style:font-name="JetBrains Mono ExtraLight" fo:font-size="7pt" fo:language="en" fo:country="US" style:font-size-asian="7pt" style:font-size-complex="7pt"/>
    </style:style>
    <style:style style:name="T50" style:family="text">
      <style:text-properties fo:color="#a45a77" loext:opacity="100%" style:font-name="JetBrains Mono ExtraLight" fo:font-size="7pt" fo:language="en" fo:country="US" fo:font-weight="bold" style:font-size-asian="7pt" style:font-weight-asian="bold" style:font-size-complex="7pt"/>
    </style:style>
    <style:style style:name="T51" style:family="text">
      <style:text-properties fo:font-style="italic" style:text-underline-style="none" style:font-style-asian="italic" style:font-style-complex="italic"/>
    </style:style>
    <style:style style:name="T52" style:family="text">
      <style:text-properties fo:color="#a45a77"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53" style:family="text">
      <style:text-properties fo:color="#000000" loext:opacity="100%" style:font-name="JetBrains Mono ExtraLight" fo:font-size="7pt" fo:language="zxx" fo:country="none" fo:font-style="normal" style:text-underline-style="none" fo:font-weight="normal" fo:background-color="transparent" loext:char-shading-value="0" style:font-size-asian="7pt" style:font-weight-asian="bold" style:font-size-complex="7pt"/>
    </style:style>
    <style:style style:name="T54" style:family="text">
      <style:text-properties fo:color="#008000" loext:opacity="100%" style:font-name="JetBrains Mono ExtraLight" fo:font-size="7pt" fo:language="zxx" fo:country="none" fo:font-style="normal" style:text-underline-style="none" fo:font-weight="bold" fo:background-color="transparent" loext:char-shading-value="0" style:font-size-asian="7pt" style:font-size-complex="7pt"/>
    </style:style>
    <style:style style:name="T55" style:family="text">
      <style:text-properties fo:font-size="8pt" fo:font-weight="normal" officeooo:rsid="001f4fe5" style:font-size-asian="8pt" style:font-weight-asian="normal" style:font-size-complex="8pt" style:font-weight-complex="normal"/>
    </style:style>
    <style:style style:name="T56" style:family="text">
      <style:text-properties fo:font-size="10pt" fo:font-style="italic" style:font-size-asian="10pt" style:font-style-asian="italic" style:font-size-complex="10pt" style:font-style-complex="italic"/>
    </style:style>
    <style:style style:name="T57" style:family="text">
      <style:text-properties officeooo:rsid="001ff03b"/>
    </style:style>
    <style:style style:name="T58" style:family="text">
      <style:text-properties fo:font-size="8pt" fo:font-weight="normal" officeooo:rsid="0020e4c1" style:font-size-asian="8pt" style:font-weight-asian="normal" style:font-size-complex="8pt" style:font-weight-complex="normal"/>
    </style:style>
    <style:style style:name="T59" style:family="text">
      <style:text-properties officeooo:rsid="0021fed2"/>
    </style:style>
    <style:style style:name="T60" style:family="text">
      <style:text-properties fo:font-size="8pt" fo:font-weight="normal" officeooo:rsid="00290d53" style:font-size-asian="8pt" style:font-weight-asian="normal" style:font-size-complex="8pt" style:font-weight-complex="normal"/>
    </style:style>
    <style:style style:name="T61" style:family="text">
      <style:text-properties fo:font-weight="normal" officeooo:rsid="00255796" style:font-weight-asian="normal" style:font-weight-complex="normal"/>
    </style:style>
    <style:style style:name="T62" style:family="text">
      <style:text-properties fo:font-size="8pt" fo:font-weight="normal" officeooo:rsid="00255796" style:font-size-asian="8pt" style:font-weight-asian="normal" style:font-size-complex="8pt" style:font-weight-complex="normal"/>
    </style:style>
    <style:style style:name="T63" style:family="text">
      <style:text-properties fo:font-size="8pt" fo:font-weight="normal" officeooo:rsid="002be1d5" style:font-size-asian="8pt" style:font-weight-asian="normal" style:font-size-complex="8pt" style:font-weight-complex="normal"/>
    </style:style>
    <style:style style:name="T64" style:family="text">
      <style:text-properties fo:font-weight="normal" officeooo:rsid="00290d53" style:font-weight-asian="normal" style:font-weight-complex="normal"/>
    </style:style>
    <style:style style:name="T65" style:family="text">
      <style:text-properties fo:font-size="8pt" fo:font-style="italic" fo:font-weight="normal" officeooo:rsid="002be1d5" style:font-size-asian="8pt" style:font-style-asian="italic" style:font-weight-asian="normal" style:font-size-complex="8pt" style:font-style-complex="italic" style:font-weight-complex="normal"/>
    </style:style>
    <style:style style:name="T66" style:family="text">
      <style:text-properties fo:font-weight="normal" officeooo:rsid="002a4772" style:font-weight-asian="normal" style:font-weight-complex="normal"/>
    </style:style>
    <style:style style:name="T67" style:family="text">
      <style:text-properties fo:font-size="8pt" fo:font-weight="normal" officeooo:rsid="002a4772" style:font-size-asian="8pt" style:font-weight-asian="normal" style:font-size-complex="8pt" style:font-weight-complex="normal"/>
    </style:style>
    <style:style style:name="T68" style:family="text">
      <style:text-properties fo:font-size="8pt" fo:font-style="italic" fo:font-weight="normal" officeooo:rsid="002a4772" style:font-size-asian="8pt" style:font-style-asian="italic" style:font-weight-asian="normal" style:font-size-complex="8pt" style:font-style-complex="italic" style:font-weight-complex="normal"/>
    </style:style>
    <style:style style:name="T69" style:family="text">
      <style:text-properties officeooo:rsid="0039debe"/>
    </style:style>
    <style:style style:name="T70" style:family="text">
      <style:text-properties fo:font-weight="normal" officeooo:rsid="003fb5a8" style:font-weight-asian="normal" style:font-weight-complex="normal"/>
    </style:style>
    <style:style style:name="T71" style:family="text">
      <style:text-properties fo:font-style="italic" fo:font-weight="normal" officeooo:rsid="003fb5a8" style:font-style-asian="italic" style:font-weight-asian="normal" style:font-style-complex="italic" style:font-weight-complex="normal"/>
    </style:style>
    <style:style style:name="T72" style:family="text">
      <style:text-properties fo:font-size="8pt" fo:font-weight="normal" officeooo:rsid="003bdd99" style:font-size-asian="8pt" style:font-weight-asian="normal" style:font-size-complex="8pt" style:font-weight-complex="normal"/>
    </style:style>
    <style:style style:name="T73" style:family="text">
      <style:text-properties fo:font-size="8pt" fo:font-weight="normal" officeooo:rsid="003d7475" style:font-size-asian="8pt" style:font-weight-asian="normal" style:font-size-complex="8pt" style:font-weight-complex="normal"/>
    </style:style>
    <style:style style:name="T74" style:family="text">
      <style:text-properties fo:font-size="8pt" fo:font-weight="normal" officeooo:rsid="0041b7e7" style:font-size-asian="8pt" style:font-weight-asian="normal" style:font-size-complex="8pt" style:font-weight-complex="normal"/>
    </style:style>
    <style:style style:name="T75" style:family="text">
      <style:text-properties officeooo:rsid="00382b5d"/>
    </style:style>
    <style:style style:name="T76" style:family="text">
      <style:text-properties officeooo:rsid="003514f5"/>
    </style:style>
    <style:style style:name="T77" style:family="text">
      <style:text-properties fo:language="en" fo:country="US"/>
    </style:style>
    <style:style style:name="T78" style:family="text">
      <style:text-properties fo:language="en" fo:country="US" fo:font-style="italic" fo:font-weight="normal" style:font-style-asian="italic" style:font-weight-asian="normal" style:font-style-complex="italic" style:font-weight-complex="normal"/>
    </style:style>
    <style:style style:name="T79" style:family="text">
      <style:text-properties fo:font-style="italic" fo:font-weight="normal" officeooo:rsid="0021fed2" style:font-style-asian="italic" style:font-weight-asian="normal" style:font-style-complex="italic"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6.4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7.27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4.58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0cm, 0cm, 5.8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from-left" style:horizontal-rel="page" style:mirror="none" fo:clip="rect(0cm, 0cm, 7.64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3" text:anchor-type="page" text:anchor-page-number="37" svg:x="2cm" svg:y="9.04cm" svg:width="17cm" svg:height="8.234cm" draw:z-index="17">
        <draw:image xlink:href="Pictures/100000010000077C000003A0FB7AFBA6.png" xlink:type="simple" xlink:show="embed" xlink:actuate="onLoad" draw:mime-type="image/png"/>
      </draw:frame>
      <draw:frame draw:style-name="fr6" draw:name="Image12" text:anchor-type="page" text:anchor-page-number="35" svg:x="4.999cm" svg:y="19.013cm" svg:width="11.005cm" svg:height="3.219cm" draw:z-index="16">
        <draw:image xlink:href="Pictures/10000001000002F7000000DE5C4F8AD7.png" xlink:type="simple" xlink:show="embed" xlink:actuate="onLoad" draw:mime-type="image/png"/>
      </draw:frame>
      <draw:frame draw:style-name="fr7" draw:name="Image11" text:anchor-type="page" text:anchor-page-number="35" svg:x="5.091cm" svg:y="9.566cm" svg:width="10.821cm" svg:height="4.216cm" draw:z-index="15">
        <draw:image xlink:href="Pictures/100000010000028E000001AC6A122E6E.png" xlink:type="simple" xlink:show="embed" xlink:actuate="onLoad" draw:mime-type="image/png"/>
      </draw:frame>
      <draw:frame draw:style-name="fr8" draw:name="Image18" text:anchor-type="page" text:anchor-page-number="24" svg:y="0cm" svg:width="17cm" svg:height="12.686cm" draw:z-index="14">
        <draw:image xlink:href="Pictures/10000001000003F9000002F7D78E24CC.png" xlink:type="simple" xlink:show="embed" xlink:actuate="onLoad" draw:mime-type="image/png"/>
      </draw:frame>
      <draw:frame draw:style-name="fr9" draw:name="Image17" text:anchor-type="page" text:anchor-page-number="21" svg:y="7.461cm" svg:width="17cm" svg:height="12.686cm" draw:z-index="13">
        <draw:image xlink:href="Pictures/10000001000003F9000002F7DD28357A.png" xlink:type="simple" xlink:show="embed" xlink:actuate="onLoad" draw:mime-type="image/png"/>
      </draw:frame>
      <draw:frame draw:style-name="fr10" draw:name="Image16" text:anchor-type="page" text:anchor-page-number="18" svg:x="0cm" svg:y="0cm" svg:width="17cm" svg:height="12.686cm" draw:z-index="12">
        <draw:image xlink:href="Pictures/10000001000003F9000002F7D10B757C.png" xlink:type="simple" xlink:show="embed" xlink:actuate="onLoad" draw:mime-type="image/png"/>
      </draw:frame>
      <draw:frame draw:style-name="fr10" draw:name="Image15" text:anchor-type="page" text:anchor-page-number="15" svg:x="0cm" svg:y="0cm" svg:width="17cm" svg:height="12.728cm" draw:z-index="11">
        <draw:image xlink:href="Pictures/10000001000003F7000002F84638A3E9.png" xlink:type="simple" xlink:show="embed" xlink:actuate="onLoad" draw:mime-type="image/png"/>
      </draw:frame>
      <draw:frame draw:style-name="fr11" draw:name="Image14" text:anchor-type="page" text:anchor-page-number="13" svg:y="18.48cm" svg:width="8.878cm" svg:height="8.033cm" draw:z-index="10">
        <draw:image xlink:href="Pictures/10000001000004B500000442B9723C88.png" xlink:type="simple" xlink:show="embed" xlink:actuate="onLoad" draw:mime-type="image/png"/>
      </draw:frame>
      <draw:frame draw:style-name="fr12" draw:name="Image10" text:anchor-type="page" text:anchor-page-number="37" svg:x="5.022cm" svg:y="22.416cm" svg:width="10.957cm" svg:height="3.378cm" draw:z-index="18">
        <draw:image xlink:href="Pictures/100000010000028E000001A633808EFB.png" xlink:type="simple" xlink:show="embed" xlink:actuate="onLoad" draw:mime-type="image/png"/>
      </draw:frame>
      <draw:frame draw:style-name="fr10" draw:name="Image19" text:anchor-type="page" text:anchor-page-number="38" svg:x="0cm" svg:y="0cm" svg:width="17cm" svg:height="5.923cm" draw:z-index="19">
        <draw:image xlink:href="Pictures/10000001000007100000027669D82A71.png" xlink:type="simple" xlink:show="embed" xlink:actuate="onLoad" draw:mime-type="image/png"/>
      </draw:frame>
      <draw:frame draw:style-name="fr6" draw:name="Image20" text:anchor-type="page" text:anchor-page-number="38" svg:x="2cm" svg:y="9.957cm" svg:width="17cm" svg:height="5.895cm" draw:z-index="20">
        <draw:image xlink:href="Pictures/10000001000004A70000019D3F59D96F.png" xlink:type="simple" xlink:show="embed" xlink:actuate="onLoad" draw:mime-type="image/png"/>
      </draw:frame>
      <draw:frame draw:style-name="fr13" draw:name="Image21" text:anchor-type="page" text:anchor-page-number="38" svg:x="2cm" svg:y="16.72cm" svg:width="17cm" svg:height="6.292cm" draw:z-index="21">
        <draw:image xlink:href="Pictures/10000001000003DD0000028FEB023D41.png" xlink:type="simple" xlink:show="embed" xlink:actuate="onLoad" draw:mime-type="image/png"/>
      </draw:frame>
      <text:p text:style-name="P1"><draw:frame draw:style-name="fr1" draw:name="Image1" text:anchor-type="paragraph" svg:y="0.307cm" svg:width="14.063cm" style:rel-width="scale" svg:height="4.136cm" style:rel-height="scale" draw:z-index="0"><draw:image xlink:href="Pictures/1000000000000CFA000003D11ECAF20F.jpg" xlink:type="simple" xlink:show="embed" xlink:actuate="onLoad" draw:mime-type="image/jpeg"/></draw:frame></text:p>
      <text:p text:style-name="Standard"/>
      <text:p text:style-name="Appendix"/>
      <text:p text:style-name="Appendix"/>
      <text:p text:style-name="Appendix"/>
      <text:p text:style-name="Appendix">Cyberbezpieczeństwo</text:p>
      <text:p text:style-name="Appendix">Projekt</text:p>
      <text:p text:style-name="P2"/>
      <text:p text:style-name="P2"/>
      <text:p text:style-name="P2"/>
      <text:p text:style-name="Appendix">Temat projektu</text:p>
      <text:p text:style-name="P3">Szyfrowanie plików i bezpieczna wymiana kluczy</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Jakub Lewandowski</text:p>
      <text:p text:style-name="P3">3EF-ZI</text:p>
      <text:p text:style-name="P3">178746</text:p>
      <text:p text:style-name="P3"/>
      <text:p text:style-name="P3">i</text:p>
      <text:p text:style-name="P3"/>
      <text:p text:style-name="P3">Paweł Torba</text:p>
      <text:p text:style-name="P3">3EF-ZI</text:p>
      <text:p text:style-name="P3">178763</text:p>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Spis treści</text:p>
          </text:index-title>
          <text:p text:style-name="P6"><text:a xlink:type="simple" xlink:href="#__RefHeading___Toc3534_2443504791" office:name="1. Cel projektu" text:style-name="Index_20_Link" text:visited-style-name="Index_20_Link">1. Cel projektu<text:tab/>4</text:a></text:p>
          <text:p text:style-name="P6"><text:a xlink:type="simple" xlink:href="#__RefHeading___Toc1830_2011108690" office:name="2. Główne funkcje i zakres systemu" text:style-name="Index_20_Link" text:visited-style-name="Index_20_Link">2. Główne funkcje i zakres systemu<text:tab/>4</text:a></text:p>
          <text:p text:style-name="P6"><text:s text:c="4"/><text:a xlink:type="simple" xlink:href="#__RefHeading___Toc5538_1844702946" office:name="2.1. Szyfrowanie danych" text:style-name="Index_20_Link" text:visited-style-name="Index_20_Link">2.1. Szyfrowanie danych<text:tab/>4</text:a></text:p>
          <text:p text:style-name="P6"><text:s text:c="4"/><text:a xlink:type="simple" xlink:href="#__RefHeading___Toc5540_1844702946" office:name="2.2. Deszyfrowanie danych" text:style-name="Index_20_Link" text:visited-style-name="Index_20_Link">2.2. Deszyfrowanie danych<text:tab/>4</text:a></text:p>
          <text:p text:style-name="P6"><text:s text:c="4"/><text:a xlink:type="simple" xlink:href="#__RefHeading___Toc5542_1844702946" office:name="2.3. Tworzenie podpisu cyfrowego" text:style-name="Index_20_Link" text:visited-style-name="Index_20_Link">2.3. Tworzenie podpisu cyfrowego<text:tab/>4</text:a></text:p>
          <text:p text:style-name="P6"><text:s text:c="4"/><text:a xlink:type="simple" xlink:href="#__RefHeading___Toc5544_1844702946" office:name="2.4. Weryfikacja podpisu cyfrowego" text:style-name="Index_20_Link" text:visited-style-name="Index_20_Link">2.4. Weryfikacja podpisu cyfrowego<text:tab/>4</text:a></text:p>
          <text:p text:style-name="P6"><text:s text:c="4"/><text:a xlink:type="simple" xlink:href="#__RefHeading___Toc5546_1844702946" office:name="2.5. Generowanie kluczy" text:style-name="Index_20_Link" text:visited-style-name="Index_20_Link">2.5. Generowanie kluczy<text:tab/>4</text:a></text:p>
          <text:p text:style-name="P6"><text:s text:c="4"/><text:a xlink:type="simple" xlink:href="#__RefHeading___Toc1834_2011108690_Copy_1" office:name="2.6. Szyfrowanie hybrydowe" text:style-name="Index_20_Link" text:visited-style-name="Index_20_Link">2.6. Szyfrowanie hybrydowe<text:tab/>5</text:a></text:p>
          <text:p text:style-name="P6"><text:a xlink:type="simple" xlink:href="#__RefHeading___Toc1832_2011108690" office:name="3. Podstawy teoretyczne kryptografii" text:style-name="Index_20_Link" text:visited-style-name="Index_20_Link">3. Podstawy teoretyczne kryptografii<text:tab/>5</text:a></text:p>
          <text:p text:style-name="P6"><text:s text:c="4"/><text:a xlink:type="simple" xlink:href="#__RefHeading___Toc1834_2011108690" office:name="3.1. Kryptografia symetryczna" text:style-name="Index_20_Link" text:visited-style-name="Index_20_Link">3.1. Kryptografia symetryczna<text:tab/>5</text:a></text:p>
          <text:p text:style-name="P6"><text:s text:c="4"/><text:a xlink:type="simple" xlink:href="#__RefHeading___Toc1836_2011108690" office:name="3.2. Kryptografia asymetryczna" text:style-name="Index_20_Link" text:visited-style-name="Index_20_Link">3.2. Kryptografia asymetryczna<text:tab/>6</text:a></text:p>
          <text:p text:style-name="P6"><text:s text:c="4"/><text:a xlink:type="simple" xlink:href="#__RefHeading___Toc1844_2011108690" office:name="3.3. Podpis cyfrowy" text:style-name="Index_20_Link" text:visited-style-name="Index_20_Link">3.3. Podpis cyfrowy<text:tab/>7</text:a></text:p>
          <text:p text:style-name="P6"><text:s text:c="4"/><text:a xlink:type="simple" xlink:href="#__RefHeading___Toc1846_2011108690" office:name="3.4. Integralność i poufność danych" text:style-name="Index_20_Link" text:visited-style-name="Index_20_Link">3.4. Integralność i poufność danych<text:tab/>7</text:a></text:p>
          <text:p text:style-name="P6"><text:s text:c="4"/><text:a xlink:type="simple" xlink:href="#__RefHeading___Toc1838_2011108690" office:name="3.5. Algorytm AES" text:style-name="Index_20_Link" text:visited-style-name="Index_20_Link">3.5. Algorytm AES<text:tab/>7</text:a></text:p>
          <text:p text:style-name="P6"><text:s text:c="8"/><text:a xlink:type="simple" xlink:href="#__RefHeading___Toc5548_1844702946" office:name="3.5.1. Proces szyfrowania" text:style-name="Index_20_Link" text:visited-style-name="Index_20_Link">3.5.1. Proces szyfrowania<text:tab/>8</text:a></text:p>
          <text:p text:style-name="P6"><text:s text:c="8"/><text:a xlink:type="simple" xlink:href="#__RefHeading___Toc5550_1844702946" office:name="3.5.2. Rozszerzanie klucza (Key Expansion)" text:style-name="Index_20_Link" text:visited-style-name="Index_20_Link">3.5.2. Rozszerzanie klucza (Key Expansion)<text:tab/>8</text:a></text:p>
          <text:p text:style-name="P6"><text:s text:c="8"/><text:a xlink:type="simple" xlink:href="#__RefHeading___Toc5552_1844702946" office:name="3.5.3. Zalety algorytmu AES" text:style-name="Index_20_Link" text:visited-style-name="Index_20_Link">3.5.3. Zalety algorytmu AES<text:tab/>9</text:a></text:p>
          <text:p text:style-name="P6"><text:s text:c="8"/><text:a xlink:type="simple" xlink:href="#__RefHeading___Toc5554_1844702946" office:name="3.5.4. Wady algorytmu AES" text:style-name="Index_20_Link" text:visited-style-name="Index_20_Link">3.5.4. Wady algorytmu AES<text:tab/>9</text:a></text:p>
          <text:p text:style-name="P6"><text:s text:c="8"/><text:a xlink:type="simple" xlink:href="#__RefHeading___Toc1838_2011108690_Copy_1" office:name="3.5.5. Zastosowania algorytmu AES" text:style-name="Index_20_Link" text:visited-style-name="Index_20_Link">3.5.5. Zastosowania algorytmu AES<text:tab/>9</text:a></text:p>
          <text:p text:style-name="P6"><text:s text:c="4"/><text:a xlink:type="simple" xlink:href="#__RefHeading___Toc1840_2011108690" office:name="3.6. Algorytm RSA" text:style-name="Index_20_Link" text:visited-style-name="Index_20_Link">3.6. Algorytm RSA<text:tab/>9</text:a></text:p>
          <text:p text:style-name="P6"><text:s text:c="8"/><text:a xlink:type="simple" xlink:href="#__RefHeading___Toc3125_2011108690" office:name="3.6.1. Zasada działania RSA" text:style-name="Index_20_Link" text:visited-style-name="Index_20_Link">3.6.1. Zasada działania RSA<text:tab/>10</text:a></text:p>
          <text:p text:style-name="P6"><text:s text:c="8"/><text:a xlink:type="simple" xlink:href="#__RefHeading___Toc5556_1844702946" office:name="3.6.2. Podpisywanie wiadomości" text:style-name="Index_20_Link" text:visited-style-name="Index_20_Link">3.6.2. Podpisywanie wiadomości<text:tab/>10</text:a></text:p>
          <text:p text:style-name="P6"><text:s text:c="8"/><text:a xlink:type="simple" xlink:href="#__RefHeading___Toc5558_1844702946" office:name="3.6.3. Zastosowanie" text:style-name="Index_20_Link" text:visited-style-name="Index_20_Link">3.6.3. Zastosowanie<text:tab/>10</text:a></text:p>
          <text:p text:style-name="P6"><text:s text:c="8"/><text:a xlink:type="simple" xlink:href="#__RefHeading___Toc5560_1844702946" office:name="3.6.4. Zalety RSA" text:style-name="Index_20_Link" text:visited-style-name="Index_20_Link">3.6.4. Zalety RSA<text:tab/>11</text:a></text:p>
          <text:p text:style-name="P6"><text:s text:c="8"/><text:a xlink:type="simple" xlink:href="#__RefHeading___Toc3125_2011108690_Copy_1" office:name="3.6.5. Zalety RSA" text:style-name="Index_20_Link" text:visited-style-name="Index_20_Link">3.6.5. Zalety RSA<text:tab/>11</text:a></text:p>
          <text:p text:style-name="P6"><text:s text:c="4"/><text:a xlink:type="simple" xlink:href="#__RefHeading___Toc1842_2011108690" office:name="3.7. SHA-256" text:style-name="Index_20_Link" text:visited-style-name="Index_20_Link">3.7. SHA-256<text:tab/>11</text:a></text:p>
          <text:p text:style-name="P6"><text:s text:c="8"/><text:a xlink:type="simple" xlink:href="#__RefHeading___Toc6486_2011108690" office:name="3.7.1. Proces obliczania skrótu" text:style-name="Index_20_Link" text:visited-style-name="Index_20_Link">3.7.1. Proces obliczania skrótu<text:tab/>11</text:a></text:p>
          <text:p text:style-name="P6"><text:s text:c="8"/><text:a xlink:type="simple" xlink:href="#__RefHeading___Toc6488_2011108690" office:name="3.7.2. Zalety algorytmu SHA-256" text:style-name="Index_20_Link" text:visited-style-name="Index_20_Link">3.7.2. Zalety algorytmu SHA-256<text:tab/>12</text:a></text:p>
          <text:p text:style-name="P6"><text:s text:c="8"/><text:a xlink:type="simple" xlink:href="#__RefHeading___Toc6490_2011108690" office:name="3.7.3. Wady algorytmu SHA-256" text:style-name="Index_20_Link" text:visited-style-name="Index_20_Link">3.7.3. Wady algorytmu SHA-256<text:tab/>12</text:a></text:p>
          <text:p text:style-name="P6"><text:s text:c="8"/><text:a xlink:type="simple" xlink:href="#__RefHeading___Toc6492_2011108690" office:name="3.7.4. Zastosowania" text:style-name="Index_20_Link" text:visited-style-name="Index_20_Link">3.7.4. Zastosowania<text:tab/>12</text:a></text:p>
          <text:p text:style-name="P6"><text:a xlink:type="simple" xlink:href="#__RefHeading___Toc425_2443504791_Copy_1_" office:name="4. Technologie i narzędzia" text:style-name="Index_20_Link" text:visited-style-name="Index_20_Link">4. Technologie i narzędzia<text:tab/>12</text:a></text:p>
          <text:p text:style-name="P6"><text:a xlink:type="simple" xlink:href="#__RefHeading___Toc12126_3356077753" office:name="5. Architektura aplikacji" text:style-name="Index_20_Link" text:visited-style-name="Index_20_Link">5. Architektura aplikacji<text:tab/>13</text:a></text:p>
          <text:p text:style-name="P6"><text:s text:c="4"/><text:a xlink:type="simple" xlink:href="#__RefHeading___Toc1848_2011108690" office:name="5.1. Struktura katalogów i plików" text:style-name="Index_20_Link" text:visited-style-name="Index_20_Link">5.1. Struktura katalogów i plików<text:tab/>13</text:a></text:p>
          <text:p text:style-name="P6"><text:s text:c="4"/><text:a xlink:type="simple" xlink:href="#__RefHeading___Toc8713_1672344883" office:name="5.2. Moduły systemu" text:style-name="Index_20_Link" text:visited-style-name="Index_20_Link">5.2. Moduły systemu<text:tab/>14</text:a></text:p>
          <text:p text:style-name="P6"><text:s text:c="4"/><text:a xlink:type="simple" xlink:href="#__RefHeading___Toc8715_1672344883" office:name="5.2.1. Moduł szyfrowania" text:style-name="Index_20_Link" text:visited-style-name="Index_20_Link">5.2.1. Moduł szyfrowania<text:tab/>14</text:a></text:p>
          <text:p text:style-name="P6"><text:s text:c="8"/><text:a xlink:type="simple" xlink:href="#__RefHeading___Toc6705_3721631286" office:name="5.2.2. Moduł deszyfrowania" text:style-name="Index_20_Link" text:visited-style-name="Index_20_Link">5.2.2. Moduł deszyfrowania<text:tab/>17</text:a></text:p>
          <text:p text:style-name="P6"><text:s text:c="8"/><text:a xlink:type="simple" xlink:href="#__RefHeading___Toc6707_3721631286" office:name="5.2.3. Moduł podpisu cyfrowego" text:style-name="Index_20_Link" text:visited-style-name="Index_20_Link">5.2.3. Moduł podpisu cyfrowego<text:tab/>21</text:a></text:p>
          <text:p text:style-name="P6"><text:s text:c="8"/><text:a xlink:type="simple" xlink:href="#__RefHeading___Toc6709_3721631286" office:name="5.2.5. Moduł generowania kluczy" text:style-name="Index_20_Link" text:visited-style-name="Index_20_Link">5.2.5. Moduł generowania kluczy<text:tab/>23</text:a></text:p>
          <text:p text:style-name="P6"><text:a xlink:type="simple" xlink:href="#__RefHeading___Toc5562_1844702946" office:name="6. Bezpieczeństwo systemu i możliwe zagrożenia" text:style-name="Index_20_Link" text:visited-style-name="Index_20_Link">6. Bezpieczeństwo systemu i możliwe zagrożenia<text:tab/>25</text:a></text:p>
          <text:p text:style-name="P6"><text:s text:c="4"/><text:a xlink:type="simple" xlink:href="#__RefHeading___Toc14504_1844702946" office:name="6.1. Założenia bezpieczeństwa systemu" text:style-name="Index_20_Link" text:visited-style-name="Index_20_Link">6.1. Założenia bezpieczeństwa systemu<text:tab/>25</text:a></text:p>
          <text:p text:style-name="P6"><text:s text:c="4"/><text:a xlink:type="simple" xlink:href="#__RefHeading___Toc14506_1844702946" office:name="6.2. Ochrona poufności danych" text:style-name="Index_20_Link" text:visited-style-name="Index_20_Link">6.2. Ochrona poufności danych<text:tab/>26</text:a></text:p>
          <text:p text:style-name="P6"><text:s text:c="4"/><text:a xlink:type="simple" xlink:href="#__RefHeading___Toc14508_1844702946" office:name="6.3. Bezpieczna wymiana kluczy" text:style-name="Index_20_Link" text:visited-style-name="Index_20_Link">6.3. Bezpieczna wymiana kluczy<text:tab/>26</text:a></text:p>
          <text:p text:style-name="P6"><text:s text:c="4"/><text:a xlink:type="simple" xlink:href="#__RefHeading___Toc9793_1844702946" office:name="6.4. Integralność i autentyczność danych" text:style-name="Index_20_Link" text:visited-style-name="Index_20_Link">6.4. Integralność i autentyczność danych<text:tab/>26</text:a></text:p>
          <text:p text:style-name="P6"><text:s text:c="4"/><text:a xlink:type="simple" xlink:href="#__RefHeading___Toc9797_1844702946_Copy_1" office:name="6.5. Możliwe zagrożenia" text:style-name="Index_20_Link" text:visited-style-name="Index_20_Link">6.5. Możliwe zagrożenia<text:tab/>26</text:a></text:p>
          <text:p text:style-name="P6"><text:s text:c="4"/><text:a xlink:type="simple" xlink:href="#__RefHeading___Toc14510_1844702946" office:name="6.7. Metody ograniczania ryzyka" text:style-name="Index_20_Link" text:visited-style-name="Index_20_Link">6.7. Metody ograniczania ryzyka<text:tab/>27</text:a></text:p>
          <text:p text:style-name="P6"><text:a xlink:type="simple" xlink:href="#__RefHeading___Toc9134_1844702946" office:name="7. Możliwości wdrożenia i zastosowania systemu" text:style-name="Index_20_Link" text:visited-style-name="Index_20_Link">7. Możliwości wdrożenia i zastosowania systemu<text:tab/>28</text:a></text:p>
          <text:p text:style-name="P6"><text:soft-page-break/><text:s text:c="4"/><text:a xlink:type="simple" xlink:href="#__RefHeading___Toc14512_1844702946" office:name="7.1. Zastosowanie systemu i przykładowa wymiana plików" text:style-name="Index_20_Link" text:visited-style-name="Index_20_Link">7.1. Zastosowanie systemu i przykładowa wymiana plików<text:tab/>28</text:a></text:p>
          <text:p text:style-name="P6"><text:s text:c="4"/><text:a xlink:type="simple" xlink:href="#__RefHeading___Toc14514_1844702946" office:name="7.2. Ograniczenia obecnej wersji systemu" text:style-name="Index_20_Link" text:visited-style-name="Index_20_Link">7.2. Ograniczenia obecnej wersji systemu<text:tab/>28</text:a></text:p>
          <text:p text:style-name="P6"><text:s text:c="4"/><text:a xlink:type="simple" xlink:href="#__RefHeading___Toc14516_1844702946" office:name="7.3. Możliwości dalszego rozwoju" text:style-name="Index_20_Link" text:visited-style-name="Index_20_Link">7.3. Możliwości dalszego rozwoju<text:tab/>29</text:a></text:p>
          <text:p text:style-name="P6"><text:a xlink:type="simple" xlink:href="#__RefHeading___Toc5888_1672344883" office:name="8. Przykłady użycia i testowanie systemu" text:style-name="Index_20_Link" text:visited-style-name="Index_20_Link">8. Przykłady użycia i testowanie systemu<text:tab/>29</text:a></text:p>
          <text:p text:style-name="P6"><text:s text:c="4"/><text:a xlink:type="simple" xlink:href="#__RefHeading___Toc5890_1672344883" office:name="8.1. Generowanie kluczy RSA" text:style-name="Index_20_Link" text:visited-style-name="Index_20_Link">8.1. Generowanie kluczy RSA<text:tab/>29</text:a></text:p>
          <text:p text:style-name="P6"><text:s text:c="4"/><text:a xlink:type="simple" xlink:href="#__RefHeading___Toc5896_1672344883" office:name="8.2. Szyfrowanie i odszyfrowanie dokumentu" text:style-name="Index_20_Link" text:visited-style-name="Index_20_Link">8.2. Szyfrowanie i odszyfrowanie dokumentu<text:tab/>30</text:a></text:p>
          <text:p text:style-name="P6"><text:s text:c="4"/><text:a xlink:type="simple" xlink:href="#__RefHeading___Toc15643_1844702946" office:name="8.3. Szyfrowanie hybrydowe" text:style-name="Index_20_Link" text:visited-style-name="Index_20_Link">8.3. Szyfrowanie hybrydowe<text:tab/>32</text:a></text:p>
          <text:p text:style-name="P6"><text:s text:c="4"/><text:a xlink:type="simple" xlink:href="#__RefHeading___Toc15645_1844702946" office:name="8.4. Podpisanie dokumentu i weryfikacja podpisu" text:style-name="Index_20_Link" text:visited-style-name="Index_20_Link">8.4. Podpisanie dokumentu i weryfikacja podpisu<text:tab/>34</text:a></text:p>
          <text:p text:style-name="P6"><text:s text:c="4"/><text:a xlink:type="simple" xlink:href="#__RefHeading___Toc15647_1844702946" office:name="8.5. Kompatybilność z innymi programami" text:style-name="Index_20_Link" text:visited-style-name="Index_20_Link">8.5. Kompatybilność z innymi programami<text:tab/>35</text:a></text:p>
          <text:p text:style-name="P6"><text:s text:c="4"/><text:a xlink:type="simple" xlink:href="#__RefHeading___Toc15649_1844702946%20Copy%201" office:name="8.6. Szyfrowanie wielowarstwowe" text:style-name="Index_20_Link" text:visited-style-name="Index_20_Link">8.6. Szyfrowanie wielowarstwowe<text:tab/>37</text:a></text:p>
          <text:p text:style-name="P6"><text:s text:c="4"/><text:a xlink:type="simple" xlink:href="#__RefHeading___Toc15649_1844702946" office:name="8.7. Ocena poprawności działania systemu" text:style-name="Index_20_Link" text:visited-style-name="Index_20_Link">8.7. Ocena poprawności działania systemu<text:tab/>39</text:a></text:p>
          <text:p text:style-name="P6"><text:a xlink:type="simple" xlink:href="#__RefHeading___Toc3006_1804544189" office:name="9. Podsumowanie i wnioski" text:style-name="Index_20_Link" text:visited-style-name="Index_20_Link">9. Podsumowanie i wnioski<text:tab/>39</text:a></text:p>
          <text:p text:style-name="P6"><text:a xlink:type="simple" xlink:href="#__RefHeading___Toc431_2443504791_Copy_1" office:name="10. Bibliografia" text:style-name="Index_20_Link" text:visited-style-name="Index_20_Link">10. Bibliografia<text:tab/>41</text:a></text:p>
        </text:index-body>
      </text:table-of-content>
      <text:h text:style-name="Nagłówek_20_1" text:outline-level="1"/>
      <text:h text:style-name="P7" text:outline-level="1"><text:bookmark-start text:name="__RefHeading___Toc3534_2443504791"/><text:span text:style-name="Strong_20_Emphasis">1.<text:tab/>Cel projektu</text:span><text:bookmark-end text:name="__RefHeading___Toc3534_2443504791"/></text:h>
      <text:p text:style-name="P8"><text:tab/>Celem projektu jest opracowanie prostej aplikacji umożliwiającej bezpieczne szyfrowanie i wymianę danych. System ma pozwalać na zaszyfrowanie pliku oraz tekstu, generowanie klucza szyfrującego (i jego szyfrowanie w celu bezpiecznej wymiany), podpisanie pliku podpisem cyfrowym, weryfikację podpisu oraz odszyfrowanie pliku po stronie odbiorcy.</text:p>
      <text:p text:style-name="P8"><text:tab/>Projekt obejmuje również analizę teoretycznych podstaw kryptografii, w szczególności zagadnień związanych z szyfrowaniem symetrycznym i asymetrycznym, podpisem cyfrowym, bezpieczną wymianą kluczy oraz mechanizmami zapewniania integralności i bezpieczeństwa danych.</text:p>
      <text:h text:style-name="P9" text:outline-level="1"><text:bookmark-start text:name="__RefHeading___Toc1830_2011108690"/><text:span text:style-name="Strong_20_Emphasis">2.</text:span><text:tab/><text:span text:style-name="Strong_20_Emphasis">Główne funkcje i zakres systemu</text:span><text:bookmark-end text:name="__RefHeading___Toc1830_2011108690"/></text:h>
      <text:h text:style-name="P10" text:outline-level="2"><text:bookmark-start text:name="__RefHeading___Toc5538_1844702946"/><text:span text:style-name="Domyślna_20_czcionka_20_akapitu">2.1. <text:tab/>Szyfrowanie danych</text:span><text:bookmark-end text:name="__RefHeading___Toc5538_1844702946"/></text:h>
      <text:p text:style-name="P8"><text:span text:style-name="Domyślna_20_czcionka_20_akapitu"><text:tab/>Użytkownik może wskazać plik wejściowy, lokalizację pliku wyjściowego, algorytm szyfrowania oraz podstawową konfigurację zmiennych algorytmu szyfrującego. Aplikacja automatycznie generuje klucze (np.: </text:span><text:span text:style-name="Domyślna_20_czcionka_20_akapitu"><text:span text:style-name="T1">AES</text:span></text:span><text:span text:style-name="Domyślna_20_czcionka_20_akapitu">) oraz wartość inne konieczne wartości (np.: </text:span><text:span text:style-name="Domyślna_20_czcionka_20_akapitu"><text:span text:style-name="T1">Nonce/IV</text:span></text:span><text:span text:style-name="Domyślna_20_czcionka_20_akapitu">), wymagane do bezpiecznego zaszyfrowania pliku.</text:span></text:p>
      <text:h text:style-name="P10" text:outline-level="2"><text:bookmark-start text:name="__RefHeading___Toc5540_1844702946"/><text:span text:style-name="Domyślna_20_czcionka_20_akapitu">2.2. <text:tab/>Deszyfrowanie danych</text:span><text:bookmark-end text:name="__RefHeading___Toc5540_1844702946"/></text:h>
      <text:p text:style-name="P8"><text:span text:style-name="Domyślna_20_czcionka_20_akapitu"><text:tab/>Użytkownik może wskazać zaszyfrowany plik, lokalizację pliku wynikowego, klucz oraz inne wartość wykorzystane podczas szyfrowania. W przypadku zastosowania szyfrowania hybrydowego możliwe jest również wykorzystanie klucza prywatnego do odszyfrowania klucza szyfrującego.</text:span></text:p>
      <text:h text:style-name="P10" text:outline-level="2"><text:bookmark-start text:name="__RefHeading___Toc5542_1844702946"/><text:span text:style-name="Domyślna_20_czcionka_20_akapitu">2.3. <text:tab/>Tworzenie podpisu cyfrowego</text:span><text:bookmark-end text:name="__RefHeading___Toc5542_1844702946"/></text:h>
      <text:p text:style-name="P8"><text:span text:style-name="Domyślna_20_czcionka_20_akapitu"><text:tab/>Użytkownik może wskazać plik przeznaczony do podpisania, klucz prywatny oraz lokalizację zapisu podpisu cyfrowego. Aplikacja generuje skrót pliku przy użyciu algorytmu SHA-256, a następnie tworzy podpis cyfrowy, który pozwala potwierdzić autentyczność nadawcy oraz integralność danych.</text:span></text:p>
      <text:h text:style-name="P10" text:outline-level="2"><text:bookmark-start text:name="__RefHeading___Toc5544_1844702946"/><text:span text:style-name="Domyślna_20_czcionka_20_akapitu">2.4. <text:tab/>Weryfikacja podpisu cyfrowego</text:span><text:bookmark-end text:name="__RefHeading___Toc5544_1844702946"/></text:h>
      <text:p text:style-name="P8"><text:span text:style-name="Domyślna_20_czcionka_20_akapitu"><text:tab/>Użytkownik może wskazać plik, podpis cyfrowy oraz klucz publiczny nadawcy. Aplikacja sprawdza poprawność podpisu i informuje, czy plik został podpisany przez właściciela wskazanego klucza prywatnego oraz czy jego zawartość nie została zmodyfikowana po podpisaniu.<text:tab/></text:span></text:p>
      <text:h text:style-name="P10" text:outline-level="2"><text:bookmark-start text:name="__RefHeading___Toc5546_1844702946"/><text:span text:style-name="Domyślna_20_czcionka_20_akapitu">2.5. <text:tab/>Generowanie kluczy</text:span><text:bookmark-end text:name="__RefHeading___Toc5546_1844702946"/></text:h>
      <text:p text:style-name="P8"><text:span text:style-name="Domyślna_20_czcionka_20_akapitu">Użytkownik może wygenerować parę kluczy (publiczy i prywatny), określając ich rozmiar oraz lokalizację zapisania klucza publicznego i prywatnego. Wygenerowane klucze mogą zostać wykorzystane do szyfrowania hybrydowego oraz tworzenia i weryfikacji podpisów cyfrowych.</text:span></text:p>
      <text:h text:style-name="P10" text:outline-level="2"><text:bookmark-start text:name="__RefHeading___Toc1834_2011108690_Copy_1"/><text:soft-page-break/><text:span text:style-name="Domyślna_20_czcionka_20_akapitu">2.6. <text:tab/>Szyfrowanie hybrydowe</text:span><text:bookmark-end text:name="__RefHeading___Toc1834_2011108690_Copy_1"/></text:h>
      <text:p text:style-name="P8"><text:span text:style-name="Domyślna_20_czcionka_20_akapitu"><text:tab/>Użytkownik może zadecydować, czy wygenerowany podczas szyfrowania klucz ma zostać dodatkowo zabezpieczony przy użyciu klucza publicznego odbiorcy. W takim przypadku dane są szyfrowane wybranym algorytmem, natomiast klucz szyfrowania zostaje zaszyfrowany algorytmem RSA. Dzięki temu możliwe jest bezpieczne przekazanie klucza szyfrującego odbiorcy. Rozwiązanie to łączy wysoką wydajność kryptografii symetrycznej z bezpieczeństwem wymiany kluczy oferowanym przez kryptografię asymetryczną.</text:span></text:p>
      <text:h text:style-name="Nagłówek_20_1" text:outline-level="1"><text:bookmark-start text:name="__RefHeading___Toc1832_2011108690"/><text:span text:style-name="Domyślna_20_czcionka_20_akapitu">3. <text:tab/>Podstawy teoretyczne kryptografii</text:span><text:bookmark-end text:name="__RefHeading___Toc1832_2011108690"/></text:h>
      <text:p text:style-name="Text_20_body"><text:tab/>Kryptografia to praktyka i nauka zajmująca się technikami bezpiecznej komunikacji w obliczu działań podmiotów o wrogich zamiarach. Kryptografia polega na tworzeniu i analizowaniu protokołów, które uniemożliwiają osobom trzecim lub ogółowi społeczeństwa odczytanie prywatnych wiadomości.</text:p>
      <text:p text:style-name="Text_20_body"><text:tab/>Współczesna kryptografia stanowi punkt styku takich dyscyplin, jak matematyka, informatyka, bezpieczeństwo informacji, elektrotechnika, cyfrowe przetwarzanie sygnałów czy fizyka. Podstawowe pojęcia związane z bezpieczeństwem informacji (poufność danych, integralność danych, uwierzytelnianie i niezaprzeczalność) są również kluczowe dla kryptografii. Praktyczne zastosowania kryptografii obejmują handel elektroniczny, karty płatnicze oparte na chipach, waluty cyfrowe, hasła komputerowe oraz komunikację wojskową.</text:p>
      <text:h text:style-name="Nagłówek_20_2" text:outline-level="2"><text:bookmark-start text:name="__RefHeading___Toc1834_2011108690"/><text:span text:style-name="Domyślna_20_czcionka_20_akapitu">3.1. <text:tab/>Kryptografia symetryczna</text:span><text:bookmark-end text:name="__RefHeading___Toc1834_2011108690"/></text:h>
      <text:p text:style-name="P8"><text:span text:style-name="Domyślna_20_czcionka_20_akapitu"><text:tab/>Kryptografia symetryczna polega na tym, że nadawca i odbiorca używają tego samego tajnego klucza do szyfrowania i odszyfrowywania danych (klucz symetryczny) - oznacza to, że zarówno nadawca, jak i odbiorca muszą posiadać ten sam tajny klucz.</text:span></text:p>
      <text:p text:style-name="P8"><text:tab/>Szyfry oparte o kluczu 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 <text:span text:style-name="Default_20_Paragraph_20_Font"><text:span text:style-name="T1">DES (Data Encryption Standard)</text:span></text:span> czy <text:span text:style-name="Default_20_Paragraph_20_Font"><text:span text:style-name="T1">AES (Advanced Encryption Standard)</text:span></text:span>. Do szyfrów strumieniowych zalicza się <text:span text:style-name="Default_20_Paragraph_20_Font"><text:span text:style-name="T1">RC4</text:span></text:span>.</text:p>
      <text:p text:style-name="P8">Zalety kryptografii symetrycznej:</text:p>
      <text:list text:style-name="L1">
        <text:list-item>
          <text:p text:style-name="P11">wysoka szybkość działani,</text:p>
        </text:list-item>
        <text:list-item>
          <text:p text:style-name="P11">niskie wymagania obliczeniowe,</text:p>
        </text:list-item>
        <text:list-item>
          <text:p text:style-name="P11"><text:span text:style-name="Strong_20_Emphasis"><text:span text:style-name="T2">wysoka wydajność.</text:span></text:span></text:p>
        </text:list-item>
      </text:list>
      <text:p text:style-name="Text_20_body"><text:tab/>Wady kryptografii symetrycznej:</text:p>
      <text:list text:style-name="L2">
        <text:list-item>
          <text:p text:style-name="P12">problem dystrybucji klucza,</text:p>
        </text:list-item>
        <text:list-item>
          <text:p text:style-name="P12"><text:span text:style-name="Strong_20_Emphasis"><text:span text:style-name="T2">skalowalność.</text:span></text:span></text:p>
        </text:list-item>
      </text:list>
      <text:h text:style-name="Nagłówek_20_2" text:outline-level="2"><text:bookmark-start text:name="__RefHeading___Toc1836_2011108690"/><text:soft-page-break/><text:span text:style-name="Domyślna_20_czcionka_20_akapitu">3.2.<text:tab/>Kryptografia asymetryczna</text:span><text:bookmark-end text:name="__RefHeading___Toc1836_2011108690"/></text:h>
      <text:p text:style-name="P8"><text:span text:style-name="Strong_20_Emphasis"><text:span text:style-name="T2"><text:tab/></text:span></text:span><text:span text:style-name="Domyślna_20_czcionka_20_akapitu">Kryptografia asymetryczna polega na wykorzystaniu </text:span><text:span text:style-name="Strong_20_Emphasis"><text:span text:style-name="T2">dwóch różnych, lecz matematycznie powiązanych kluczy</text:span></text:span><text:span text:style-name="Domyślna_20_czcionka_20_akapitu">: klucza publicznego i klucza prywatnego. Klucz publiczny może być udostępniany wszystkim użytkownikom, natomiast klucz prywatny musi pozostać tajny i być znany wyłącznie właścicielowi. Dane zaszyfrowane kluczem publicznym mogą zostać odszyfrowane jedynie odpowiadającym mu kluczem prywatnym.</text:span></text:p>
      <text:p text:style-name="P8"><text:span text:style-name="Domyślna_20_czcionka_20_akapitu">Do najpopularniejszych algorytmów asymetrycznych zalicza się:</text:span></text:p>
      <text:list text:style-name="L3">
        <text:list-item>
          <text:p text:style-name="P13">RSA (Rivest–Shamir–Adleman),</text:p>
        </text:list-item>
        <text:list-item>
          <text:p text:style-name="P13">Diffie–Hellman,</text:p>
        </text:list-item>
        <text:list-item>
          <text:p text:style-name="P13">ECC (Elliptic Curve Cryptography),</text:p>
        </text:list-item>
        <text:list-item>
          <text:p text:style-name="P13">DSA (Digital Signature Algorithm).</text:p>
        </text:list-item>
      </text:list>
      <text:p text:style-name="P8"><text:tab/>Kryptografia asymetryczna jest wykorzystywana nie tylko do szyfrowania danych, ale również do tworzenia <text:span text:style-name="Strong_20_Emphasis"><text:span text:style-name="T2">podpisów cyfrowych</text:span></text:span>, które umożliwiają potwierdzenie autentyczności nadawcy oraz integralności przesyłanych danych.</text:p>
      <text:p text:style-name="P8"><text:tab/>Szyfry oparte o kluczu a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 <text:span text:style-name="Default_20_Paragraph_20_Font"><text:span text:style-name="T1">DES (Data Encryption Standard)</text:span></text:span> czy <text:span text:style-name="Default_20_Paragraph_20_Font"><text:span text:style-name="T1">AES (Advanced Encryption Standard)</text:span></text:span>. Do szyfrów strumieniowych zalicza się <text:span text:style-name="Default_20_Paragraph_20_Font"><text:span text:style-name="T1">RC4</text:span></text:span>.</text:p>
      <text:p text:style-name="P8"><text:span text:style-name="Strong_20_Emphasis"><text:span text:style-name="T2">Zalety kryptografii asymetrycznej:</text:span></text:span></text:p>
      <text:list text:style-name="L4">
        <text:list-item>
          <text:p text:style-name="P14"><text:span text:style-name="Strong_20_Emphasis"><text:span text:style-name="T2">brak konieczności bezpiecznego przekazywania tajnego klucza,</text:span></text:span></text:p>
        </text:list-item>
      </text:list>
      <text:list text:style-name="L5">
        <text:list-item>
          <text:p text:style-name="P15">możliwość stosowania podpisów cyfrowych,</text:p>
        </text:list-item>
      </text:list>
      <text:list text:style-name="L6">
        <text:list-item>
          <text:p text:style-name="P16">wysoki poziom bezpieczeństwa,</text:p>
        </text:list-item>
      </text:list>
      <text:list text:style-name="L7">
        <text:list-item>
          <text:p text:style-name="P17">dobra skalowalność w dużych sieciach.</text:p>
        </text:list-item>
      </text:list>
      <text:p text:style-name="P8"><text:tab/>Wady kryptografii asymetrycznej:</text:p>
      <text:list text:style-name="L8">
        <text:list-item>
          <text:p text:style-name="P18"><text:span text:style-name="Strong_20_Emphasis"><text:span text:style-name="T2">mniejsza szybkość działania w porównaniu z kryptografią symetryczną,</text:span></text:span></text:p>
        </text:list-item>
      </text:list>
      <text:list text:style-name="L9">
        <text:list-item>
          <text:p text:style-name="P19">większe wymagania obliczeniowe,</text:p>
        </text:list-item>
      </text:list>
      <text:list text:style-name="L10">
        <text:list-item>
          <text:p text:style-name="P20">nieefektywność przy szyfrowaniu dużych ilości danych.</text:p>
        </text:list-item>
      </text:list>
      <text:p text:style-name="P8"><text:span text:style-name="Strong_20_Emphasis"><text:span text:style-name="T2"><text:tab/>W praktyce kryptografia asymetryczna jest często łączona z kryptografią symetryczną. Klucz publiczny służy do bezpiecznej wymiany klucza symetrycznego, natomiast właściwe dane są szyfrowane szybszym algorytmem symetrycznym, takim jak </text:span></text:span><text:span text:style-name="Strong_20_Emphasis"><text:span text:style-name="T3">AES</text:span></text:span><text:span text:style-name="Strong_20_Emphasis"><text:span text:style-name="T2">.</text:span></text:span></text:p>
      <text:p text:style-name="Text_20_body"/>
      <text:p text:style-name="Text_20_body"/>
      <text:h text:style-name="P21" text:outline-level="2"><text:bookmark-start text:name="__RefHeading___Toc1844_2011108690"/><text:span text:style-name="Domyślna_20_czcionka_20_akapitu">3.3. Podpis cyfrowy</text:span><text:bookmark-end text:name="__RefHeading___Toc1844_2011108690"/></text:h>
      <text:p text:style-name="P8"><text:tab/>Podpis cyfrowy to mechanizm służący do potwierdzania autentyczności i integralności danych. Jest on tworzony przy użyciu klucza prywatnego nadawcy, a weryfikowany za pomocą klucza publicznego.</text:p>
      <text:p text:style-name="P8">Funkcje podpisu cyfrowego:</text:p>
      <text:list text:style-name="L11">
        <text:list-item>
          <text:p text:style-name="P22">potwierdzenie tożsamości nadawcy,</text:p>
        </text:list-item>
        <text:list-item>
          <text:p text:style-name="P22">ochrona przed modyfikacją danych,</text:p>
        </text:list-item>
        <text:list-item>
          <text:p text:style-name="P22">brak możliwości wyparcia się podpisu (niezaprzeczalność).</text:p>
        </text:list-item>
      </text:list>
      <text:p text:style-name="P8"><text:tab/>Podpis cyfrowy często wykorzystuje funkcje skrótu (np. <text:span text:style-name="T1">SHA-256</text:span>) oraz algorytmy asymetryczne (np. <text:span text:style-name="T1">RSA</text:span>).</text:p>
      <text:h text:style-name="Nagłówek_20_2" text:outline-level="2"><text:bookmark-start text:name="__RefHeading___Toc1846_2011108690"/><text:span text:style-name="Domyślna_20_czcionka_20_akapitu">3.4. Integralność i poufność danych</text:span><text:bookmark-end text:name="__RefHeading___Toc1846_2011108690"/></text:h>
      <text:p text:style-name="P8"><text:span text:style-name="Domyślna_20_czcionka_20_akapitu"><text:span text:style-name="T4"><text:tab/>I</text:span></text:span>ntegralność danych oznacza pewność, że dane nie zostały zmienione w nieautoryzowany sposób podczas przesyłania lub przechowywania. Do jej zapewnienia stosuje się m.in. funkcje skrótu i podpisy cyfrowe.</text:p>
      <text:p text:style-name="P8"><text:tab/>Poufność danych oznacza ochronę informacji przed nieautoryzowanym dostępem. Zapewnia się ją głównie poprzez szyfrowanie danych (np. <text:span text:style-name="T1">AES</text:span> lub <text:span text:style-name="T1">RSA</text:span>).</text:p>
      <text:p text:style-name="P8"><text:tab/>Obie te właściwości są fundamentem bezpieczeństwa systemów informatycznych i komunikacji cyfrowej.</text:p>
      <text:h text:style-name="Nagłówek_20_2" text:outline-level="2"><text:bookmark-start text:name="__RefHeading___Toc1838_2011108690"/><text:span text:style-name="Domyślna_20_czcionka_20_akapitu">3.5.<text:tab/>Algorytm AES</text:span><text:bookmark-end text:name="__RefHeading___Toc1838_2011108690"/></text:h>
      <text:p text:style-name="P8"><text:span text:style-name="Domyślna_20_czcionka_20_akapitu"><text:tab/></text:span><text:span text:style-name="Strong_20_Emphasis"><text:span text:style-name="T3">AES (Advanced Encryption Standard)</text:span></text:span><text:span text:style-name="Domyślna_20_czcionka_20_akapitu"> należy do algorytmów szyfrowania symetrycznego. W 2001 roku został przyjęty przez amerykański instytut </text:span><text:span text:style-name="Strong_20_Emphasis"><text:span text:style-name="T3">National Institute of Standards and Technology</text:span></text:span><text:span text:style-name="Domyślna_20_czcionka_20_akapitu"> jako oficjalny standard szyfrowania.</text:span></text:p>
      <text:p text:style-name="P8"><text:tab/><text:span text:style-name="T1">AES</text:span> jest <text:span text:style-name="Strong_20_Emphasis"><text:span text:style-name="T2">szyfrem blokowym</text:span></text:span>, co oznacza, że szyfruje dane w blokach o stałej długości <text:span text:style-name="Strong_20_Emphasis"><text:span text:style-name="T2">128 bitów</text:span></text:span>. Algorytm może wykorzystywać klucze o długości:</text:p>
      <text:list text:style-name="L12">
        <text:list-item>
          <text:p text:style-name="P23">128 bitów,</text:p>
        </text:list-item>
        <text:list-item>
          <text:p text:style-name="P23">192 bitów,</text:p>
        </text:list-item>
        <text:list-item>
          <text:p text:style-name="P23">256 bitów.</text:p>
        </text:list-item>
      </text:list>
      <text:h text:style-name="Nagłówek_20_3" text:outline-level="3"/>
      <text:h text:style-name="P24" text:outline-level="3"><text:bookmark-start text:name="__RefHeading___Toc5548_1844702946"/><text:span text:style-name="Domyślna_20_czcionka_20_akapitu">3.5.1.<text:tab/> Proces szyfrowania</text:span><text:bookmark-end text:name="__RefHeading___Toc5548_1844702946"/></text:h>
      <text:p text:style-name="P8">Proces szyfrowania w <text:span text:style-name="T1">AES</text:span> składa się z kilku etapów:</text:p>
      <text:list text:style-name="L13">
        <text:list-item>
          <text:p text:style-name="P25"><text:span text:style-name="T1">AddRoundKey </text:span>(dodanie klucza rundy): jest to etap wykonywany na początku szyfrowania oraz na końcu każdej rundy. Każdy bajt danych jest łączony z odpowiednim bajtem klucza rundy za pomocą operacji <text:span text:style-name="T1">XOR</text:span>. Celem tego etapu jest wprowadzenie tajnego klucza do procesu szyfrowania.</text:p>
        </text:list-item>
        <text:list-item>
          <text:p text:style-name="P25"><text:span text:style-name="T1">SubBytes</text:span> (podstawianie bajtów): każdy bajt stanu zostaje zastąpiony innym bajtem zgodnie ze talbicą <text:span text:style-name="Strong_20_Emphasis"><text:span text:style-name="T3">S-Box</text:span></text:span><text:span text:style-name="Strong_20_Emphasis"><text:span text:style-name="T2"> (specjalna tablica podstawień, jej zadaniem jest zastąpienie każdego bajtu inną wartością według wcześniej zdefiniowanej reguły), w celu zwiększenia nieliniowości algorytmu i utrudnienia analiz kryptograficznych. Zamiana odbywa się według wcześniej zdefiniowanej tabeli.</text:span></text:span></text:p>
        </text:list-item>
        <text:list-item>
          <text:p text:style-name="P25"><text:span text:style-name="Strong_20_Emphasis"><text:span text:style-name="T3">ShiftRows</text:span></text:span><text:span text:style-name="Strong_20_Emphasis"><text:span text:style-name="T2"> (przesunięcie wierszy): wiersze macierzy stanu są cyklicznie przesuwane w lewo.</text:span></text:span></text:p>
        </text:list-item>
        <text:list-item>
          <text:p text:style-name="P25"><text:span text:style-name="Strong_20_Emphasis"><text:span text:style-name="T3">MixColumns</text:span></text:span><text:span text:style-name="Strong_20_Emphasis"><text:span text:style-name="T2"> (mieszanie kolumn): każda kolumna stanu jest przekształcana za pomocą operacji matematycznych wykonywanych w skończonym ciele </text:span></text:span><text:span text:style-name="Strong_20_Emphasis"><text:span text:style-name="T3">Galois GF(2⁸)</text:span></text:span><text:span text:style-name="Strong_20_Emphasis"><text:span text:style-name="T2">. W praktyce bajty w obrębie kolumn są ze sobą mieszane, dzięki czemu zmiana jednego bajtu wpływa na wiele innych bajtów. Krok ten wykonywany jest w celu utrudnienia odtworzenia danych wejściowych.</text:span></text:span></text:p>
        </text:list-item>
        <text:list-item>
          <text:p text:style-name="P25"><text:span text:style-name="Strong_20_Emphasis"><text:span text:style-name="T3">AddRoundKey</text:span></text:span><text:span text:style-name="Strong_20_Emphasis"><text:span text:style-name="T2"> (ponowne dodanie klucza): wynik poprzednio wykonanych operacji jest ponownie łączony z kluczem rundy za pomocą operacji </text:span></text:span><text:span text:style-name="Strong_20_Emphasis"><text:span text:style-name="T3">XOR</text:span></text:span><text:span text:style-name="Strong_20_Emphasis"><text:span text:style-name="T2">.</text:span></text:span></text:p>
        </text:list-item>
        <text:list-item>
          <text:p text:style-name="P25"><text:span text:style-name="Strong_20_Emphasis"><text:span text:style-name="T2">W ostatniej rundzie pomijany jest etap </text:span></text:span><text:span text:style-name="Strong_20_Emphasis"><text:span text:style-name="T3">MixColumns</text:span></text:span><text:span text:style-name="Strong_20_Emphasis"><text:span text:style-name="T2">.</text:span></text:span></text:p>
        </text:list-item>
      </text:list>
      <text:h text:style-name="Nagłówek_20_3" text:outline-level="3"><text:bookmark-start text:name="__RefHeading___Toc5550_1844702946"/><text:span text:style-name="Domyślna_20_czcionka_20_akapitu">3.5.2.<text:tab/> Rozszerzanie klucza (Key Expansion)</text:span><text:bookmark-end text:name="__RefHeading___Toc5550_1844702946"/></text:h>
      <text:p text:style-name="P8"><text:span text:style-name="Strong_20_Emphasis"><text:tab/></text:span><text:span text:style-name="Strong_20_Emphasis"><text:span text:style-name="T2">Przed rozpoczęciem szyfrowania klucz główny jest przekształcany w zestaw kluczy rundowych. Dla </text:span></text:span><text:span text:style-name="Strong_20_Emphasis"><text:span text:style-name="T3">AES-128</text:span></text:span><text:span text:style-name="Strong_20_Emphasis"><text:span text:style-name="T2"> z jednego klucza 128-bitowego generowanych jest 11 kluczy:</text:span></text:span></text:p>
      <text:list text:style-name="L14">
        <text:list-item>
          <text:p text:style-name="P26">1 klucz początkowy,</text:p>
        </text:list-item>
        <text:list-item>
          <text:p text:style-name="P26">10 kluczy dla kolejnych rund.</text:p>
        </text:list-item>
      </text:list>
      <text:p text:style-name="P8"><text:tab/>Dzięki temu każda runda wykorzystuje inny fragment klucza.</text:p>
      <text:p text:style-name="P8">W zależności od długości klucza wykonywana jest różna liczba rund szyfrowania:</text:p>
      <text:list text:style-name="L15">
        <text:list-item>
          <text:p text:style-name="P27"><text:span text:style-name="T1">AES-128</text:span> – 10 rund,</text:p>
        </text:list-item>
        <text:list-item>
          <text:p text:style-name="P27"><text:span text:style-name="T1">AES-192</text:span> – 12 rund,</text:p>
        </text:list-item>
        <text:list-item>
          <text:p text:style-name="P27"><text:span text:style-name="T1">AES-256</text:span> – 14 rund.</text:p>
        </text:list-item>
      </text:list>
      <text:h text:style-name="Nagłówek_20_3" text:outline-level="3"/>
      <text:h text:style-name="P24" text:outline-level="3"><text:bookmark-start text:name="__RefHeading___Toc5552_1844702946"/><text:span text:style-name="Domyślna_20_czcionka_20_akapitu">3.5.3.<text:tab/> Zalety algorytmu AES</text:span><text:bookmark-end text:name="__RefHeading___Toc5552_1844702946"/></text:h>
      <text:list text:style-name="L16">
        <text:list-item>
          <text:p text:style-name="P28">bardzo wysoki poziom bezpieczeństwa,</text:p>
        </text:list-item>
        <text:list-item>
          <text:p text:style-name="P28">szybkie działanie,</text:p>
        </text:list-item>
        <text:list-item>
          <text:p text:style-name="P28">niskie wymagania obliczeniowe,</text:p>
        </text:list-item>
        <text:list-item>
          <text:p text:style-name="P28">możliwość zastosowania w sprzęcie i oprogramowaniu,</text:p>
        </text:list-item>
        <text:list-item>
          <text:p text:style-name="P28">powszechne zastosowanie na całym świecie.</text:p>
        </text:list-item>
      </text:list>
      <text:h text:style-name="Nagłówek_20_3" text:outline-level="3"><text:bookmark-start text:name="__RefHeading___Toc5554_1844702946"/><text:span text:style-name="Domyślna_20_czcionka_20_akapitu">3.5.4.<text:tab/> Wady algorytmu AES</text:span><text:bookmark-end text:name="__RefHeading___Toc5554_1844702946"/></text:h>
      <text:list text:style-name="L17">
        <text:list-item>
          <text:p text:style-name="P29">konieczność bezpiecznej wymiany klucza szyfrującego,</text:p>
        </text:list-item>
        <text:list-item>
          <text:p text:style-name="P29">bezpieczeństwo zależy od odpowiedniego zarządzania kluczami.</text:p>
        </text:list-item>
      </text:list>
      <text:h text:style-name="Nagłówek_20_3" text:outline-level="3"><text:bookmark-start text:name="__RefHeading___Toc1838_2011108690_Copy_1"/><text:span text:style-name="Strong_20_Emphasis">3.5.5.<text:tab/> Zastosowania algorytmu AES</text:span><text:bookmark-end text:name="__RefHeading___Toc1838_2011108690_Copy_1"/></text:h>
      <text:list text:style-name="L18">
        <text:list-item>
          <text:p text:style-name="P30">szyfrowanie dysków i nośników danych,</text:p>
        </text:list-item>
        <text:list-item>
          <text:p text:style-name="P30">zabezpieczanie sieci Wi-Fi (<text:span text:style-name="T1">WPA2</text:span>, <text:span text:style-name="T1">WPA3</text:span>),</text:p>
        </text:list-item>
        <text:list-item>
          <text:p text:style-name="P30">połączenia <text:span text:style-name="T1">VPN</text:span>,</text:p>
        </text:list-item>
        <text:list-item>
          <text:p text:style-name="P30">bankowość elektroniczna,</text:p>
        </text:list-item>
        <text:list-item>
          <text:p text:style-name="P30">komunikatory internetowe,</text:p>
        </text:list-item>
        <text:list-item>
          <text:p text:style-name="P30">protokół <text:span text:style-name="T1">HTTPS/TLS</text:span>.</text:p>
        </text:list-item>
      </text:list>
      <text:p text:style-name="P8"><text:tab/>Obecnie <text:span text:style-name="T1">AES</text:span> jest uznawany za standard szyfrowania i jest szeroko stosowany przez instytucje rządowe, firmy oraz użytkowników indywidualnych do ochrony poufnych danych.</text:p>
      <text:h text:style-name="Nagłówek_20_2" text:outline-level="2"><text:bookmark-start text:name="__RefHeading___Toc1840_2011108690"/><text:span text:style-name="Domyślna_20_czcionka_20_akapitu">3.6.<text:tab/>Algorytm RSA</text:span><text:bookmark-end text:name="__RefHeading___Toc1840_2011108690"/></text:h>
      <text:p text:style-name="P8"><text:tab/><text:span text:style-name="T1">RSA</text:span> jest jednym z najważniejszych algorytmów kryptografii asymetrycznej. Jego bezpieczeństwo opiera się na trudności rozkładu dużych liczb na czynniki pierwsze.</text:p>
      <text:p text:style-name="P8"><text:span text:style-name="T1">RSA</text:span> wykorzystuje <text:span text:style-name="Strong_20_Emphasis"><text:span text:style-name="T2">parę kluczy</text:span></text:span>:</text:p>
      <text:list text:style-name="L19">
        <text:list-item>
          <text:p text:style-name="P31"><text:span text:style-name="Strong_20_Emphasis"><text:span text:style-name="T2">klucz publiczny</text:span></text:span> – służy do szyfrowania danych lub weryfikacji podpisu cyfrowego,</text:p>
        </text:list-item>
        <text:list-item>
          <text:p text:style-name="P31"><text:span text:style-name="Strong_20_Emphasis"><text:span text:style-name="T2">klucz prywatny</text:span></text:span> – służy do odszyfrowywania danych lub tworzenia podpisu cyfrowego.</text:p>
        </text:list-item>
      </text:list>
      <text:h text:style-name="Nagłówek_20_3" text:outline-level="3"/>
      <text:h text:style-name="P24" text:outline-level="3"><text:bookmark-start text:name="__RefHeading___Toc3125_2011108690"/>3.6.1.<text:tab/> Zasada działania RSA<text:bookmark-end text:name="__RefHeading___Toc3125_2011108690"/></text:h>
      <text:p text:style-name="P8"><text:tab/>Proces działania algorytmu <text:span text:style-name="T1">RSA</text:span> składa się z kilku etapów:</text:p>
      <text:list text:style-name="L20">
        <text:list-item>
          <text:p text:style-name="P32"><text:span text:style-name="Strong_20_Emphasis"><text:span text:style-name="T2">Generowanie kluczy:</text:span></text:span> w celu wygenerowania pary kluczy (publicznego i prywatnego) należy wykonać następujące kroki:</text:p>
          <text:list>
            <text:list-item>
              <text:p text:style-name="P32">wybrać dwie duże liczby pierwsze „<text:span text:style-name="T1">p”</text:span> oraz „<text:span text:style-name="T1">q”</text:span>,</text:p>
            </text:list-item>
            <text:list-item>
              <text:p text:style-name="P32">obliczyć wartość <draw:frame draw:style-name="fr2" draw:name="Object1" text:anchor-type="as-char" svg:width="1.318cm" svg:height="0.471cm" draw:z-index="22"><draw:object xlink:href="./Object 1" xlink:type="simple" xlink:show="embed" xlink:actuate="onLoad"/><draw:image xlink:href="./ObjectReplacements/Object 1" xlink:type="simple" xlink:show="embed" xlink:actuate="onLoad"/></draw:frame>,</text:p>
            </text:list-item>
            <text:list-item>
              <text:p text:style-name="P32">obliczyć funkcję <text:span text:style-name="T1">Eulera</text:span> <draw:frame draw:style-name="fr2" draw:name="Object2" text:anchor-type="as-char" svg:width="3.505cm" svg:height="0.512cm" draw:z-index="23"><draw:object xlink:href="./Object 2" xlink:type="simple" xlink:show="embed" xlink:actuate="onLoad"/><draw:image xlink:href="./ObjectReplacements/Object 2" xlink:type="simple" xlink:show="embed" xlink:actuate="onLoad"/></draw:frame>,</text:p>
            </text:list-item>
            <text:list-item>
              <text:p text:style-name="P32">wybrać liczbę <text:span text:style-name="T1">„e”</text:span>, która jest względnie pierwsza z <draw:frame draw:style-name="fr2" draw:name="Object3" text:anchor-type="as-char" svg:width="0.836cm" svg:height="0.512cm" draw:z-index="24"><draw:object xlink:href="./Object 3" xlink:type="simple" xlink:show="embed" xlink:actuate="onLoad"/><draw:image xlink:href="./ObjectReplacements/Object 3" xlink:type="simple" xlink:show="embed" xlink:actuate="onLoad"/></draw:frame>,</text:p>
            </text:list-item>
            <text:list-item>
              <text:p text:style-name="P32">wyznaczyć liczbę <text:span text:style-name="T1">„d”</text:span>, będącą odwrotnością modularną liczby <text:span text:style-name="T1">„e”</text:span>, tak aby spełniona była zależność: <draw:frame draw:style-name="fr2" draw:name="Object4" text:anchor-type="as-char" svg:width="3.173cm" svg:height="0.512cm" draw:z-index="25"><draw:object xlink:href="./Object 4" xlink:type="simple" xlink:show="embed" xlink:actuate="onLoad"/><draw:image xlink:href="./ObjectReplacements/Object 4" xlink:type="simple" xlink:show="embed" xlink:actuate="onLoad"/></draw:frame></text:p>
            </text:list-item>
          </text:list>
        </text:list-item>
      </text:list>
      <text:p text:style-name="P8"><text:tab/>Klucz publiczny definiowany jest jako para <text:span text:style-name="T1">(n,e)</text:span>, natomiast klucz prywatny jako para <text:span text:style-name="T1">(n,d)</text:span>.</text:p>
      <text:list text:continue-numbering="true" text:style-name="L20">
        <text:list-item>
          <text:p text:style-name="P32"><text:span text:style-name="Strong_20_Emphasis"><text:span text:style-name="T2">Szyfrowanie wiadomości:</text:span></text:span> przed zaszyfrowaniem wiadomość dzielona jest na bloki o wartości liczbowej nie większej niż „<text:span text:style-name="Default_20_Paragraph_20_Font"><text:span text:style-name="T1">n”</text:span></text:span>. Następnie każdy blok wiadomości „<text:span text:style-name="Default_20_Paragraph_20_Font"><text:span text:style-name="T1">m”</text:span></text:span> szyfrowany jest przy użyciu klucza publicznego według wzoru: <draw:frame draw:style-name="fr2" draw:name="Object5" text:anchor-type="as-char" svg:width="2.397cm" svg:height="0.512cm" draw:z-index="26"><draw:object xlink:href="./Object 5" xlink:type="simple" xlink:show="embed" xlink:actuate="onLoad"/><draw:image xlink:href="./ObjectReplacements/Object 5" xlink:type="simple" xlink:show="embed" xlink:actuate="onLoad"/></draw:frame>. W wyniku powstaje szyfrogram składający się z kolejnych bloków <text:span text:style-name="T1">„c”</text:span>.</text:p>
        </text:list-item>
        <text:list-item>
          <text:p text:style-name="P32">Deszyfrowanie wiadomości: odbiorca wykorzystuje swój klucz prywatny do odszyfrowania otrzymanego szyfrogramu. Każdy blok szyfrogramu <text:span text:style-name="T1">„c”</text:span> przekształcany jest z powrotem w wiadomość jawną <text:span text:style-name="T1">„m”</text:span> zgodnie ze wzorem: <draw:frame draw:style-name="fr2" draw:name="Object6" text:anchor-type="as-char" svg:width="2.42cm" svg:height="0.512cm" draw:z-index="27"><draw:object xlink:href="./Object 6" xlink:type="simple" xlink:show="embed" xlink:actuate="onLoad"/><draw:image xlink:href="./ObjectReplacements/Object 6" xlink:type="simple" xlink:show="embed" xlink:actuate="onLoad"/></draw:frame>. Po odszyfrowaniu wszystkich bloków otrzymywana jest oryginalna wiadomość.</text:p>
        </text:list-item>
      </text:list>
      <text:h text:style-name="Nagłówek_20_3" text:outline-level="3"><text:bookmark-start text:name="__RefHeading___Toc5556_1844702946"/>3.6.2.<text:tab/> Podpisywanie wiadomości<text:bookmark-end text:name="__RefHeading___Toc5556_1844702946"/></text:h>
      <text:p text:style-name="P8"><text:tab/>Algorytm <text:span text:style-name="T1">RSA</text:span> może być również wykorzystywany do tworzenia podpisów cyfrowych. W tym celu nadawca oblicza skrót wiadomości, a następnie szyfruje go swoim kluczem prywatnym. Tak utworzony podpis jest przesyłany wraz z wiadomością.</text:p>
      <text:p text:style-name="P8"><text:tab/>Odbiorca wykorzystuje klucz publiczny nadawcy do odszyfrowania podpisu i porównuje otrzymaną wartość ze skrótem obliczonym z odebranej wiadomości. Jeżeli obie wartości są zgodne, oznacza to, że wiadomość pochodzi od deklarowanego nadawcy i nie została zmodyfikowana podczas transmisji.</text:p>
      <text:h text:style-name="P33" text:outline-level="3"><text:bookmark-start text:name="__RefHeading___Toc5558_1844702946"/>3.6.3.<text:tab/> Zastosowanie<text:bookmark-end text:name="__RefHeading___Toc5558_1844702946"/></text:h>
      <text:p text:style-name="P8"><text:tab/>Ze względu na wysoką złożoność obliczeniową <text:span text:style-name="T1">RSA</text:span> rzadko wykorzystuje się go do szyfrowania całych wiadomości. Najczęściej służy on do bezpiecznej wymiany kluczy szyfrujących lub tworzenia podpisów cyfrowych, natomiast właściwe dane szyfrowane są szybszymi algorytmami symetrycznymi, takimi jak <text:span text:style-name="T1">AES</text:span>.</text:p>
      <text:h text:style-name="P33" text:outline-level="3"/>
      <text:h text:style-name="P34" text:outline-level="3"><text:bookmark-start text:name="__RefHeading___Toc5560_1844702946"/><text:span text:style-name="Domyślna_20_czcionka_20_akapitu">3.6.4.<text:tab/> Zalety RSA</text:span><text:bookmark-end text:name="__RefHeading___Toc5560_1844702946"/></text:h>
      <text:list text:style-name="L21">
        <text:list-item>
          <text:p text:style-name="P35"><text:span text:style-name="Domyślna_20_czcionka_20_akapitu">wysoki poziom bezpieczeństwa,</text:span></text:p>
        </text:list-item>
      </text:list>
      <text:list text:style-name="L22">
        <text:list-item>
          <text:p text:style-name="P36">szeroko stosowany i dobrze przebadany,</text:p>
        </text:list-item>
        <text:list-item>
          <text:p text:style-name="P36"><text:span text:style-name="Domyślna_20_czcionka_20_akapitu">umożliwia bezpieczną wymianę kluczy.</text:span></text:p>
        </text:list-item>
      </text:list>
      <text:h text:style-name="P33" text:outline-level="3"><text:bookmark-start text:name="__RefHeading___Toc3125_2011108690_Copy_1"/><text:span text:style-name="Domyślna_20_czcionka_20_akapitu">3.6.5.<text:tab/> Zalety RSA</text:span><text:bookmark-end text:name="__RefHeading___Toc3125_2011108690_Copy_1"/></text:h>
      <text:list text:style-name="L23">
        <text:list-item>
          <text:p text:style-name="P37"><text:span text:style-name="Domyślna_20_czcionka_20_akapitu">działa znacznie wolniej niż </text:span><text:span text:style-name="Domyślna_20_czcionka_20_akapitu"><text:span text:style-name="T1">AES</text:span></text:span><text:span text:style-name="Domyślna_20_czcionka_20_akapitu">,</text:span></text:p>
        </text:list-item>
        <text:list-item>
          <text:p text:style-name="P37">wymaga dużych kluczy (najczęściej 2048 lub 4096 bitów),</text:p>
        </text:list-item>
        <text:list-item>
          <text:p text:style-name="P37">nie nadaje się do szyfrowania dużych ilości danych.</text:p>
        </text:list-item>
      </text:list>
      <text:h text:style-name="P10" text:outline-level="2"><text:bookmark-start text:name="__RefHeading___Toc1842_2011108690"/><text:span text:style-name="Domyślna_20_czcionka_20_akapitu">3.7. SHA-256</text:span><text:bookmark-end text:name="__RefHeading___Toc1842_2011108690"/></text:h>
      <text:p text:style-name="P38"><text:span text:style-name="T1"><text:tab/>SHA-256 (Secure Hash Algorithm 256-bit)</text:span> Jest kryptograficzną funkcją skrótu, której zadaniem jest przekształcenie danych wejściowych o dowolnej długości w skrót (<text:span text:style-name="T1">hash</text:span>) o stałej długości <text:span text:style-name="Strong_20_Emphasis"><text:span text:style-name="T2">256 bitów</text:span></text:span>. Funkcja ta jest jednokierunkowa, co oznacza, że na podstawie otrzymanego skrótu nie można odtworzyć oryginalnych danych wejściowych.</text:p>
      <text:h text:style-name="P33" text:outline-level="3"><text:bookmark-start text:name="__RefHeading___Toc6486_2011108690"/>3.7.1. Proces obliczania skrótu<text:bookmark-end text:name="__RefHeading___Toc6486_2011108690"/></text:h>
      <text:p text:style-name="P8"><text:tab/>Proces działania algorytmu <text:span text:style-name="T1">SHA-256</text:span> składa się z kilku etapów:</text:p>
      <text:list text:style-name="L24">
        <text:list-item>
          <text:p text:style-name="P39"><text:span text:style-name="Strong_20_Emphasis"><text:span text:style-name="T3">Przygotowanie wiadomości:</text:span></text:span> do wiadomości dodawane są dodatkowe bity tak, aby jej długość była zgodna z wymaganiami algorytmu. Na końcu dołączana jest również informacja o pierwotnej długości wiadomości.</text:p>
        </text:list-item>
        <text:list-item>
          <text:p text:style-name="P39"><text:span text:style-name="Strong_20_Emphasis"><text:span text:style-name="T3">Podział na bloki:</text:span></text:span> przygotowana wiadomość dzielona jest na bloki o długości 512 bitów.</text:p>
        </text:list-item>
        <text:list-item>
          <text:p text:style-name="P39"><text:span text:style-name="Strong_20_Emphasis"><text:span text:style-name="T3">Inicjalizacja wartości początkowych:</text:span></text:span> algorytm wykorzystuje osiem stałych 32-bitowych wartości początkowych, które tworzą początkowy stan funkcji skrótu.</text:p>
        </text:list-item>
        <text:list-item>
          <text:p text:style-name="P39"><text:span text:style-name="Strong_20_Emphasis"><text:span text:style-name="T3">Tworzenie harmonogramu wiadomości:</text:span></text:span> z każdego 512-bitowego bloku generowanych jest 64 słów o długości 32 bitów wykorzystywanych podczas dalszych obliczeń.</text:p>
        </text:list-item>
        <text:list-item>
          <text:p text:style-name="P39"><text:span text:style-name="Strong_20_Emphasis"><text:span text:style-name="T3">Przetwarzanie rund:</text:span></text:span> dla każdego bloku wykonywane są 64 rundy operacji matematycznych i logicznych, takich jak: dodawanie <text:span text:style-name="T1">modulo 232</text:span>, operacje <text:span text:style-name="T1">XOR</text:span>, przesunięcia i rotacje bitowe.</text:p>
        </text:list-item>
        <text:list-item>
          <text:p text:style-name="P39"><text:span text:style-name="Strong_20_Emphasis"><text:span text:style-name="T3">Aktualizacja wartości skrótu:</text:span></text:span> po zakończeniu przetwarzania danego bloku aktualizowane są wartości stanu funkcji skrótu.</text:p>
        </text:list-item>
        <text:list-item>
          <text:p text:style-name="P39"><text:span text:style-name="Strong_20_Emphasis"><text:span text:style-name="T3">Wygenerowanie końcowego skrótu:</text:span></text:span> po przetworzeniu wszystkich bloków danych otrzymywany jest końcowy skrót o długości 256 bitów.</text:p>
        </text:list-item>
      </text:list>
      <text:h text:style-name="P33" text:outline-level="3"/>
      <text:h text:style-name="P34" text:outline-level="3"><text:bookmark-start text:name="__RefHeading___Toc6488_2011108690"/>3.7.2. Zalety algorytmu SHA-256<text:bookmark-end text:name="__RefHeading___Toc6488_2011108690"/></text:h>
      <text:list text:style-name="L25">
        <text:list-item>
          <text:p text:style-name="P40">wysoki poziom bezpieczeństwa,</text:p>
        </text:list-item>
        <text:list-item>
          <text:p text:style-name="P40">odporność na znane ataki kryptograficzne,</text:p>
        </text:list-item>
        <text:list-item>
          <text:p text:style-name="P40">możliwość przetwarzania danych o dowolnej długości,</text:p>
        </text:list-item>
        <text:list-item>
          <text:p text:style-name="P40">szerokie zastosowanie w systemach bezpieczeństwa,</text:p>
        </text:list-item>
        <text:list-item>
          <text:p text:style-name="P40">stosunkowo wysoka wydajność działania.</text:p>
        </text:list-item>
      </text:list>
      <text:h text:style-name="P33" text:outline-level="3"><text:bookmark-start text:name="__RefHeading___Toc6490_2011108690"/><text:span text:style-name="Domyślna_20_czcionka_20_akapitu">3.7.3. Wady algorytmu SHA-256</text:span><text:bookmark-end text:name="__RefHeading___Toc6490_2011108690"/></text:h>
      <text:list text:style-name="L26">
        <text:list-item>
          <text:p text:style-name="P41"><text:span text:style-name="Domyślna_20_czcionka_20_akapitu">większa złożoność obliczeniowa w porównaniu z prostszymi funkcjami skrótu,</text:span></text:p>
        </text:list-item>
        <text:list-item>
          <text:p text:style-name="P41">nie służy do szyfrowania danych, a jedynie do generowania skrótów,</text:p>
        </text:list-item>
        <text:list-item>
          <text:p text:style-name="P41">dla bardzo dużych zbiorów danych może wymagać znacznych zasobów obliczeniowych.</text:p>
        </text:list-item>
      </text:list>
      <text:h text:style-name="P33" text:outline-level="3"><text:bookmark-start text:name="__RefHeading___Toc6492_2011108690"/><text:span text:style-name="Domyślna_20_czcionka_20_akapitu">3.7.4. Zastosowania</text:span><text:bookmark-end text:name="__RefHeading___Toc6492_2011108690"/></text:h>
      <text:list text:style-name="L27">
        <text:list-item>
          <text:p text:style-name="P42"><text:span text:style-name="Domyślna_20_czcionka_20_akapitu">weryfikacja integralności plików,</text:span></text:p>
        </text:list-item>
        <text:list-item>
          <text:p text:style-name="P42">podpisy cyfrowe,</text:p>
        </text:list-item>
        <text:list-item>
          <text:p text:style-name="P42">certyfikaty cyfrowe,</text:p>
        </text:list-item>
        <text:list-item>
          <text:p text:style-name="P42">protokół <text:span text:style-name="T1">HTTPS/TLS</text:span>,</text:p>
        </text:list-item>
        <text:list-item>
          <text:p text:style-name="P42">przechowywanie haseł (w połączeniu z dodatkowymi mechanizmami zabezpieczeń),</text:p>
        </text:list-item>
        <text:list-item>
          <text:p text:style-name="P42">technologia blockchain i kryptowaluty,</text:p>
        </text:list-item>
        <text:list-item>
          <text:p text:style-name="P42">systemy uwierzytelniania użytkowników.</text:p>
        </text:list-item>
      </text:list>
      <text:p text:style-name="P8"><text:span text:style-name="Domyślna_20_czcionka_20_akapitu"><text:tab/>Obecnie </text:span><text:span text:style-name="Domyślna_20_czcionka_20_akapitu"><text:span text:style-name="T1">SHA-256</text:span></text:span><text:span text:style-name="Domyślna_20_czcionka_20_akapitu"> jest jedną z najczęściej wykorzystywanych funkcji skrótu.</text:span></text:p>
      <text:h text:style-name="P9" text:outline-level="1"><text:bookmark-start text:name="__RefHeading___Toc425_2443504791_Copy_1_"/>4.<text:tab/>Technologie i narzędzia<text:bookmark-end text:name="__RefHeading___Toc425_2443504791_Copy_1_"/></text:h>
      <text:list text:style-name="L28">
        <text:list-item>
          <text:p text:style-name="P43"><text:span text:style-name="Strong_20_Emphasis"><text:span text:style-name="T3">Visual Studio Code</text:span></text:span><text:span text:style-name="Strong_20_Emphasis"><text:span text:style-name="T2"> - główne środowisko programistyczne wykorzystywane do tworzenia kodu, zarządzania projektem oraz integracji z rozszerzeniami.</text:span></text:span></text:p>
        </text:list-item>
        <text:list-item>
          <text:p text:style-name="P43"><text:span text:style-name="Strong_20_Emphasis"><text:span text:style-name="T3">Python</text:span></text:span><text:span text:style-name="Strong_20_Emphasis"><text:span text:style-name="T2"> - język programowania wykorzystany do implementacji aplikacji oraz mechanizmów kryptograficznych. Ze względu na prostą składnię oraz szeroki wybór bibliotek.</text:span></text:span></text:p>
        </text:list-item>
        <text:list-item>
          <text:p text:style-name="P43"><text:span text:style-name="Strong_20_Emphasis"><text:span text:style-name="T3">Tkinter</text:span></text:span><text:span text:style-name="Strong_20_Emphasis"><text:span text:style-name="T2"> - standardowa biblioteka GUI języka Python. Została wykorzystana do przygotowania okien aplikacji oraz elementów umożliwiających interakcję użytkownika z programem.</text:span></text:span></text:p>
        </text:list-item>
        <text:list-item>
          <text:p text:style-name="P43"><text:span text:style-name="Strong_20_Emphasis"><text:span text:style-name="T3">Biblioteka Cryptography</text:span></text:span><text:span text:style-name="Strong_20_Emphasis"><text:span text:style-name="T2"> - biblioteka kryptograficzna języka Python wykorzystana do implementacji algorytmów kryptograficznych oraz operacji związanych z zarządzaniem kluczami. Wykorzystano m.in. moduły odpowiedzialne za:</text:span></text:span></text:p>
          <text:list>
            <text:list-item>
              <text:p text:style-name="P44"><text:soft-page-break/>szyfrowanie i deszyfrowanie danych przy użyciu algorytmu <text:span text:style-name="T1">AES</text:span>,</text:p>
            </text:list-item>
            <text:list-item>
              <text:p text:style-name="P44">generowanie i obsługę kluczy <text:span text:style-name="T1">RSA</text:span>,</text:p>
            </text:list-item>
            <text:list-item>
              <text:p text:style-name="P44">serializację oraz odczyt kluczy publicznych i prywatnych,</text:p>
            </text:list-item>
            <text:list-item>
              <text:p text:style-name="P44">tworzenie i weryfikację podpisów cyfrowych,</text:p>
            </text:list-item>
            <text:list-item>
              <text:p text:style-name="P44">obliczanie funkcji skrótu <text:span text:style-name="T1">SHA-256</text:span>,</text:p>
            </text:list-item>
            <text:list-item>
              <text:p text:style-name="P43">obsługę wyjątków związanych z nieprawidłową weryfikacją podpisów cyfrowych.</text:p>
            </text:list-item>
          </text:list>
        </text:list-item>
        <text:list-item>
          <text:p text:style-name="P43"><text:span text:style-name="Strong_20_Emphasis"><text:span text:style-name="T3">Git</text:span></text:span><text:span text:style-name="Strong_20_Emphasis"><text:span text:style-name="T2"> - system kontroli wersji wykorzystywany synchronizacji zmian w kodzie pomiędzy twórcami.</text:span></text:span></text:p>
        </text:list-item>
        <text:list-item>
          <text:p text:style-name="P43"><text:span text:style-name="Strong_20_Emphasis"><text:span text:style-name="T3">GitHub</text:span></text:span><text:span text:style-name="Strong_20_Emphasis"><text:span text:style-name="T2"> - platforma internetowa służąca do przechowywania repozytorium projektu oraz zarządzania kodem źródłowym. Wykorzystany do archiwizacji projektu i współpracy nad kodem.</text:span></text:span></text:p>
        </text:list-item>
      </text:list>
      <text:h text:style-name="Nagłówek_20_1" text:outline-level="1"><text:bookmark-start text:name="__RefHeading___Toc12126_3356077753"/><text:span text:style-name="Strong_20_Emphasis">5.<text:tab/>Architektura aplikacji</text:span><text:bookmark-end text:name="__RefHeading___Toc12126_3356077753"/></text:h>
      <text:p text:style-name="P8"><text:span text:style-name="Strong_20_Emphasis"><text:tab/></text:span><text:span text:style-name="Strong_20_Emphasis"><text:span text:style-name="T2">Aplikacja została zaprojektowana w architekturze modułowej. Poszczególne funkcjonalności zostały rozdzielone na niezależne moduły odpowiedzialne za szyfrowanie, deszyfrowanie, generowanie kluczy oraz obsługę podpisów cyfrowych. Interfejs użytkownika został zaimplementowany przy użyciu biblioteki </text:span></text:span><text:span text:style-name="Strong_20_Emphasis"><text:span text:style-name="T3">Tkinter</text:span></text:span><text:span text:style-name="Strong_20_Emphasis"><text:span text:style-name="T2">, natomiast operacje kryptograficzne realizowane są przez bibliotekę </text:span></text:span><text:span text:style-name="Strong_20_Emphasis"><text:span text:style-name="T3">Cryptography</text:span></text:span><text:span text:style-name="Strong_20_Emphasis"><text:span text:style-name="T2">.</text:span></text:span></text:p>
      <text:h text:style-name="Nagłówek_20_2" text:outline-level="2"><text:bookmark-start text:name="__RefHeading___Toc1848_2011108690"/>5.1.<text:tab/>Struktura katalogów i plików<text:bookmark-end text:name="__RefHeading___Toc1848_2011108690"/></text:h>
      <text:p text:style-name="P8"><text:tab/>Jak wspomniano w poprzednim rozdziale (<text:span text:style-name="Default_20_Paragraph_20_Font"><text:span text:style-name="T1">5. Architektura aplikacji</text:span></text:span>) program został zaprojektowany w sposób modułowy. Kod źródłowy został podzielony na katalogi odpowiadające za realizację operacji kryptograficznych, obsługę interfejsu użytkownika oraz przechowywanie dokumentacji projektu. Schemat przedstawiający strukturę katalogów i plików został przedstawiony na poniższym rysunku (<text:span text:style-name="Default_20_Paragraph_20_Font"><text:span text:style-name="T1">Rys. 1</text:span></text:span>).</text:p>
      <text:p text:style-name="P45"><text:span text:style-name="Strong_20_Emphasis"><text:span text:style-name="T5">Rys. 1. </text:span></text:span><text:span text:style-name="Strong_20_Emphasis"><text:span text:style-name="T6">Struktura katalogów i plików aplikacji.</text:span></text:span></text:p>
      <text:p text:style-name="P8"><text:soft-page-break/><text:tab/>Katalog „<text:span text:style-name="Strong_20_Emphasis"><text:span text:style-name="T3">algorithms”</text:span></text:span> zawiera moduły odpowiedzialne za implementację algorytmów kryptograficznych. Znajdują się w nim funkcje realizujące szyfrowanie i deszyfrowanie danych przy użyciu algorytmu <text:span text:style-name="T1">AES</text:span>, operacje związane z podpisem cyfrowym <text:span text:style-name="T1">RSA</text:span> oraz pomocnicze funkcje kryptograficzne.</text:p>
      <text:p text:style-name="P8"><text:tab/>Katalog „<text:span text:style-name="Strong_20_Emphasis"><text:span text:style-name="T3">gui”</text:span></text:span> zawiera moduły odpowiedzialne za obsługę graficznego interfejsu użytkownika stworzonego przy pomocy <text:span text:style-name="Default_20_Paragraph_20_Font"><text:span text:style-name="T1">Tkinter</text:span></text:span>. Poszczególne pliki odpowiadają za realizację konkretnych funkcji aplikacji (oddzielne ekrany aplikacji), takich jak szyfrowanie, deszyfrowanie, podpisywanie danych oraz generowanie kluczy kryptograficznych.</text:p>
      <text:p text:style-name="P8"><text:tab/>Katalog „<text:span text:style-name="Strong_20_Emphasis"><text:span text:style-name="T3">docs”</text:span></text:span> przeznaczony jest do przechowywania dokumentacji projektowej.</text:p>
      <text:p text:style-name="P8"><text:tab/>Głównym plikiem programu jest „<text:span text:style-name="Strong_20_Emphasis"><text:span text:style-name="T3">main.py”</text:span></text:span>, który odpowiada za uruchomienie aplikacji oraz inicjalizację interfejsu użytkownika. Z poziomu tego pliku następuje integracja wszystkich modułów systemu i uruchamiane są poszczególne funkcjonalności aplikacji.</text:p>
      <text:h text:style-name="P46" text:outline-level="2"><text:bookmark-start text:name="__RefHeading___Toc8713_1672344883"/>5.2.<text:tab/>Moduły systemu<text:bookmark-end text:name="__RefHeading___Toc8713_1672344883"/></text:h>
      <text:h text:style-name="P46" text:outline-level="2"><text:bookmark-start text:name="__RefHeading___Toc8715_1672344883"/>5.2.1. Moduł szyfrowania<text:bookmark-end text:name="__RefHeading___Toc8715_1672344883"/></text:h>
      <text:p text:style-name="P8"><text:tab/>Moduł szyfrowania odpowiada za zabezpieczanie danych przy użyciu wybranego algorytmu. Użytkownik może wskazać plik wejściowy, lokalizację pliku wynikowego oraz wybrać parametry szyfrowania. Moduł może automatycznie generować klucz szyfrowania oraz inne wartości konieczne. Dodatkowo istnieje możliwość zaszyfrowania klucza <text:span text:style-name="T1">AES</text:span> przy użyciu klucza publicznego <text:span text:style-name="T1">RSA</text:span> odbiorcy, co pozwala na wykorzystanie szyfrowania hybrydowego.</text:p>
      <text:p text:style-name="P8"><text:tab/>Interfejs modułu szyfrowania został zaimplementowany w pliku „<text:span text:style-name="Default_20_Paragraph_20_Font"><text:span text:style-name="T1">encrypt.py”</text:span></text:span> jako klasa <text:span text:style-name="Default_20_Paragraph_20_Font"><text:span text:style-name="T1">EncryptFrame </text:span></text:span>(dziedzicząca z klasy bazowej <text:span text:style-name="T1">tk.Frame</text:span>). Odpowiada ona za utworzenie elementów graficznych takich jak przyciski wyboru wspomnianych we wcześniejszym akapicie opcji. Struktura ekranu modułu <text:span text:style-name="Default_20_Paragraph_20_Font"><text:span text:style-name="T1">Encrypt</text:span></text:span> przedstawiona została na poniższym rysunku (<text:span text:style-name="Default_20_Paragraph_20_Font"><text:span text:style-name="T1">Rys. 2.</text:span></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oft-page-break/><text:span text:style-name="Strong_20_Emphasis"><text:span text:style-name="T5">Rys. 2. Okno modułu szyfrowania.</text:span></text:span></text:p>
      <text:p text:style-name="P8"><text:tab/>Jako „<text:span text:style-name="Default_20_Paragraph_20_Font"><text:span text:style-name="T1">Plik wejściowy”</text:span></text:span> użytkownik może wskazać dowolny plik <text:span text:style-name="Default_20_Paragraph_20_Font"><text:span text:style-name="T1">.docx</text:span></text:span>, <text:span text:style-name="Default_20_Paragraph_20_Font"><text:span text:style-name="T1">.txt</text:span></text:span> czy <text:span text:style-name="Default_20_Paragraph_20_Font"><text:span text:style-name="T1">.mp4</text:span></text:span> – aplikacja nie nakłada ograniczeń na typ szyfrowanych danych. Jako „<text:span text:style-name="Default_20_Paragraph_20_Font"><text:span text:style-name="T1">Plik wyjściowy” </text:span></text:span>użytkownik wskazuje lokalizację oraz nazwę pliku wynikowego (bez rozszerzenia). W lokalizacji tej zapisywane są również pliki klucza szyfrującego, „<text:span text:style-name="Default_20_Paragraph_20_Font"><text:span text:style-name="T1">Nonce/IV”</text:span></text:span> (jeżeli wykorzystywane) oraz zaszyfrowany klucz <text:span text:style-name="T1">AES</text:span> (jeżeli wybrano opcję szyfrowania hybrydowego).</text:p>
      <text:p text:style-name="P8"><text:tab/>Po kliknięciu przycisku „<text:span text:style-name="Default_20_Paragraph_20_Font"><text:span text:style-name="T1">Szyfruj”</text:span></text:span> uruchamiana jest metoda <text:span text:style-name="Default_20_Paragraph_20_Font"><text:span text:style-name="T1">encrypt() (Listing 1.), która w </text:span></text:span>pierwszej kolejności sprawdza czy użytkownik wskazał plik wejściowy oraz plik wyjściowy. Jeżeli wybrano opcję szyfrowania klucza <text:span text:style-name="Default_20_Paragraph_20_Font"><text:span text:style-name="T1">AES</text:span></text:span> za pomocą <text:span text:style-name="Default_20_Paragraph_20_Font"><text:span text:style-name="T1">RSA</text:span></text:span>, program sprawdza również, czy został podany plik klucza publicznego <text:span text:style-name="Default_20_Paragraph_20_Font"><text:span text:style-name="T1">RSA</text:span></text:span>.</text:p>
      <text:p text:style-name="P8"><text:tab/>W przypadku wykrycia błędów (np.: brak plików, niepowodzenie szyfrowania) w polu tekstowym (<text:span text:style-name="Default_20_Paragraph_20_Font"><text:span text:style-name="T1">status</text:span></text:span>) obok przycisku szyfruj wyświetlany jest stosowny komunikat. Pole to służy do komunikacji statusu szyfrowania do użytkownika i jako prosty <text:span text:style-name="Default_20_Paragraph_20_Font"><text:span text:style-name="T1">„debugger”</text:span></text:span> informujący o wystepujących błędach.</text:p>
      <text:p text:style-name="P8"><text:tab/>Właściwe szyfrowanie realizowane jest przez funkcję <text:span text:style-name="Default_20_Paragraph_20_Font"><text:span text:style-name="T1">encrypt_dispatcher() (Listing 2.)</text:span></text:span> znajdującą się w module „<text:span text:style-name="Default_20_Paragraph_20_Font"><text:span text:style-name="T1">crypto_lib.py”</text:span></text:span>. Funkcja ta sprawdza wybrany algorytm, a następnie generuje losowy klucz <text:span text:style-name="Default_20_Paragraph_20_Font"><text:span text:style-name="T1">AES</text:span></text:span> o długości 32 bajtów (<text:span text:style-name="Default_20_Paragraph_20_Font"><text:span text:style-name="T1">AES-256</text:span></text:span>) oraz wartość nonce o długości 12 <text:soft-page-break/>bajtów. Dane z pliku wejściowego są odczytywane są binarnie i szyfrowane przy użyciu klas <text:span text:style-name="Default_20_Paragraph_20_Font"><text:span text:style-name="T1">AES</text:span></text:span> z biblioteki <text:span text:style-name="Default_20_Paragraph_20_Font"><text:span text:style-name="T1">cryptography</text:span></text:span>.</text:p>
      <text:p text:style-name="P8"><text:tab/>Wynikiem działania modułu jest zestaw plików zapisanych w postacji binarnej:</text:p>
      <text:list text:style-name="L29">
        <text:list-item>
          <text:p text:style-name="P47">plik główny (nazwa wskazana przez użytkownika) – zawierający zaszyfrowane dane,</text:p>
        </text:list-item>
        <text:list-item>
          <text:p text:style-name="P47">plik <text:span text:style-name="Default_20_Paragraph_20_Font"><text:span text:style-name="T1">.nonce</text:span></text:span> – zawierający wartości <text:span text:style-name="Default_20_Paragraph_20_Font"><text:span text:style-name="T1">Nonce/IV</text:span></text:span> wykorzystywane przez algorytm szyfrowania,</text:p>
        </text:list-item>
        <text:list-item>
          <text:p text:style-name="P47">plik <text:span text:style-name="Default_20_Paragraph_20_Font"><text:span text:style-name="T1">.key</text:span></text:span> - zawierający klucz AES,</text:p>
        </text:list-item>
        <text:list-item>
          <text:p text:style-name="P47">plik <text:span text:style-name="Default_20_Paragraph_20_Font"><text:span text:style-name="T1">.key.enc</text:span></text:span> – alternatywa dla pliku <text:span text:style-name="Default_20_Paragraph_20_Font"><text:span text:style-name="T1">.key</text:span></text:span>, tworzony jest w przypadku wybrania opcji szyfrowania hybrydowego.</text:p>
        </text:list-item>
      </text:list>
      <text:p text:style-name="P8"><text:span text:style-name="Domyślna_20_czcionka_20_akapitu"><text:span text:style-name="T7">Listing 1. Kod metody encrypt() modułu szyfrującego.</text:span></text:span></text:p>
      <table:table table:name="Table1" table:style-name="Table1">
        <table:table-column table:style-name="Table1.A"/>
        <table:table-row>
          <table:table-cell table:style-name="Table1.A1" office:value-type="string">
            <text:p text:style-name="P48"><text:span text:style-name="Default_20_Paragraph_20_Font"><text:span text:style-name="T8"><text:s text:c="4"/></text:span></text:span><text:span text:style-name="Default_20_Paragraph_20_Font"><text:span text:style-name="T9">def</text:span></text:span><text:span text:style-name="Default_20_Paragraph_20_Font"><text:span text:style-name="T8"> </text:span></text:span><text:span text:style-name="Default_20_Paragraph_20_Font"><text:span text:style-name="T10">encrypt</text:span></text:span><text:span text:style-name="Default_20_Paragraph_20_Font"><text:span text:style-name="T8">(</text:span></text:span><text:span text:style-name="Default_20_Paragraph_20_Font"><text:span text:style-name="T11">self</text:span></text:span><text:span text:style-name="Default_20_Paragraph_20_Font"><text:span text:style-name="T8">):</text:span></text:span></text:p>
            <text:p text:style-name="P49"/>
            <text:p text:style-name="P48"><text:span text:style-name="Default_20_Paragraph_20_Font"><text:span text:style-name="T8"><text:s text:c="8"/></text:span></text:span><text:span text:style-name="Default_20_Paragraph_20_Font"><text:span text:style-name="T9">if</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input_file:</text:span></text:span></text:p>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error( </text:span></text:span><text:span text:style-name="Default_20_Paragraph_20_Font"><text:span text:style-name="T14">"Błąd"</text:span></text:span><text:span text:style-name="Default_20_Paragraph_20_Font"><text:span text:style-name="T8">,</text:span></text:span><text:span text:style-name="Default_20_Paragraph_20_Font"><text:span text:style-name="T14">"Nie wybrano pliku wejściowego"</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return</text:span></text:span></text:p>
            <text:p text:style-name="P49"/>
            <text:p text:style-name="P48"><text:span text:style-name="Default_20_Paragraph_20_Font"><text:span text:style-name="T8"><text:s text:c="8"/></text:span></text:span><text:span text:style-name="Default_20_Paragraph_20_Font"><text:span text:style-name="T9">if</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file:</text:span></text:span></text:p>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error(</text:span></text:span><text:span text:style-name="Default_20_Paragraph_20_Font"><text:span text:style-name="T14">"Błąd"</text:span></text:span><text:span text:style-name="Default_20_Paragraph_20_Font"><text:span text:style-name="T8">, </text:span></text:span><text:span text:style-name="Default_20_Paragraph_20_Font"><text:span text:style-name="T14">"Nie wybrano pliku wyjściowego"</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return</text:span></text:span></text:p>
            <text:p text:style-name="P49"/>
            <text:p text:style-name="P48"><text:span text:style-name="Default_20_Paragraph_20_Font"><text:span text:style-name="T8"><text:s text:c="8"/>rsa_enabled </text:span></text:span><text:span text:style-name="Default_20_Paragraph_20_Font"><text:span text:style-name="T13">=</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rsa_encrypt_var</text:span></text:span><text:span text:style-name="Default_20_Paragraph_20_Font"><text:span text:style-name="T13">.</text:span></text:span><text:span text:style-name="Default_20_Paragraph_20_Font"><text:span text:style-name="T8">get()</text:span></text:span></text:p>
            <text:p text:style-name="P49"/>
            <text:p text:style-name="P48"><text:span text:style-name="Default_20_Paragraph_20_Font"><text:span text:style-name="T8"><text:s text:c="8"/></text:span></text:span><text:span text:style-name="Default_20_Paragraph_20_Font"><text:span text:style-name="T9">if</text:span></text:span><text:span text:style-name="Default_20_Paragraph_20_Font"><text:span text:style-name="T8"> rsa_enabled </text:span></text:span><text:span text:style-name="Default_20_Paragraph_20_Font"><text:span text:style-name="T12">and</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rsa_key_file_public:</text:span></text:span></text:p>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error(</text:span></text:span><text:span text:style-name="Default_20_Paragraph_20_Font"><text:span text:style-name="T14">"Błąd"</text:span></text:span><text:span text:style-name="Default_20_Paragraph_20_Font"><text:span text:style-name="T8">, </text:span></text:span><text:span text:style-name="Default_20_Paragraph_20_Font"><text:span text:style-name="T14">"Nie wybrano klucza publicznego RSA"</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return</text:span></text:span></text:p>
            <text:p text:style-name="P49"/>
            <text:p text:style-name="P48"><text:span text:style-name="Default_20_Paragraph_20_Font"><text:span text:style-name="T8"><text:s text:c="8"/></text:span></text:span><text:span text:style-name="Default_20_Paragraph_20_Font"><text:span text:style-name="T9">try</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Szyfrowanie..."</text:span></text:span><text:span text:style-name="Default_20_Paragraph_20_Font"><text:span text:style-name="T8">)</text:span></text:span></text:p>
            <text:p text:style-name="P49"/>
            <text:p text:style-name="P48"><text:span text:style-name="Default_20_Paragraph_20_Font"><text:span text:style-name="T8"><text:s text:c="12"/>selected_algorithm </text:span></text:span><text:span text:style-name="Default_20_Paragraph_20_Font"><text:span text:style-name="T13">=</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selected_aes_mode</text:span></text:span><text:span text:style-name="Default_20_Paragraph_20_Font"><text:span text:style-name="T13">.</text:span></text:span><text:span text:style-name="Default_20_Paragraph_20_Font"><text:span text:style-name="T8">get()</text:span></text:span></text:p>
            <text:p text:style-name="P49"/>
            <text:p text:style-name="P48"><text:span text:style-name="Default_20_Paragraph_20_Font"><text:span text:style-name="T8"><text:s text:c="12"/>encrypt_dispatcher(</text:span></text:span></text:p>
            <text:p text:style-name="P48"><text:span text:style-name="Default_20_Paragraph_20_Font"><text:span text:style-name="T8"><text:s text:c="16"/>algorithm</text:span></text:span><text:span text:style-name="Default_20_Paragraph_20_Font"><text:span text:style-name="T13">=</text:span></text:span><text:span text:style-name="Default_20_Paragraph_20_Font"><text:span text:style-name="T8">selected_algorithm,</text:span></text:span></text:p>
            <text:p text:style-name="P48"><text:span text:style-name="Default_20_Paragraph_20_Font"><text:span text:style-name="T8"><text:s text:c="16"/>input_file</text:span></text:span><text:span text:style-name="Default_20_Paragraph_20_Font"><text:span text:style-name="T13">=</text:span></text:span><text:span text:style-name="Default_20_Paragraph_20_Font"><text:span text:style-name="T11">self</text:span></text:span><text:span text:style-name="Default_20_Paragraph_20_Font"><text:span text:style-name="T13">.</text:span></text:span><text:span text:style-name="Default_20_Paragraph_20_Font"><text:span text:style-name="T8">input_file,</text:span></text:span></text:p>
            <text:p text:style-name="P48"><text:span text:style-name="Default_20_Paragraph_20_Font"><text:span text:style-name="T8"><text:s text:c="16"/>output_file</text:span></text:span><text:span text:style-name="Default_20_Paragraph_20_Font"><text:span text:style-name="T13">=</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file,</text:span></text:span></text:p>
            <text:p text:style-name="P48"><text:span text:style-name="Default_20_Paragraph_20_Font"><text:span text:style-name="T8"><text:s text:c="16"/>rsa_enabled</text:span></text:span><text:span text:style-name="Default_20_Paragraph_20_Font"><text:span text:style-name="T13">=</text:span></text:span><text:span text:style-name="Default_20_Paragraph_20_Font"><text:span text:style-name="T8">rsa_enabled,</text:span></text:span></text:p>
            <text:p text:style-name="P48"><text:span text:style-name="Default_20_Paragraph_20_Font"><text:span text:style-name="T8"><text:s text:c="16"/>rsa_public_key_file</text:span></text:span><text:span text:style-name="Default_20_Paragraph_20_Font"><text:span text:style-name="T13">=</text:span></text:span><text:span text:style-name="Default_20_Paragraph_20_Font"><text:span text:style-name="T11">self</text:span></text:span><text:span text:style-name="Default_20_Paragraph_20_Font"><text:span text:style-name="T13">.</text:span></text:span><text:span text:style-name="Default_20_Paragraph_20_Font"><text:span text:style-name="T8">rsa_key_file_public</text:span></text:span></text:p>
            <text:p text:style-name="P48"><text:span text:style-name="Default_20_Paragraph_20_Font"><text:span text:style-name="T8"><text:s text:c="12"/>)</text:span></text:span></text:p>
            <text:p text:style-name="P49"/>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Szyfrowanie zakończone"</text:span></text:span><text:span text:style-name="Default_20_Paragraph_20_Font"><text:span text:style-name="T8">)</text:span></text:span></text:p>
            <text:p text:style-name="P49"/>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info(</text:span></text:span><text:span text:style-name="Default_20_Paragraph_20_Font"><text:span text:style-name="T14">"Sukces"</text:span></text:span><text:span text:style-name="Default_20_Paragraph_20_Font"><text:span text:style-name="T8">, </text:span></text:span><text:span text:style-name="Default_20_Paragraph_20_Font"><text:span text:style-name="T14">"Plik został zaszyfrowany"</text:span></text:span><text:span text:style-name="Default_20_Paragraph_20_Font"><text:span text:style-name="T8">)</text:span></text:span></text:p>
            <text:p text:style-name="P49"/>
            <text:p text:style-name="P48"><text:span text:style-name="Default_20_Paragraph_20_Font"><text:span text:style-name="T8"><text:s text:c="8"/></text:span></text:span><text:span text:style-name="Default_20_Paragraph_20_Font"><text:span text:style-name="T9">except</text:span></text:span><text:span text:style-name="Default_20_Paragraph_20_Font"><text:span text:style-name="T8"> </text:span></text:span><text:span text:style-name="Default_20_Paragraph_20_Font"><text:span text:style-name="T15">Exception</text:span></text:span><text:span text:style-name="Default_20_Paragraph_20_Font"><text:span text:style-name="T8"> </text:span></text:span><text:span text:style-name="Default_20_Paragraph_20_Font"><text:span text:style-name="T9">as</text:span></text:span><text:span text:style-name="Default_20_Paragraph_20_Font"><text:span text:style-name="T8"> e:</text:span></text:span></text:p>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Błąd"</text:span></text:span><text:span text:style-name="Default_20_Paragraph_20_Font"><text:span text:style-name="T8">)</text:span></text:span></text:p>
            <text:p text:style-name="P49"/>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error(</text:span></text:span><text:span text:style-name="Default_20_Paragraph_20_Font"><text:span text:style-name="T14">"Błąd szyfrowania"</text:span></text:span><text:span text:style-name="Default_20_Paragraph_20_Font"><text:span text:style-name="T8">,</text:span></text:span><text:span text:style-name="Default_20_Paragraph_20_Font"><text:span text:style-name="T11">str</text:span></text:span><text:span text:style-name="Default_20_Paragraph_20_Font"><text:span text:style-name="T8">(e))</text:span></text:span></text:p>
          </table:table-cell>
        </table:table-row>
      </table:table>
      <text:p text:style-name="P50"/>
      <text:p text:style-name="P8"><text:span text:style-name="Domyślna_20_czcionka_20_akapitu"><text:span text:style-name="T16">Listing 2. Kod metody encrypt_dispatcher().</text:span></text:span></text:p>
      <table:table table:name="Table2" table:style-name="Table2">
        <table:table-column table:style-name="Table2.A"/>
        <table:table-row>
          <table:table-cell table:style-name="Table2.A1" office:value-type="string">
            <text:p text:style-name="P51"><text:span text:style-name="Default_20_Paragraph_20_Font"><text:span text:style-name="T17">def</text:span></text:span><text:span text:style-name="Default_20_Paragraph_20_Font"><text:span text:style-name="T18"> </text:span></text:span><text:span text:style-name="Default_20_Paragraph_20_Font"><text:span text:style-name="T19">encrypt_dispatcher</text:span></text:span><text:span text:style-name="Default_20_Paragraph_20_Font"><text:span text:style-name="T18">( algorithm, input_file, output_file, rsa_enabled</text:span></text:span><text:span text:style-name="Default_20_Paragraph_20_Font"><text:span text:style-name="T20">=</text:span></text:span><text:span text:style-name="Default_20_Paragraph_20_Font"><text:span text:style-name="T17">False</text:span></text:span><text:span text:style-name="Default_20_Paragraph_20_Font"><text:span text:style-name="T18">, rsa_public_key_file</text:span></text:span><text:span text:style-name="Default_20_Paragraph_20_Font"><text:span text:style-name="T20">=</text:span></text:span><text:span text:style-name="Default_20_Paragraph_20_Font"><text:span text:style-name="T17">None</text:span></text:span><text:span text:style-name="Default_20_Paragraph_20_Font"><text:span text:style-name="T18"> ):</text:span></text:span></text:p>
            <text:p text:style-name="P51"><text:span text:style-name="Default_20_Paragraph_20_Font"><text:span text:style-name="T18"><text:s text:c="4"/></text:span></text:span><text:span text:style-name="Default_20_Paragraph_20_Font"><text:span text:style-name="T17">if</text:span></text:span><text:span text:style-name="Default_20_Paragraph_20_Font"><text:span text:style-name="T18"> algorithm </text:span></text:span><text:span text:style-name="Default_20_Paragraph_20_Font"><text:span text:style-name="T20">==</text:span></text:span><text:span text:style-name="Default_20_Paragraph_20_Font"><text:span text:style-name="T18"> </text:span></text:span><text:span text:style-name="Default_20_Paragraph_20_Font"><text:span text:style-name="T21">"AES-256-GCM"</text:span></text:span><text:span text:style-name="Default_20_Paragraph_20_Font"><text:span text:style-name="T18">:</text:span></text:span></text:p>
            <text:p text:style-name="P51"><text:span text:style-name="Default_20_Paragraph_20_Font"><text:span text:style-name="T18"><text:s text:c="8"/>aes_key </text:span></text:span><text:span text:style-name="Default_20_Paragraph_20_Font"><text:span text:style-name="T20">=</text:span></text:span><text:span text:style-name="Default_20_Paragraph_20_Font"><text:span text:style-name="T18"> generate_aes_key()</text:span></text:span></text:p>
            <text:p text:style-name="P51"><text:span text:style-name="Default_20_Paragraph_20_Font"><text:span text:style-name="T18"><text:s text:c="8"/>nonce </text:span></text:span><text:span text:style-name="Default_20_Paragraph_20_Font"><text:span text:style-name="T20">=</text:span></text:span><text:span text:style-name="Default_20_Paragraph_20_Font"><text:span text:style-name="T18"> generate_nonce()</text:span></text:span></text:p>
            <text:p text:style-name="P51"><text:span text:style-name="Default_20_Paragraph_20_Font"><text:span text:style-name="T18"><text:s text:c="8"/>encrypt_file_aes_gcm( input_file</text:span></text:span><text:span text:style-name="Default_20_Paragraph_20_Font"><text:span text:style-name="T20">=</text:span></text:span><text:span text:style-name="Default_20_Paragraph_20_Font"><text:span text:style-name="T18">input_file, output_file</text:span></text:span><text:span text:style-name="Default_20_Paragraph_20_Font"><text:span text:style-name="T20">=</text:span></text:span><text:span text:style-name="Default_20_Paragraph_20_Font"><text:span text:style-name="T18">output_file, aes_key</text:span></text:span><text:span text:style-name="Default_20_Paragraph_20_Font"><text:span text:style-name="T20">=</text:span></text:span><text:span text:style-name="Default_20_Paragraph_20_Font"><text:span text:style-name="T18">aes_key, nonce</text:span></text:span><text:span text:style-name="Default_20_Paragraph_20_Font"><text:span text:style-name="T20">=</text:span></text:span><text:span text:style-name="Default_20_Paragraph_20_Font"><text:span text:style-name="T18">nonce )</text:span></text:span></text:p>
            <text:p text:style-name="P51"><text:span text:style-name="Default_20_Paragraph_20_Font"><text:span text:style-name="T18"><text:s text:c="8"/>base_name </text:span></text:span><text:span text:style-name="Default_20_Paragraph_20_Font"><text:span text:style-name="T20">=</text:span></text:span><text:span text:style-name="Default_20_Paragraph_20_Font"><text:span text:style-name="T18"> output_file</text:span></text:span></text:p>
            <text:p text:style-name="P52"/>
            <text:p text:style-name="P51"><text:span text:style-name="Default_20_Paragraph_20_Font"><text:span text:style-name="T18"><text:s text:c="8"/>key_file </text:span></text:span><text:span text:style-name="Default_20_Paragraph_20_Font"><text:span text:style-name="T20">=</text:span></text:span><text:span text:style-name="Default_20_Paragraph_20_Font"><text:span text:style-name="T18"> base_name </text:span></text:span><text:span text:style-name="Default_20_Paragraph_20_Font"><text:span text:style-name="T20">+</text:span></text:span><text:span text:style-name="Default_20_Paragraph_20_Font"><text:span text:style-name="T18"> </text:span></text:span><text:span text:style-name="Default_20_Paragraph_20_Font"><text:span text:style-name="T21">".key"</text:span></text:span></text:p>
            <text:p text:style-name="P51"><text:span text:style-name="Default_20_Paragraph_20_Font"><text:span text:style-name="T18"><text:s text:c="8"/>nonce_file </text:span></text:span><text:span text:style-name="Default_20_Paragraph_20_Font"><text:span text:style-name="T20">=</text:span></text:span><text:span text:style-name="Default_20_Paragraph_20_Font"><text:span text:style-name="T18"> base_name </text:span></text:span><text:span text:style-name="Default_20_Paragraph_20_Font"><text:span text:style-name="T20">+</text:span></text:span><text:span text:style-name="Default_20_Paragraph_20_Font"><text:span text:style-name="T18"> </text:span></text:span><text:span text:style-name="Default_20_Paragraph_20_Font"><text:span text:style-name="T21">".nonce"</text:span></text:span></text:p>
            <text:p text:style-name="P52"/>
            <text:p text:style-name="P51"><text:span text:style-name="Default_20_Paragraph_20_Font"><text:span text:style-name="T18"><text:s text:c="8"/></text:span></text:span><text:span text:style-name="Default_20_Paragraph_20_Font"><text:span text:style-name="T17">if</text:span></text:span><text:span text:style-name="Default_20_Paragraph_20_Font"><text:span text:style-name="T18"> rsa_enabled:</text:span></text:span></text:p>
            <text:p text:style-name="P51"><text:soft-page-break/><text:span text:style-name="Default_20_Paragraph_20_Font"><text:span text:style-name="T18"><text:s text:c="12"/>encrypted_key </text:span></text:span><text:span text:style-name="Default_20_Paragraph_20_Font"><text:span text:style-name="T20">=</text:span></text:span><text:span text:style-name="Default_20_Paragraph_20_Font"><text:span text:style-name="T18"> encrypt_aes_key_with_rsa( aes_key, rsa_public_key_file )</text:span></text:span></text:p>
            <text:p text:style-name="P51"><text:span text:style-name="Default_20_Paragraph_20_Font"><text:span text:style-name="T18"><text:s text:c="12"/>save_binary_file(key_file </text:span></text:span><text:span text:style-name="Default_20_Paragraph_20_Font"><text:span text:style-name="T20">+</text:span></text:span><text:span text:style-name="Default_20_Paragraph_20_Font"><text:span text:style-name="T18"> </text:span></text:span><text:span text:style-name="Default_20_Paragraph_20_Font"><text:span text:style-name="T21">".enc"</text:span></text:span><text:span text:style-name="Default_20_Paragraph_20_Font"><text:span text:style-name="T18">, encrypted_key )</text:span></text:span></text:p>
            <text:p text:style-name="P51"><text:span text:style-name="Default_20_Paragraph_20_Font"><text:span text:style-name="T18"><text:s text:c="8"/></text:span></text:span><text:span text:style-name="Default_20_Paragraph_20_Font"><text:span text:style-name="T17">else</text:span></text:span><text:span text:style-name="Default_20_Paragraph_20_Font"><text:span text:style-name="T18">:</text:span></text:span></text:p>
            <text:p text:style-name="P51"><text:span text:style-name="Default_20_Paragraph_20_Font"><text:span text:style-name="T18"><text:s text:c="12"/>save_binary_file( key_file, aes_key )</text:span></text:span></text:p>
            <text:p text:style-name="P52"/>
            <text:p text:style-name="P51"><text:span text:style-name="Default_20_Paragraph_20_Font"><text:span text:style-name="T18"><text:s text:c="8"/>save_binary_file( nonce_file, nonce )</text:span></text:span></text:p>
            <text:p text:style-name="P51"><text:span text:style-name="Default_20_Paragraph_20_Font"><text:span text:style-name="T18"><text:s text:c="8"/>)</text:span></text:span></text:p>
            <text:p text:style-name="P51"><text:span text:style-name="Default_20_Paragraph_20_Font"><text:span text:style-name="T18"><text:s text:c="4"/></text:span></text:span><text:span text:style-name="Default_20_Paragraph_20_Font"><text:span text:style-name="T17">else</text:span></text:span><text:span text:style-name="Default_20_Paragraph_20_Font"><text:span text:style-name="T18">:</text:span></text:span></text:p>
            <text:p text:style-name="P51"><text:span text:style-name="Default_20_Paragraph_20_Font"><text:span text:style-name="T18"><text:s text:c="8"/></text:span></text:span><text:span text:style-name="Default_20_Paragraph_20_Font"><text:span text:style-name="T17">raise</text:span></text:span><text:span text:style-name="Default_20_Paragraph_20_Font"><text:span text:style-name="T18"> EncryptionError( </text:span></text:span><text:span text:style-name="Default_20_Paragraph_20_Font"><text:span text:style-name="T21">f"Nieobsługiwany algorytm: </text:span></text:span><text:span text:style-name="Default_20_Paragraph_20_Font"><text:span text:style-name="T22">{</text:span></text:span><text:span text:style-name="Default_20_Paragraph_20_Font"><text:span text:style-name="T18">algorithm</text:span></text:span><text:span text:style-name="Default_20_Paragraph_20_Font"><text:span text:style-name="T22">}</text:span></text:span><text:span text:style-name="Default_20_Paragraph_20_Font"><text:span text:style-name="T21">"</text:span></text:span><text:span text:style-name="Default_20_Paragraph_20_Font"><text:span text:style-name="T18"> )</text:span></text:span></text:p>
          </table:table-cell>
        </table:table-row>
      </table:table>
      <text:p text:style-name="P53"/>
      <text:p text:style-name="Text_20_body"><text:span text:style-name="Domyślna_20_czcionka_20_akapitu"><text:span text:style-name="T7">Listing 3. Metody wykorzystywane przez encrypt_dispatcher().</text:span></text:span></text:p>
      <table:table table:name="Table3" table:style-name="Table3">
        <table:table-column table:style-name="Table3.A"/>
        <table:table-row>
          <table:table-cell table:style-name="Table3.A1" office:value-type="string">
            <text:p text:style-name="Table_20_Contents"><text:span text:style-name="Default_20_Paragraph_20_Font"><text:span text:style-name="T23">def</text:span></text:span><text:span text:style-name="Default_20_Paragraph_20_Font"><text:span text:style-name="T24"> </text:span></text:span><text:span text:style-name="Default_20_Paragraph_20_Font"><text:span text:style-name="T25">generate_aes_key</text:span></text:span><text:span text:style-name="Default_20_Paragraph_20_Font"><text:span text:style-name="T24">():</text:span></text:span></text:p>
            <text:p text:style-name="Table_20_Contents"><text:span text:style-name="Default_20_Paragraph_20_Font"><text:span text:style-name="T24"><text:s text:c="2"/></text:span></text:span><text:span text:style-name="Default_20_Paragraph_20_Font"><text:span text:style-name="T23"><text:s text:c="2"/>retu</text:span></text:span><text:span text:style-name="Default_20_Paragraph_20_Font"><text:span text:style-name="T24">rn </text:span></text:span><text:span text:style-name="Default_20_Paragraph_20_Font"><text:span text:style-name="T26">o</text:span></text:span><text:span text:style-name="Default_20_Paragraph_20_Font"><text:span text:style-name="T24">s.urando</text:span></text:span><text:span text:style-name="Default_20_Paragraph_20_Font"><text:span text:style-name="T26">m(</text:span></text:span><text:span text:style-name="Default_20_Paragraph_20_Font"><text:span text:style-name="T24">3</text:span></text:span><text:span text:style-name="Default_20_Paragraph_20_Font"><text:span text:style-name="T27">2)</text:span></text:span></text:p>
            <text:p text:style-name="P54"/>
            <text:p text:style-name="Table_20_Contents"><text:span text:style-name="Default_20_Paragraph_20_Font"><text:span text:style-name="T25">def generate_</text:span></text:span><text:span text:style-name="Default_20_Paragraph_20_Font"><text:span text:style-name="T24">non</text:span></text:span><text:span text:style-name="Default_20_Paragraph_20_Font"><text:span text:style-name="T27">c</text:span></text:span><text:span text:style-name="Default_20_Paragraph_20_Font"><text:span text:style-name="T24">e():</text:span></text:span></text:p>
            <text:p text:style-name="Table_20_Contents"><text:span text:style-name="Default_20_Paragraph_20_Font"><text:span text:style-name="T23"><text:s text:c="3"/></text:span></text:span><text:span text:style-name="Default_20_Paragraph_20_Font"><text:span text:style-name="T24"><text:s/>re</text:span></text:span><text:span text:style-name="Default_20_Paragraph_20_Font"><text:span text:style-name="T26">t</text:span></text:span><text:span text:style-name="Default_20_Paragraph_20_Font"><text:span text:style-name="T24">urn os.u</text:span></text:span><text:span text:style-name="Default_20_Paragraph_20_Font"><text:span text:style-name="T26">ra</text:span></text:span><text:span text:style-name="Default_20_Paragraph_20_Font"><text:span text:style-name="T24">n</text:span></text:span><text:span text:style-name="Default_20_Paragraph_20_Font"><text:span text:style-name="T27">dom</text:span></text:span><text:span text:style-name="Default_20_Paragraph_20_Font"><text:span text:style-name="T23">(12</text:span></text:span><text:span text:style-name="Default_20_Paragraph_20_Font"><text:span text:style-name="T24">)</text:span></text:span></text:p>
            <text:p text:style-name="P55"/>
            <text:p text:style-name="Table_20_Contents"><text:span text:style-name="Default_20_Paragraph_20_Font"><text:span text:style-name="T25">def save_b</text:span></text:span><text:span text:style-name="Default_20_Paragraph_20_Font"><text:span text:style-name="T24">inary_file(pa</text:span></text:span><text:span text:style-name="Default_20_Paragraph_20_Font"><text:span text:style-name="T27">t</text:span></text:span><text:span text:style-name="Default_20_Paragraph_20_Font"><text:span text:style-name="T24">h, d</text:span></text:span><text:span text:style-name="Default_20_Paragraph_20_Font"><text:span text:style-name="T23">ata)</text:span></text:span><text:span text:style-name="Default_20_Paragraph_20_Font"><text:span text:style-name="T24">:</text:span></text:span></text:p>
            <text:p text:style-name="Table_20_Contents"><text:span text:style-name="Default_20_Paragraph_20_Font"><text:span text:style-name="T28"><text:s text:c="2"/></text:span></text:span><text:span text:style-name="Default_20_Paragraph_20_Font"><text:span text:style-name="T24"><text:s text:c="2"/>with </text:span></text:span><text:span text:style-name="Default_20_Paragraph_20_Font"><text:span text:style-name="T29">open</text:span></text:span><text:span text:style-name="Default_20_Paragraph_20_Font"><text:span text:style-name="T24">(p</text:span></text:span><text:span text:style-name="Default_20_Paragraph_20_Font"><text:span text:style-name="T23">at</text:span></text:span><text:span text:style-name="Default_20_Paragraph_20_Font"><text:span text:style-name="T24">h, </text:span></text:span><text:span text:style-name="Default_20_Paragraph_20_Font"><text:span text:style-name="T27">"</text:span></text:span><text:span text:style-name="Default_20_Paragraph_20_Font"><text:span text:style-name="T24">wb") as f</text:span></text:span><text:span text:style-name="Default_20_Paragraph_20_Font"><text:span text:style-name="T26">:</text:span></text:span></text:p>
            <text:p text:style-name="Table_20_Contents"><text:span text:style-name="Default_20_Paragraph_20_Font"><text:span text:style-name="T24"><text:s text:c="8"/>f</text:span></text:span><text:span text:style-name="Default_20_Paragraph_20_Font"><text:span text:style-name="T27">.wr</text:span></text:span><text:span text:style-name="Default_20_Paragraph_20_Font"><text:span text:style-name="T23">ite</text:span></text:span><text:span text:style-name="Default_20_Paragraph_20_Font"><text:span text:style-name="T24">(</text:span></text:span><text:span text:style-name="Default_20_Paragraph_20_Font"><text:span text:style-name="T25">data)</text:span></text:span></text:p>
            <text:p text:style-name="P55"/>
            <text:p text:style-name="Table_20_Contents"><text:span text:style-name="Default_20_Paragraph_20_Font"><text:span text:style-name="T25">def encry</text:span></text:span><text:span text:style-name="Default_20_Paragraph_20_Font"><text:span text:style-name="T24">p</text:span></text:span><text:span text:style-name="Default_20_Paragraph_20_Font"><text:span text:style-name="T27">t</text:span></text:span><text:span text:style-name="Default_20_Paragraph_20_Font"><text:span text:style-name="T24">_file_aes_gcm( input_file, output_f</text:span></text:span><text:span text:style-name="Default_20_Paragraph_20_Font"><text:span text:style-name="T27">i</text:span></text:span><text:span text:style-name="Default_20_Paragraph_20_Font"><text:span text:style-name="T24">le, </text:span></text:span><text:span text:style-name="Default_20_Paragraph_20_Font"><text:span text:style-name="T27">a</text:span></text:span><text:span text:style-name="Default_20_Paragraph_20_Font"><text:span text:style-name="T24">es</text:span></text:span><text:span text:style-name="Default_20_Paragraph_20_Font"><text:span text:style-name="T27">_</text:span></text:span><text:span text:style-name="Default_20_Paragraph_20_Font"><text:span text:style-name="T24">key,</text:span></text:span><text:span text:style-name="Default_20_Paragraph_20_Font"><text:span text:style-name="T27"> </text:span></text:span><text:span text:style-name="Default_20_Paragraph_20_Font"><text:span text:style-name="T24">nonce )</text:span></text:span><text:span text:style-name="Default_20_Paragraph_20_Font"><text:span text:style-name="T23">:</text:span></text:span></text:p>
            <text:p text:style-name="Table_20_Contents"><text:span text:style-name="Default_20_Paragraph_20_Font"><text:span text:style-name="T23"><text:s/></text:span></text:span><text:span text:style-name="Default_20_Paragraph_20_Font"><text:span text:style-name="T24"><text:s/></text:span></text:span><text:span text:style-name="Default_20_Paragraph_20_Font"><text:span text:style-name="T28"><text:s text:c="2"/>tr</text:span></text:span><text:span text:style-name="Default_20_Paragraph_20_Font"><text:span text:style-name="T24">y:</text:span></text:span></text:p>
            <text:p text:style-name="Table_20_Contents"><text:span text:style-name="Default_20_Paragraph_20_Font"><text:span text:style-name="T24"><text:s text:c="6"/></text:span></text:span><text:span text:style-name="Default_20_Paragraph_20_Font"><text:span text:style-name="T29"><text:s/>wit</text:span></text:span><text:span text:style-name="Default_20_Paragraph_20_Font"><text:span text:style-name="T24">h </text:span></text:span><text:span text:style-name="Default_20_Paragraph_20_Font"><text:span text:style-name="T23">op</text:span></text:span><text:span text:style-name="Default_20_Paragraph_20_Font"><text:span text:style-name="T24">en(</text:span></text:span><text:span text:style-name="Default_20_Paragraph_20_Font"><text:span text:style-name="T27">i</text:span></text:span><text:span text:style-name="Default_20_Paragraph_20_Font"><text:span text:style-name="T24">nput_file, "rb") as f:</text:span></text:span></text:p>
            <text:p text:style-name="Table_20_Contents"><text:span text:style-name="Default_20_Paragraph_20_Font"><text:span text:style-name="T24"><text:s/></text:span></text:span><text:span text:style-name="Default_20_Paragraph_20_Font"><text:span text:style-name="T26"><text:s/></text:span></text:span><text:span text:style-name="Default_20_Paragraph_20_Font"><text:span text:style-name="T24"><text:s text:c="6"/></text:span></text:span><text:span text:style-name="Default_20_Paragraph_20_Font"><text:span text:style-name="T27"><text:s text:c="2"/></text:span></text:span><text:span text:style-name="Default_20_Paragraph_20_Font"><text:span text:style-name="T24"><text:s text:c="2"/>plaintext = f</text:span></text:span><text:span text:style-name="Default_20_Paragraph_20_Font"><text:span text:style-name="T26">.</text:span></text:span><text:span text:style-name="Default_20_Paragraph_20_Font"><text:span text:style-name="T24">read()</text:span></text:span></text:p>
            <text:p text:style-name="P56"/>
            <text:p text:style-name="Table_20_Contents"><text:span text:style-name="Default_20_Paragraph_20_Font"><text:span text:style-name="T24"><text:s text:c="6"/></text:span></text:span><text:span text:style-name="Default_20_Paragraph_20_Font"><text:span text:style-name="T27"><text:s text:c="2"/></text:span></text:span><text:span text:style-name="Default_20_Paragraph_20_Font"><text:span text:style-name="T24">aesgcm = AESGCM(aes</text:span></text:span><text:span text:style-name="Default_20_Paragraph_20_Font"><text:span text:style-name="T26">_</text:span></text:span><text:span text:style-name="Default_20_Paragraph_20_Font"><text:span text:style-name="T24">key)</text:span></text:span></text:p>
            <text:p text:style-name="P56"/>
            <text:p text:style-name="Table_20_Contents"><text:span text:style-name="Default_20_Paragraph_20_Font"><text:span text:style-name="T24"><text:s text:c="8"/></text:span></text:span><text:span text:style-name="Default_20_Paragraph_20_Font"><text:span text:style-name="T27">c</text:span></text:span><text:span text:style-name="Default_20_Paragraph_20_Font"><text:span text:style-name="T24">iphertext = aesgcm</text:span></text:span><text:span text:style-name="Default_20_Paragraph_20_Font"><text:span text:style-name="T27">.</text:span></text:span><text:span text:style-name="Default_20_Paragraph_20_Font"><text:span text:style-name="T24">encrypt( </text:span></text:span><text:span text:style-name="Default_20_Paragraph_20_Font"><text:span text:style-name="T27">n</text:span></text:span><text:span text:style-name="Default_20_Paragraph_20_Font"><text:span text:style-name="T24">once, plainte</text:span></text:span><text:span text:style-name="Default_20_Paragraph_20_Font"><text:span text:style-name="T27">xt</text:span></text:span><text:span text:style-name="Default_20_Paragraph_20_Font"><text:span text:style-name="T24">, </text:span></text:span><text:span text:style-name="Default_20_Paragraph_20_Font"><text:span text:style-name="T28">No</text:span></text:span><text:span text:style-name="Default_20_Paragraph_20_Font"><text:span text:style-name="T24">ne)</text:span></text:span></text:p>
            <text:p text:style-name="P57"/>
            <text:p text:style-name="Table_20_Contents"><text:span text:style-name="Default_20_Paragraph_20_Font"><text:span text:style-name="T29"><text:s/></text:span></text:span><text:span text:style-name="Default_20_Paragraph_20_Font"><text:span text:style-name="T24"><text:s text:c="2"/></text:span></text:span><text:span text:style-name="Default_20_Paragraph_20_Font"><text:span text:style-name="T23"><text:s text:c="2"/></text:span></text:span><text:span text:style-name="Default_20_Paragraph_20_Font"><text:span text:style-name="T24"><text:s text:c="3"/></text:span></text:span><text:span text:style-name="Default_20_Paragraph_20_Font"><text:span text:style-name="T27">w</text:span></text:span><text:span text:style-name="Default_20_Paragraph_20_Font"><text:span text:style-name="T24">ith open(outp</text:span></text:span><text:span text:style-name="Default_20_Paragraph_20_Font"><text:span text:style-name="T26">u</text:span></text:span><text:span text:style-name="Default_20_Paragraph_20_Font"><text:span text:style-name="T24">t_file, "wb") as </text:span></text:span><text:span text:style-name="Default_20_Paragraph_20_Font"><text:span text:style-name="T27">f:</text:span></text:span></text:p>
            <text:p text:style-name="Table_20_Contents"><text:span text:style-name="Default_20_Paragraph_20_Font"><text:span text:style-name="T24"><text:s text:c="2"/></text:span></text:span><text:span text:style-name="Default_20_Paragraph_20_Font"><text:span text:style-name="T23"><text:s text:c="6"/></text:span></text:span><text:span text:style-name="Default_20_Paragraph_20_Font"><text:span text:style-name="T24"><text:s/></text:span></text:span><text:span text:style-name="Default_20_Paragraph_20_Font"><text:span text:style-name="T30"><text:s text:c="3"/>f.writ</text:span></text:span><text:span text:style-name="Default_20_Paragraph_20_Font"><text:span text:style-name="T24">e</text:span></text:span><text:span text:style-name="Default_20_Paragraph_20_Font"><text:span text:style-name="T23">(c</text:span></text:span><text:span text:style-name="Default_20_Paragraph_20_Font"><text:span text:style-name="T24">iph</text:span></text:span><text:span text:style-name="Default_20_Paragraph_20_Font"><text:span text:style-name="T27">e</text:span></text:span><text:span text:style-name="Default_20_Paragraph_20_Font"><text:span text:style-name="T24">rtext)</text:span></text:span></text:p>
            <text:p text:style-name="P54"/>
            <text:p text:style-name="Table_20_Contents"><text:span text:style-name="Default_20_Paragraph_20_Font"><text:span text:style-name="T23"><text:s text:c="3"/></text:span></text:span><text:span text:style-name="Default_20_Paragraph_20_Font"><text:span text:style-name="T24"><text:s/>except Exception</text:span></text:span><text:span text:style-name="Default_20_Paragraph_20_Font"><text:span text:style-name="T29"> as e:</text:span></text:span></text:p>
            <text:p text:style-name="Table_20_Contents"><text:span text:style-name="Default_20_Paragraph_20_Font"><text:span text:style-name="T29"><text:s text:c="8"/>raise Encryp</text:span></text:span><text:span text:style-name="Default_20_Paragraph_20_Font"><text:span text:style-name="T31">t</text:span></text:span><text:span text:style-name="Default_20_Paragraph_20_Font"><text:span text:style-name="T28">ion</text:span></text:span><text:span text:style-name="Default_20_Paragraph_20_Font"><text:span text:style-name="T24">Err</text:span></text:span><text:span text:style-name="Default_20_Paragraph_20_Font"><text:span text:style-name="T31">o</text:span></text:span><text:span text:style-name="Default_20_Paragraph_20_Font"><text:span text:style-name="T29">r</text:span></text:span><text:span text:style-name="Default_20_Paragraph_20_Font"><text:span text:style-name="T24">(</text:span></text:span><text:span text:style-name="Default_20_Paragraph_20_Font"><text:span text:style-name="T27">f"B</text:span></text:span><text:span text:style-name="Default_20_Paragraph_20_Font"><text:span text:style-name="T23">łąd</text:span></text:span><text:span text:style-name="Default_20_Paragraph_20_Font"><text:span text:style-name="T24"> </text:span></text:span><text:span text:style-name="Default_20_Paragraph_20_Font"><text:span text:style-name="T25">szyfrowania AES-GCM: {st</text:span></text:span><text:span text:style-name="Default_20_Paragraph_20_Font"><text:span text:style-name="T24">r</text:span></text:span><text:span text:style-name="Default_20_Paragraph_20_Font"><text:span text:style-name="T27">(</text:span></text:span><text:span text:style-name="Default_20_Paragraph_20_Font"><text:span text:style-name="T24">e)}")</text:span></text:span></text:p>
            <text:p text:style-name="P56"/>
            <text:p text:style-name="Table_20_Contents"><text:span text:style-name="Default_20_Paragraph_20_Font"><text:span text:style-name="T24">d</text:span></text:span><text:span text:style-name="Default_20_Paragraph_20_Font"><text:span text:style-name="T27">e</text:span></text:span><text:span text:style-name="Default_20_Paragraph_20_Font"><text:span text:style-name="T24">f encrypt_aes_key_w</text:span></text:span><text:span text:style-name="Default_20_Paragraph_20_Font"><text:span text:style-name="T27">i</text:span></text:span><text:span text:style-name="Default_20_Paragraph_20_Font"><text:span text:style-name="T24">th</text:span></text:span><text:span text:style-name="Default_20_Paragraph_20_Font"><text:span text:style-name="T27">_</text:span></text:span><text:span text:style-name="Default_20_Paragraph_20_Font"><text:span text:style-name="T24">rsa(</text:span></text:span><text:span text:style-name="Default_20_Paragraph_20_Font"><text:span text:style-name="T23"> </text:span></text:span><text:span text:style-name="Default_20_Paragraph_20_Font"><text:span text:style-name="T24">aes_key,</text:span></text:span><text:span text:style-name="Default_20_Paragraph_20_Font"><text:span text:style-name="T28"> pub</text:span></text:span><text:span text:style-name="Default_20_Paragraph_20_Font"><text:span text:style-name="T24">lic_key_file ):</text:span></text:span></text:p>
            <text:p text:style-name="Table_20_Contents"><text:span text:style-name="Default_20_Paragraph_20_Font"><text:span text:style-name="T29"><text:s text:c="4"/></text:span></text:span><text:span text:style-name="Default_20_Paragraph_20_Font"><text:span text:style-name="T24">tr</text:span></text:span><text:span text:style-name="Default_20_Paragraph_20_Font"><text:span text:style-name="T23">y:</text:span></text:span></text:p>
            <text:p text:style-name="Table_20_Contents"><text:span text:style-name="Default_20_Paragraph_20_Font"><text:span text:style-name="T24"><text:s text:c="6"/></text:span></text:span><text:span text:style-name="Default_20_Paragraph_20_Font"><text:span text:style-name="T27"><text:s/></text:span></text:span><text:span text:style-name="Default_20_Paragraph_20_Font"><text:span text:style-name="T24"><text:s/>with open(public_key_f</text:span></text:span><text:span text:style-name="Default_20_Paragraph_20_Font"><text:span text:style-name="T26">i</text:span></text:span><text:span text:style-name="Default_20_Paragraph_20_Font"><text:span text:style-name="T24">le, "rb") as key_file</text:span></text:span><text:span text:style-name="Default_20_Paragraph_20_Font"><text:span text:style-name="T27">:</text:span></text:span></text:p>
            <text:p text:style-name="Table_20_Contents"><text:span text:style-name="Default_20_Paragraph_20_Font"><text:span text:style-name="T24"><text:s text:c="12"/>public_key</text:span></text:span><text:span text:style-name="Default_20_Paragraph_20_Font"><text:span text:style-name="T26"> </text:span></text:span><text:span text:style-name="Default_20_Paragraph_20_Font"><text:span text:style-name="T24">= load</text:span></text:span><text:span text:style-name="Default_20_Paragraph_20_Font"><text:span text:style-name="T27">_</text:span></text:span><text:span text:style-name="Default_20_Paragraph_20_Font"><text:span text:style-name="T24">pem_public_ke</text:span></text:span><text:span text:style-name="Default_20_Paragraph_20_Font"><text:span text:style-name="T27">y(</text:span></text:span><text:span text:style-name="Default_20_Paragraph_20_Font"><text:span text:style-name="T24"> key_</text:span></text:span><text:span text:style-name="Default_20_Paragraph_20_Font"><text:span text:style-name="T26">f</text:span></text:span><text:span text:style-name="Default_20_Paragraph_20_Font"><text:span text:style-name="T24">ile.read() )</text:span></text:span></text:p>
            <text:p text:style-name="P56"/>
            <text:p text:style-name="Table_20_Contents"><text:span text:style-name="Default_20_Paragraph_20_Font"><text:span text:style-name="T24"><text:s text:c="8"/>encr</text:span></text:span><text:span text:style-name="Default_20_Paragraph_20_Font"><text:span text:style-name="T27">y</text:span></text:span><text:span text:style-name="Default_20_Paragraph_20_Font"><text:span text:style-name="T24">pted_key = public_k</text:span></text:span><text:span text:style-name="Default_20_Paragraph_20_Font"><text:span text:style-name="T26">e</text:span></text:span><text:span text:style-name="Default_20_Paragraph_20_Font"><text:span text:style-name="T24">y.enc</text:span></text:span><text:span text:style-name="Default_20_Paragraph_20_Font"><text:span text:style-name="T27">r</text:span></text:span><text:span text:style-name="Default_20_Paragraph_20_Font"><text:span text:style-name="T24">ypt( a</text:span></text:span><text:span text:style-name="Default_20_Paragraph_20_Font"><text:span text:style-name="T26">e</text:span></text:span><text:span text:style-name="Default_20_Paragraph_20_Font"><text:span text:style-name="T24">s_key,</text:span></text:span></text:p>
            <text:p text:style-name="Table_20_Contents"><text:span text:style-name="Default_20_Paragraph_20_Font"><text:span text:style-name="T24"><text:s text:c="5"/></text:span></text:span><text:span text:style-name="Default_20_Paragraph_20_Font"><text:span text:style-name="T27"><text:s/></text:span></text:span><text:span text:style-name="Default_20_Paragraph_20_Font"><text:span text:style-name="T24"><text:s text:c="6"/>padding.OAEP(</text:span></text:span></text:p>
            <text:p text:style-name="Table_20_Contents"><text:span text:style-name="Default_20_Paragraph_20_Font"><text:span text:style-name="T24"><text:s text:c="8"/></text:span></text:span><text:span text:style-name="Default_20_Paragraph_20_Font"><text:span text:style-name="T26"><text:s/></text:span></text:span><text:span text:style-name="Default_20_Paragraph_20_Font"><text:span text:style-name="T24"><text:s text:c="6"/></text:span></text:span><text:span text:style-name="Default_20_Paragraph_20_Font"><text:span text:style-name="T26"><text:s/></text:span></text:span><text:span text:style-name="Default_20_Paragraph_20_Font"><text:span text:style-name="T24">mgf=padd</text:span></text:span><text:span text:style-name="Default_20_Paragraph_20_Font"><text:span text:style-name="T27">i</text:span></text:span><text:span text:style-name="Default_20_Paragraph_20_Font"><text:span text:style-name="T24">ng.MGF1(</text:span></text:span></text:p>
            <text:p text:style-name="Table_20_Contents"><text:span text:style-name="Default_20_Paragraph_20_Font"><text:span text:style-name="T24"><text:s text:c="8"/></text:span></text:span><text:span text:style-name="Default_20_Paragraph_20_Font"><text:span text:style-name="T27"><text:s/></text:span></text:span><text:span text:style-name="Default_20_Paragraph_20_Font"><text:span text:style-name="T24"><text:s text:c="11"/>algorithm=hash</text:span></text:span><text:span text:style-name="Default_20_Paragraph_20_Font"><text:span text:style-name="T26">e</text:span></text:span><text:span text:style-name="Default_20_Paragraph_20_Font"><text:span text:style-name="T24">s.SHA2</text:span></text:span><text:span text:style-name="Default_20_Paragraph_20_Font"><text:span text:style-name="T26">5</text:span></text:span><text:span text:style-name="Default_20_Paragraph_20_Font"><text:span text:style-name="T24">6()</text:span></text:span></text:p>
            <text:p text:style-name="Table_20_Contents"><text:span text:style-name="Default_20_Paragraph_20_Font"><text:span text:style-name="T24"><text:s text:c="4"/></text:span></text:span><text:span text:style-name="Default_20_Paragraph_20_Font"><text:span text:style-name="T27"><text:s/></text:span></text:span><text:span text:style-name="Default_20_Paragraph_20_Font"><text:span text:style-name="T24"><text:s text:c="11"/>),</text:span></text:span></text:p>
            <text:p text:style-name="Table_20_Contents"><text:span text:style-name="Default_20_Paragraph_20_Font"><text:span text:style-name="T24"><text:s text:c="6"/></text:span></text:span><text:span text:style-name="Default_20_Paragraph_20_Font"><text:span text:style-name="T26"><text:s/></text:span></text:span><text:span text:style-name="Default_20_Paragraph_20_Font"><text:span text:style-name="T23"><text:s text:c="4"/></text:span></text:span><text:span text:style-name="Default_20_Paragraph_20_Font"><text:span text:style-name="T27"><text:s/></text:span></text:span><text:span text:style-name="Default_20_Paragraph_20_Font"><text:span text:style-name="T24"><text:s text:c="4"/>algorithm</text:span></text:span><text:span text:style-name="Default_20_Paragraph_20_Font"><text:span text:style-name="T27">=</text:span></text:span><text:span text:style-name="Default_20_Paragraph_20_Font"><text:span text:style-name="T24">hashes.SH</text:span></text:span><text:span text:style-name="Default_20_Paragraph_20_Font"><text:span text:style-name="T27">A2</text:span></text:span><text:span text:style-name="Default_20_Paragraph_20_Font"><text:span text:style-name="T24">56(),</text:span></text:span></text:p>
            <text:p text:style-name="Table_20_Contents"><text:span text:style-name="Default_20_Paragraph_20_Font"><text:span text:style-name="T24"><text:s/></text:span></text:span><text:span text:style-name="Default_20_Paragraph_20_Font"><text:span text:style-name="T23"><text:s text:c="6"/></text:span></text:span><text:span text:style-name="Default_20_Paragraph_20_Font"><text:span text:style-name="T24"><text:s text:c="9"/>label</text:span></text:span><text:span text:style-name="Default_20_Paragraph_20_Font"><text:span text:style-name="T27">=N</text:span></text:span><text:span text:style-name="Default_20_Paragraph_20_Font"><text:span text:style-name="T24">one</text:span></text:span></text:p>
            <text:p text:style-name="Table_20_Contents"><text:span text:style-name="Default_20_Paragraph_20_Font"><text:span text:style-name="T23"><text:s text:c="5"/></text:span></text:span><text:span text:style-name="Default_20_Paragraph_20_Font"><text:span text:style-name="T24"><text:s/></text:span></text:span><text:span text:style-name="Default_20_Paragraph_20_Font"><text:span text:style-name="T30"><text:s text:c="6"/>)</text:span></text:span></text:p>
            <text:p text:style-name="Table_20_Contents"><text:span text:style-name="Default_20_Paragraph_20_Font"><text:span text:style-name="T24"><text:s/></text:span></text:span><text:span text:style-name="Default_20_Paragraph_20_Font"><text:span text:style-name="T23"><text:s text:c="2"/></text:span></text:span><text:span text:style-name="Default_20_Paragraph_20_Font"><text:span text:style-name="T24"><text:s text:c="3"/></text:span></text:span><text:span text:style-name="Default_20_Paragraph_20_Font"><text:span text:style-name="T27"><text:s/></text:span></text:span><text:span text:style-name="Default_20_Paragraph_20_Font"><text:span text:style-name="T24"><text:s/>)</text:span></text:span></text:p>
            <text:p text:style-name="P56"/>
            <text:p text:style-name="Table_20_Contents"><text:span text:style-name="Default_20_Paragraph_20_Font"><text:span text:style-name="T24"><text:s text:c="2"/></text:span></text:span><text:span text:style-name="Default_20_Paragraph_20_Font"><text:span text:style-name="T23"><text:s text:c="5"/></text:span></text:span><text:span text:style-name="Default_20_Paragraph_20_Font"><text:span text:style-name="T24"><text:s/>return encrypted</text:span></text:span><text:span text:style-name="Default_20_Paragraph_20_Font"><text:span text:style-name="T27">_</text:span></text:span><text:span text:style-name="Default_20_Paragraph_20_Font"><text:span text:style-name="T24">key</text:span></text:span></text:p>
            <text:p text:style-name="P56"/>
            <text:p text:style-name="Table_20_Contents"><text:span text:style-name="Default_20_Paragraph_20_Font"><text:span text:style-name="T24"><text:s text:c="4"/>e</text:span></text:span><text:span text:style-name="Default_20_Paragraph_20_Font"><text:span text:style-name="T29">xcept Exception as e:</text:span></text:span></text:p>
            <text:p text:style-name="Table_20_Contents"><text:span text:style-name="Default_20_Paragraph_20_Font"><text:span text:style-name="T29"><text:s text:c="8"/>raise Encryp</text:span></text:span><text:span text:style-name="Default_20_Paragraph_20_Font"><text:span text:style-name="T31">t</text:span></text:span><text:span text:style-name="Default_20_Paragraph_20_Font"><text:span text:style-name="T28">ion</text:span></text:span><text:span text:style-name="Default_20_Paragraph_20_Font"><text:span text:style-name="T24">Err</text:span></text:span><text:span text:style-name="Default_20_Paragraph_20_Font"><text:span text:style-name="T31">o</text:span></text:span><text:span text:style-name="Default_20_Paragraph_20_Font"><text:span text:style-name="T29">r</text:span></text:span><text:span text:style-name="Default_20_Paragraph_20_Font"><text:span text:style-name="T27">(</text:span></text:span></text:p>
            <text:p text:style-name="Table_20_Contents"><text:span text:style-name="Default_20_Paragraph_20_Font"><text:span text:style-name="T24"><text:s text:c="7"/></text:span></text:span><text:span text:style-name="Default_20_Paragraph_20_Font"><text:span text:style-name="T32"><text:s text:c="5"/>f"Błąd szyfrowania klucza AES kluczem RSA: {str(e)}"</text:span></text:span></text:p>
            <text:p text:style-name="Table_20_Contents"><text:span text:style-name="Default_20_Paragraph_20_Font"><text:span text:style-name="T32"><text:s text:c="8"/></text:span></text:span><text:span text:style-name="Default_20_Paragraph_20_Font"><text:span text:style-name="T33">)</text:span></text:span></text:p>
          </table:table-cell>
        </table:table-row>
      </table:table>
      <text:h text:style-name="Nagłówek_20_3" text:outline-level="3"><text:bookmark-start text:name="__RefHeading___Toc6705_3721631286"/>5.2.2. Moduł deszyfrowania<text:bookmark-end text:name="__RefHeading___Toc6705_3721631286"/></text:h>
      <text:p text:style-name="P8"><text:tab/>Moduł deszyfrowania odpowiada za odzyskiwanie danych, które zostały wcześniej zabezpieczone przy użyciu modułu szyfrowania.</text:p>
      <text:p text:style-name="P8">Interfejs modułu deszyfrowania został zaimplementowany w pliku „<text:span text:style-name="Default_20_Paragraph_20_Font"><text:span text:style-name="T1">decrypt.py”</text:span></text:span> jako klasa <text:span text:style-name="Default_20_Paragraph_20_Font"><text:span text:style-name="T1">DecryptFrame</text:span></text:span>, dziedzicząca z klasy bazowej <text:span text:style-name="Default_20_Paragraph_20_Font"><text:span text:style-name="T1">tk.Frame</text:span></text:span>. Odpowiada ona za utworzenie elementów graficznych widocznych w interfejsie użytkownika. Struktura ekranu modułu <text:span text:style-name="Default_20_Paragraph_20_Font"><text:span text:style-name="T1">Decrypt</text:span></text:span> przedstawiona została na poniższym rysunku (<text:span text:style-name="Default_20_Paragraph_20_Font"><text:span text:style-name="T1">Rys. 3</text:span></text:span>).</text:p>
      <text:p text:style-name="P45"><text:soft-page-break/><text:span text:style-name="Strong_20_Emphasis"><text:span text:style-name="T5">Rys. 3. Okno modułu deszyfrowania.</text:span></text:span></text:p>
      <text:p text:style-name="P8">W celu poprawnego odszyfrowania użytkownik musi zadeklarować:</text:p>
      <text:list text:style-name="L30">
        <text:list-item>
          <text:p text:style-name="P58"><text:span text:style-name="Default_20_Paragraph_20_Font"><text:span text:style-name="T1">Plik wejściowy</text:span></text:span> – plik zawierający zaszyfrowane dane w formacie binarnym,</text:p>
        </text:list-item>
        <text:list-item>
          <text:p text:style-name="P58"><text:span text:style-name="Default_20_Paragraph_20_Font"><text:span text:style-name="T1">Plik wyjściowy – </text:span></text:span>lokalizację oraz nazwę pliku, do którego zapisane zostaną dane po odszyfrowaniu,</text:p>
        </text:list-item>
        <text:list-item>
          <text:p text:style-name="P58"><text:span text:style-name="Default_20_Paragraph_20_Font"><text:span text:style-name="T1">Nonce/IV</text:span></text:span> - <text:s/>plik <text:span text:style-name="Default_20_Paragraph_20_Font"><text:span text:style-name="T1">.nonce,</text:span></text:span></text:p>
        </text:list-item>
        <text:list-item>
          <text:p text:style-name="P58">plik <text:span text:style-name="Default_20_Paragraph_20_Font"><text:span text:style-name="T1">.key</text:span></text:span> lub plik <text:span text:style-name="Default_20_Paragraph_20_Font"><text:span text:style-name="T1">.key.enc</text:span></text:span> – plik zawierający klucz AES lub klucz AES zaszyfrowany kluczem publicznym RSA,</text:p>
        </text:list-item>
        <text:list-item>
          <text:p text:style-name="P58">plik klucza prywatnego – do rozszyfrownaia klucza AES (jeżeli zaszyfrowany).</text:p>
        </text:list-item>
      </text:list>
      <text:p text:style-name="P8"><text:tab/>Po kliknięciu przycisku „<text:span text:style-name="Default_20_Paragraph_20_Font"><text:span text:style-name="T1">Odszyfruj”</text:span></text:span> uruchamiana jest metoda <text:span text:style-name="Default_20_Paragraph_20_Font"><text:span text:style-name="T1">decrypt() (Listing 4.), </text:span></text:span>która sprawdza, czy użytkownik wskazał wszystkie wspomniane wcześniej pliki. Brak któregokolwiek z wymaganych elementów, podobnie jak w przypadku modułu <text:span text:style-name="Default_20_Paragraph_20_Font"><text:span text:style-name="T1">Encrypt</text:span></text:span>, powoduje wyświetlenie komunikatu błędu.</text:p>
      <text:p text:style-name="P8"><text:tab/>Właściwe odszyfrowanie realizowane jest przez funkcję <text:span text:style-name="Default_20_Paragraph_20_Font"><text:span text:style-name="T1">decrypt_dispatcher()</text:span></text:span> <text:span text:style-name="Default_20_Paragraph_20_Font"><text:span text:style-name="T1">(Listing 5.) </text:span></text:span>znajdującą się w module „<text:span text:style-name="Default_20_Paragraph_20_Font"><text:span text:style-name="T1">crypto_lib.py”</text:span></text:span>. Funkcja ta sprawdza wybrany tryb szyfrowania, pobiera klucz AES i wartość Nonce/IV. Jeżeli nie użyto szyfrowania hybrydowego, klucz AES odczytywany jest bezpośrednio z pliku <text:span text:style-name="Default_20_Paragraph_20_Font"><text:span text:style-name="T1">.key</text:span></text:span>. W przeciwnym wypadku funkcja korzysta z <text:soft-page-break/><text:span text:style-name="Default_20_Paragraph_20_Font"><text:span text:style-name="T1">decrypt_aes_key_with_rsa() (Listing 6.)</text:span></text:span>, która odszyfrowuje plik <text:span text:style-name="Default_20_Paragraph_20_Font"><text:span text:style-name="T1">.key.enc</text:span></text:span> przy użyciu klucza prywatnego RSA odbiorcy.</text:p>
      <text:p text:style-name="P8"><text:tab/>Po pobraniu klucza AES oraz wartości nonce wywoływana jest funkcja <text:span text:style-name="Default_20_Paragraph_20_Font"><text:span text:style-name="T1">decrypt_file_aes_gcm()</text:span></text:span>. Funkcja ta odczytuje zaszyfrowany plik w postaci binarnej, tworzy obiekt klasy <text:span text:style-name="Default_20_Paragraph_20_Font"><text:span text:style-name="T1">AESGCM</text:span></text:span>, a następnie wykonuje operację odszyfrowania. Otrzymane dane jawne zapisywane są do wskazanego przez użytkownika pliku wyjściowego. Wynikiem działania modułu jest plik zawierający odszyfrowane dane w pierwotnej postaci.</text:p>
      <text:p text:style-name="P8"><text:span text:style-name="Source_20_Text"><text:span text:style-name="T34"><text:tab/>Moduł deszyfrowania posiada ograniczenie związane z koniecznością znajomości oryginalnego rozszerzenia szyfrowanego pliku. Aplikacja nie zapisuje informacji o typie pliku przy szyfrowaniu i nie narzuca rozszerzenia pliku wynikowego podczas odszyfrowywania. W związku z tym użytkownik musi samodzielnie nadać plikowi wyjściowemu rozszerzenie odpowiadające jego pierwotnemu formatowi. W przypadku braku tej wiedzy odczytanie/interpretacja zawartości odszyfrowanego pliku może być utrudnione lub niemożliwe.</text:span></text:span></text:p>
      <text:p text:style-name="P8"><text:span text:style-name="Domyślna_20_czcionka_20_akapitu"><text:span text:style-name="T7">Listing 4. Kod metody decrypt().</text:span></text:span></text:p>
      <table:table table:name="Table4" table:style-name="Table4">
        <table:table-column table:style-name="Table4.A"/>
        <table:table-row>
          <table:table-cell table:style-name="Table4.A1" office:value-type="string">
            <text:p text:style-name="Table_20_Contents"><text:span text:style-name="Default_20_Paragraph_20_Font"><text:span text:style-name="T35">def</text:span></text:span><text:span text:style-name="Default_20_Paragraph_20_Font"><text:span text:style-name="T36"> </text:span></text:span><text:span text:style-name="Default_20_Paragraph_20_Font"><text:span text:style-name="T37">decrypt</text:span></text:span><text:span text:style-name="Default_20_Paragraph_20_Font"><text:span text:style-name="T36">(</text:span></text:span><text:span text:style-name="Default_20_Paragraph_20_Font"><text:span text:style-name="T38">self</text:span></text:span><text:span text:style-name="Default_20_Paragraph_20_Font"><text:span text:style-name="T36">):</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input_file:</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text:span></text:span><text:span text:style-name="Default_20_Paragraph_20_Font"><text:span text:style-name="T41">, </text:span></text:span><text:span text:style-name="Default_20_Paragraph_20_Font"><text:span text:style-name="T43">"Brak pliku wejściowego"</text:span></text:span><text:span text:style-name="Default_20_Paragraph_20_Font"><text:span text:style-name="T41">)</text:span></text:span></text:p>
            <text:p text:style-name="Table_20_Contents"><text:span text:style-name="Default_20_Paragraph_20_Font"><text:span text:style-name="T41"><text:s text:c="12"/></text:span></text:span><text:span text:style-name="Default_20_Paragraph_20_Font"><text:span text:style-name="T35">return</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text:span></text:span><text:span text:style-name="Default_20_Paragraph_20_Font"><text:span text:style-name="T41">, </text:span></text:span><text:span text:style-name="Default_20_Paragraph_20_Font"><text:span text:style-name="T43">"Brak pliku wyjściowego"</text:span></text:span><text:span text:style-name="Default_20_Paragraph_20_Font"><text:span text:style-name="T41">)</text:span></text:span></text:p>
            <text:p text:style-name="Table_20_Contents"><text:span text:style-name="Default_20_Paragraph_20_Font"><text:span text:style-name="T41"><text:s text:c="12"/></text:span></text:span><text:span text:style-name="Default_20_Paragraph_20_Font"><text:span text:style-name="T35">return</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aes_key_file:</text:span></text:span></text:p>
            <text:p text:style-name="Table_20_Contents"><text:span text:style-name="Default_20_Paragraph_20_Font"><text:span text:style-name="T36"><text:s text:c="12"/>messagebox</text:span></text:span><text:span text:style-name="Default_20_Paragraph_20_Font"><text:span text:style-name="T40">.</text:span></text:span><text:span text:style-name="Default_20_Paragraph_20_Font"><text:span text:style-name="T36">showerror(</text:span></text:span><text:span text:style-name="Default_20_Paragraph_20_Font"><text:span text:style-name="T44">"Błąd"</text:span></text:span><text:span text:style-name="Default_20_Paragraph_20_Font"><text:span text:style-name="T36">, </text:span></text:span><text:span text:style-name="Default_20_Paragraph_20_Font"><text:span text:style-name="T44">"Brak klucza AES"</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35">return</text:span></text:span></text:p>
            <text:p text:style-name="Table_20_Contents"><text:span text:style-name="Default_20_Paragraph_20_Font"><text:span text:style-name="T36"><text:s text:c="8"/>rsa_enabled </text:span></text:span><text:span text:style-name="Default_20_Paragraph_20_Font"><text:span text:style-name="T40">=</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aes_key_var</text:span></text:span><text:span text:style-name="Default_20_Paragraph_20_Font"><text:span text:style-name="T40">.</text:span></text:span><text:span text:style-name="Default_20_Paragraph_20_Font"><text:span text:style-name="T36">get()</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rsa_enabled </text:span></text:span><text:span text:style-name="Default_20_Paragraph_20_Font"><text:span text:style-name="T39">and</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rivate:</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text:span></text:span><text:span text:style-name="Default_20_Paragraph_20_Font"><text:span text:style-name="T41">, </text:span></text:span><text:span text:style-name="Default_20_Paragraph_20_Font"><text:span text:style-name="T43">"Brak klucza prywatnego RSA"</text:span></text:span><text:span text:style-name="Default_20_Paragraph_20_Font"><text:span text:style-name="T41">)</text:span></text:span></text:p>
            <text:p text:style-name="Table_20_Contents"><text:span text:style-name="Default_20_Paragraph_20_Font"><text:span text:style-name="T41"><text:s text:c="12"/></text:span></text:span><text:span text:style-name="Default_20_Paragraph_20_Font"><text:span text:style-name="T35">return</text:span></text:span></text:p>
            <text:p text:style-name="P59"/>
            <text:p text:style-name="Table_20_Contents"><text:span text:style-name="Default_20_Paragraph_20_Font"><text:span text:style-name="T36"><text:s text:c="8"/></text:span></text:span><text:span text:style-name="Default_20_Paragraph_20_Font"><text:span text:style-name="T35">try</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Odszyfrowywanie..."</text:span></text:span><text:span text:style-name="Default_20_Paragraph_20_Font"><text:span text:style-name="T36">)</text:span></text:span></text:p>
            <text:p text:style-name="Table_20_Contents"><text:span text:style-name="Default_20_Paragraph_20_Font"><text:span text:style-name="T36"><text:s text:c="12"/>algorithm </text:span></text:span><text:span text:style-name="Default_20_Paragraph_20_Font"><text:span text:style-name="T40">=</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selected_aes_mode</text:span></text:span><text:span text:style-name="Default_20_Paragraph_20_Font"><text:span text:style-name="T40">.</text:span></text:span><text:span text:style-name="Default_20_Paragraph_20_Font"><text:span text:style-name="T36">get()</text:span></text:span></text:p>
            <text:p text:style-name="Table_20_Contents"><text:span text:style-name="Default_20_Paragraph_20_Font"><text:span text:style-name="T36"><text:s text:c="12"/>decrypt_dispatcher(</text:span></text:span></text:p>
            <text:p text:style-name="Table_20_Contents"><text:span text:style-name="Default_20_Paragraph_20_Font"><text:span text:style-name="T36"><text:s text:c="16"/>algorithm</text:span></text:span><text:span text:style-name="Default_20_Paragraph_20_Font"><text:span text:style-name="T40">=</text:span></text:span><text:span text:style-name="Default_20_Paragraph_20_Font"><text:span text:style-name="T36">algorithm,</text:span></text:span></text:p>
            <text:p text:style-name="Table_20_Contents"><text:span text:style-name="Default_20_Paragraph_20_Font"><text:span text:style-name="T36"><text:s text:c="16"/>input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input_file,</text:span></text:span></text:p>
            <text:p text:style-name="Table_20_Contents"><text:span text:style-name="Default_20_Paragraph_20_Font"><text:span text:style-name="T36"><text:s text:c="16"/>output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Table_20_Contents"><text:span text:style-name="Default_20_Paragraph_20_Font"><text:span text:style-name="T36"><text:s text:c="16"/>aes_key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aes_key_file,</text:span></text:span></text:p>
            <text:p text:style-name="Table_20_Contents"><text:span text:style-name="Default_20_Paragraph_20_Font"><text:span text:style-name="T36"><text:s text:c="16"/>rsa_enabled</text:span></text:span><text:span text:style-name="Default_20_Paragraph_20_Font"><text:span text:style-name="T40">=</text:span></text:span><text:span text:style-name="Default_20_Paragraph_20_Font"><text:span text:style-name="T36">rsa_enabled,</text:span></text:span></text:p>
            <text:p text:style-name="Table_20_Contents"><text:span text:style-name="Default_20_Paragraph_20_Font"><text:span text:style-name="T36"><text:s text:c="16"/>rsa_private_key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rivate,</text:span></text:span></text:p>
            <text:p text:style-name="Table_20_Contents"><text:span text:style-name="Default_20_Paragraph_20_Font"><text:span text:style-name="T36"><text:s text:c="16"/>nonce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nonce_iv_file)</text:span></text:span></text:p>
            <text:p text:style-name="P59"/>
            <text:p text:style-name="Table_20_Contents"><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Gotowe"</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info(</text:span></text:span><text:span text:style-name="Default_20_Paragraph_20_Font"><text:span text:style-name="T43">"OK"</text:span></text:span><text:span text:style-name="Default_20_Paragraph_20_Font"><text:span text:style-name="T41">, </text:span></text:span><text:span text:style-name="Default_20_Paragraph_20_Font"><text:span text:style-name="T43">"Plik odszyfrowany"</text:span></text:span><text:span text:style-name="Default_20_Paragraph_20_Font"><text:span text:style-name="T41">)</text:span></text:span></text:p>
            <text:p text:style-name="P60"/>
            <text:p text:style-name="Table_20_Contents"><text:span text:style-name="Default_20_Paragraph_20_Font"><text:span text:style-name="T41"><text:s text:c="8"/></text:span></text:span><text:span text:style-name="Default_20_Paragraph_20_Font"><text:span text:style-name="T35">except</text:span></text:span><text:span text:style-name="Default_20_Paragraph_20_Font"><text:span text:style-name="T36"> </text:span></text:span><text:span text:style-name="Default_20_Paragraph_20_Font"><text:span text:style-name="T45">Exception</text:span></text:span><text:span text:style-name="Default_20_Paragraph_20_Font"><text:span text:style-name="T36"> </text:span></text:span><text:span text:style-name="Default_20_Paragraph_20_Font"><text:span text:style-name="T35">as</text:span></text:span><text:span text:style-name="Default_20_Paragraph_20_Font"><text:span text:style-name="T36"> e:</text:span></text:span></text:p>
            <text:p text:style-name="Table_20_Contents"><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Błąd"</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 odszyfrowania"</text:span></text:span><text:span text:style-name="Default_20_Paragraph_20_Font"><text:span text:style-name="T41">, </text:span></text:span><text:span text:style-name="Default_20_Paragraph_20_Font"><text:span text:style-name="T46">str</text:span></text:span><text:span text:style-name="Default_20_Paragraph_20_Font"><text:span text:style-name="T41">(e))</text:span></text:span></text:p>
          </table:table-cell>
        </table:table-row>
      </table:table>
      <text:p text:style-name="P8"/>
      <text:p text:style-name="P8"><text:span text:style-name="Domyślna_20_czcionka_20_akapitu"><text:span text:style-name="T16">Listing 5. Kod metody decrypt_dispatcher().</text:span></text:span></text:p>
      <table:table table:name="Table5" table:style-name="Table5">
        <table:table-column table:style-name="Table5.A"/>
        <table:table-row>
          <table:table-cell table:style-name="Table5.A1" office:value-type="string">
            <text:p text:style-name="P61"><text:span text:style-name="Default_20_Paragraph_20_Font"><text:span text:style-name="T35">def</text:span></text:span><text:span text:style-name="Default_20_Paragraph_20_Font"><text:span text:style-name="T36"> </text:span></text:span><text:span text:style-name="Default_20_Paragraph_20_Font"><text:span text:style-name="T37">decrypt_dispatcher</text:span></text:span><text:span text:style-name="Default_20_Paragraph_20_Font"><text:span text:style-name="T36">(</text:span></text:span><text:span text:style-name="Default_20_Paragraph_20_Font"><text:span text:style-name="T47"> </text:span></text:span><text:span text:style-name="Default_20_Paragraph_20_Font"><text:span text:style-name="T36">algorithm</text:span></text:span><text:span text:style-name="Default_20_Paragraph_20_Font"><text:span text:style-name="T47">,</text:span></text:span><text:span text:style-name="Default_20_Paragraph_20_Font"><text:span text:style-name="T36"> input_fil</text:span></text:span><text:span text:style-name="Default_20_Paragraph_20_Font"><text:span text:style-name="T47">e</text:span></text:span><text:span text:style-name="Default_20_Paragraph_20_Font"><text:span text:style-name="T36">, output_fi</text:span></text:span><text:span text:style-name="Default_20_Paragraph_20_Font"><text:span text:style-name="T47">l</text:span></text:span><text:span text:style-name="Default_20_Paragraph_20_Font"><text:span text:style-name="T36">e, aes_key_</text:span></text:span><text:span text:style-name="Default_20_Paragraph_20_Font"><text:span text:style-name="T40">f</text:span></text:span><text:span text:style-name="Default_20_Paragraph_20_Font"><text:span text:style-name="T35">ile=</text:span></text:span><text:span text:style-name="Default_20_Paragraph_20_Font"><text:span text:style-name="T36">N</text:span></text:span><text:span text:style-name="Default_20_Paragraph_20_Font"><text:span text:style-name="T47">o</text:span></text:span><text:span text:style-name="Default_20_Paragraph_20_Font"><text:span text:style-name="T36">ne, nonce</text:span></text:span><text:span text:style-name="Default_20_Paragraph_20_Font"><text:span text:style-name="T40">_</text:span></text:span><text:span text:style-name="Default_20_Paragraph_20_Font"><text:span text:style-name="T35">file</text:span></text:span><text:span text:style-name="Default_20_Paragraph_20_Font"><text:span text:style-name="T36">=</text:span></text:span><text:span text:style-name="Default_20_Paragraph_20_Font"><text:span text:style-name="T47">N</text:span></text:span><text:span text:style-name="Default_20_Paragraph_20_Font"><text:span text:style-name="T36">one, rsa_e</text:span></text:span><text:span text:style-name="Default_20_Paragraph_20_Font"><text:span text:style-name="T40">n</text:span></text:span><text:span text:style-name="Default_20_Paragraph_20_Font"><text:span text:style-name="T35">abled</text:span></text:span><text:span text:style-name="Default_20_Paragraph_20_Font"><text:span text:style-name="T36">=</text:span></text:span><text:span text:style-name="Default_20_Paragraph_20_Font"><text:span text:style-name="T47">F</text:span></text:span><text:span text:style-name="Default_20_Paragraph_20_Font"><text:span text:style-name="T36">alse,</text:span></text:span></text:p>
            <text:p text:style-name="P61"><text:span text:style-name="Default_20_Paragraph_20_Font"><text:span text:style-name="T36"><text:s text:c="4"/>rsa_private_k</text:span></text:span><text:span text:style-name="Default_20_Paragraph_20_Font"><text:span text:style-name="T40">e</text:span></text:span><text:span text:style-name="Default_20_Paragraph_20_Font"><text:span text:style-name="T35">y_fi</text:span></text:span><text:span text:style-name="Default_20_Paragraph_20_Font"><text:span text:style-name="T47">l</text:span></text:span><text:span text:style-name="Default_20_Paragraph_20_Font"><text:span text:style-name="T36">e=</text:span></text:span><text:span text:style-name="Default_20_Paragraph_20_Font"><text:span text:style-name="T47">No</text:span></text:span><text:span text:style-name="Default_20_Paragraph_20_Font"><text:span text:style-name="T36">ne </text:span></text:span><text:span text:style-name="Default_20_Paragraph_20_Font"><text:span text:style-name="T35">):</text:span></text:span></text:p>
            <text:p text:style-name="P62"/>
            <text:p text:style-name="P61"><text:span text:style-name="Default_20_Paragraph_20_Font"><text:span text:style-name="T36"><text:s text:c="4"/>if </text:span></text:span><text:span text:style-name="Default_20_Paragraph_20_Font"><text:span text:style-name="T40">al</text:span></text:span><text:span text:style-name="Default_20_Paragraph_20_Font"><text:span text:style-name="T36">g</text:span></text:span><text:span text:style-name="Default_20_Paragraph_20_Font"><text:span text:style-name="T44">orithm != "AE</text:span></text:span><text:span text:style-name="Default_20_Paragraph_20_Font"><text:span text:style-name="T36">S</text:span></text:span><text:span text:style-name="Default_20_Paragraph_20_Font"><text:span text:style-name="T47">-</text:span></text:span><text:span text:style-name="Default_20_Paragraph_20_Font"><text:span text:style-name="T36">256-GCM"</text:span></text:span><text:span text:style-name="Default_20_Paragraph_20_Font"><text:span text:style-name="T35">:</text:span></text:span></text:p>
            <text:p text:style-name="P61"><text:span text:style-name="Default_20_Paragraph_20_Font"><text:span text:style-name="T35"><text:s text:c="2"/></text:span></text:span><text:span text:style-name="Default_20_Paragraph_20_Font"><text:span text:style-name="T36"><text:s/></text:span></text:span><text:span text:style-name="Default_20_Paragraph_20_Font"><text:span text:style-name="T45"><text:s text:c="5"/>raise</text:span></text:span><text:span text:style-name="Default_20_Paragraph_20_Font"><text:span text:style-name="T36"> </text:span></text:span><text:span text:style-name="Default_20_Paragraph_20_Font"><text:span text:style-name="T44">ValueError("Nieobsługiwan</text:span></text:span><text:span text:style-name="Default_20_Paragraph_20_Font"><text:span text:style-name="T36">y</text:span></text:span><text:span text:style-name="Default_20_Paragraph_20_Font"><text:span text:style-name="T47"> t</text:span></text:span><text:span text:style-name="Default_20_Paragraph_20_Font"><text:span text:style-name="T36">ryb </text:span></text:span><text:span text:style-name="Default_20_Paragraph_20_Font"><text:span text:style-name="T48">AES")</text:span></text:span></text:p>
            <text:p text:style-name="P63"/>
            <text:p text:style-name="P61"><text:span text:style-name="Default_20_Paragraph_20_Font"><text:span text:style-name="T36"><text:s text:c="4"/>i</text:span></text:span><text:span text:style-name="Default_20_Paragraph_20_Font"><text:span text:style-name="T47">f</text:span></text:span><text:span text:style-name="Default_20_Paragraph_20_Font"><text:span text:style-name="T36"> rsa_enabled:</text:span></text:span></text:p>
            <text:p text:style-name="P61"><text:span text:style-name="Default_20_Paragraph_20_Font"><text:span text:style-name="T36"><text:s/></text:span></text:span><text:span text:style-name="Default_20_Paragraph_20_Font"><text:span text:style-name="T40"><text:s/></text:span></text:span><text:span text:style-name="Default_20_Paragraph_20_Font"><text:span text:style-name="T36"><text:s text:c="6"/>aes_key = decrypt_ae</text:span></text:span><text:span text:style-name="Default_20_Paragraph_20_Font"><text:span text:style-name="T47">s</text:span></text:span><text:span text:style-name="Default_20_Paragraph_20_Font"><text:span text:style-name="T36">_key_with_rsa( en</text:span></text:span><text:span text:style-name="Default_20_Paragraph_20_Font"><text:span text:style-name="T40">c</text:span></text:span><text:span text:style-name="Default_20_Paragraph_20_Font"><text:span text:style-name="T36">rypted_key_pa</text:span></text:span><text:span text:style-name="Default_20_Paragraph_20_Font"><text:span text:style-name="T47">t</text:span></text:span><text:span text:style-name="Default_20_Paragraph_20_Font"><text:span text:style-name="T36">h=aes_key_file,</text:span></text:span><text:span text:style-name="Default_20_Paragraph_20_Font"><text:span text:style-name="T40"> </text:span></text:span><text:span text:style-name="Default_20_Paragraph_20_Font"><text:span text:style-name="T36">private_key_path=rsa</text:span></text:span><text:span text:style-name="Default_20_Paragraph_20_Font"><text:span text:style-name="T47">_</text:span></text:span><text:span text:style-name="Default_20_Paragraph_20_Font"><text:span text:style-name="T36">private_k</text:span></text:span><text:span text:style-name="Default_20_Paragraph_20_Font"><text:span text:style-name="T47">e</text:span></text:span><text:span text:style-name="Default_20_Paragraph_20_Font"><text:span text:style-name="T36">y_fi</text:span></text:span><text:span text:style-name="Default_20_Paragraph_20_Font"><text:span text:style-name="T35">le </text:span></text:span><text:span text:style-name="Default_20_Paragraph_20_Font"><text:span text:style-name="T36">)</text:span></text:span></text:p>
            <text:p text:style-name="P61"><text:soft-page-break/><text:span text:style-name="Default_20_Paragraph_20_Font"><text:span text:style-name="T35"><text:s text:c="3"/></text:span></text:span><text:span text:style-name="Default_20_Paragraph_20_Font"><text:span text:style-name="T36"><text:s/></text:span></text:span><text:span text:style-name="Default_20_Paragraph_20_Font"><text:span text:style-name="T38">else</text:span></text:span><text:span text:style-name="Default_20_Paragraph_20_Font"><text:span text:style-name="T36">:</text:span></text:span></text:p>
            <text:p text:style-name="P61"><text:span text:style-name="Default_20_Paragraph_20_Font"><text:span text:style-name="T36"><text:s text:c="8"/>with</text:span></text:span><text:span text:style-name="Default_20_Paragraph_20_Font"><text:span text:style-name="T44"> ope</text:span></text:span><text:span text:style-name="Default_20_Paragraph_20_Font"><text:span text:style-name="T36">n(</text:span></text:span><text:span text:style-name="Default_20_Paragraph_20_Font"><text:span text:style-name="T35">ae</text:span></text:span><text:span text:style-name="Default_20_Paragraph_20_Font"><text:span text:style-name="T36">s_k</text:span></text:span><text:span text:style-name="Default_20_Paragraph_20_Font"><text:span text:style-name="T47">e</text:span></text:span><text:span text:style-name="Default_20_Paragraph_20_Font"><text:span text:style-name="T36">y_file, "rb") as f:</text:span></text:span></text:p>
            <text:p text:style-name="P61"><text:span text:style-name="Default_20_Paragraph_20_Font"><text:span text:style-name="T36"><text:s text:c="2"/></text:span></text:span><text:span text:style-name="Default_20_Paragraph_20_Font"><text:span text:style-name="T40"><text:s/></text:span></text:span><text:span text:style-name="Default_20_Paragraph_20_Font"><text:span text:style-name="T36"><text:s text:c="6"/></text:span></text:span><text:span text:style-name="Default_20_Paragraph_20_Font"><text:span text:style-name="T47"><text:s text:c="2"/></text:span></text:span><text:span text:style-name="Default_20_Paragraph_20_Font"><text:span text:style-name="T36"><text:s/>aes</text:span></text:span><text:span text:style-name="Default_20_Paragraph_20_Font"><text:span text:style-name="T48">_key = f.read()</text:span></text:span></text:p>
            <text:p text:style-name="P63"/>
            <text:p text:style-name="P61"><text:span text:style-name="Default_20_Paragraph_20_Font"><text:span text:style-name="T36"><text:s text:c="4"/>if </text:span></text:span><text:span text:style-name="Default_20_Paragraph_20_Font"><text:span text:style-name="T35">not n</text:span></text:span><text:span text:style-name="Default_20_Paragraph_20_Font"><text:span text:style-name="T36">o</text:span></text:span><text:span text:style-name="Default_20_Paragraph_20_Font"><text:span text:style-name="T45">nce_file:</text:span></text:span></text:p>
            <text:p text:style-name="P61"><text:span text:style-name="Default_20_Paragraph_20_Font"><text:span text:style-name="T44"><text:s text:c="8"/>raise ValueEr</text:span></text:span><text:span text:style-name="Default_20_Paragraph_20_Font"><text:span text:style-name="T36">r</text:span></text:span><text:span text:style-name="Default_20_Paragraph_20_Font"><text:span text:style-name="T47">or</text:span></text:span><text:span text:style-name="Default_20_Paragraph_20_Font"><text:span text:style-name="T36">("Br</text:span></text:span><text:span text:style-name="Default_20_Paragraph_20_Font"><text:span text:style-name="T35">ak p</text:span></text:span><text:span text:style-name="Default_20_Paragraph_20_Font"><text:span text:style-name="T36">l</text:span></text:span><text:span text:style-name="Default_20_Paragraph_20_Font"><text:span text:style-name="T38">iku </text:span></text:span><text:span text:style-name="Default_20_Paragraph_20_Font"><text:span text:style-name="T36">nonce/IV")</text:span></text:span></text:p>
            <text:p text:style-name="P62"/>
            <text:p text:style-name="P61"><text:span text:style-name="Default_20_Paragraph_20_Font"><text:span text:style-name="T44"><text:s text:c="3"/></text:span></text:span><text:span text:style-name="Default_20_Paragraph_20_Font"><text:span text:style-name="T36"><text:s/>w</text:span></text:span><text:span text:style-name="Default_20_Paragraph_20_Font"><text:span text:style-name="T35">it</text:span></text:span><text:span text:style-name="Default_20_Paragraph_20_Font"><text:span text:style-name="T36">h o</text:span></text:span><text:span text:style-name="Default_20_Paragraph_20_Font"><text:span text:style-name="T47">p</text:span></text:span><text:span text:style-name="Default_20_Paragraph_20_Font"><text:span text:style-name="T36">en(nonce_file,</text:span></text:span><text:span text:style-name="Default_20_Paragraph_20_Font"><text:span text:style-name="T40"> </text:span></text:span><text:span text:style-name="Default_20_Paragraph_20_Font"><text:span text:style-name="T36">"r</text:span></text:span><text:span text:style-name="Default_20_Paragraph_20_Font"><text:span text:style-name="T40">b</text:span></text:span><text:span text:style-name="Default_20_Paragraph_20_Font"><text:span text:style-name="T36">") as </text:span></text:span><text:span text:style-name="Default_20_Paragraph_20_Font"><text:span text:style-name="T47">f:</text:span></text:span></text:p>
            <text:p text:style-name="P61"><text:span text:style-name="Default_20_Paragraph_20_Font"><text:span text:style-name="T36"><text:s text:c="2"/></text:span></text:span><text:span text:style-name="Default_20_Paragraph_20_Font"><text:span text:style-name="T48"><text:s text:c="6"/>nonce = f.r</text:span></text:span><text:span text:style-name="Default_20_Paragraph_20_Font"><text:span text:style-name="T47">e</text:span></text:span><text:span text:style-name="Default_20_Paragraph_20_Font"><text:span text:style-name="T36">ad()</text:span></text:span></text:p>
            <text:p text:style-name="P62"/>
            <text:p text:style-name="P61"><text:span text:style-name="Default_20_Paragraph_20_Font"><text:span text:style-name="T36"><text:s text:c="4"/>decrypt_f</text:span></text:span><text:span text:style-name="Default_20_Paragraph_20_Font"><text:span text:style-name="T40">i</text:span></text:span><text:span text:style-name="Default_20_Paragraph_20_Font"><text:span text:style-name="T36">le_aes_gcm(</text:span></text:span></text:p>
            <text:p text:style-name="P61"><text:span text:style-name="Default_20_Paragraph_20_Font"><text:span text:style-name="T36"><text:s text:c="8"/>input_file</text:span></text:span><text:span text:style-name="Default_20_Paragraph_20_Font"><text:span text:style-name="T40">=</text:span></text:span><text:span text:style-name="Default_20_Paragraph_20_Font"><text:span text:style-name="T36">input_file,</text:span></text:span></text:p>
            <text:p text:style-name="P61"><text:span text:style-name="Default_20_Paragraph_20_Font"><text:span text:style-name="T36"><text:s text:c="8"/>output_</text:span></text:span><text:span text:style-name="Default_20_Paragraph_20_Font"><text:span text:style-name="T40">f</text:span></text:span><text:span text:style-name="Default_20_Paragraph_20_Font"><text:span text:style-name="T36">ile=outp</text:span></text:span><text:span text:style-name="Default_20_Paragraph_20_Font"><text:span text:style-name="T47">u</text:span></text:span><text:span text:style-name="Default_20_Paragraph_20_Font"><text:span text:style-name="T36">t_file,</text:span></text:span></text:p>
            <text:p text:style-name="P61"><text:span text:style-name="Default_20_Paragraph_20_Font"><text:span text:style-name="T36"><text:s text:c="4"/></text:span></text:span><text:span text:style-name="Default_20_Paragraph_20_Font"><text:span text:style-name="T40"><text:s/></text:span></text:span><text:span text:style-name="Default_20_Paragraph_20_Font"><text:span text:style-name="T36"><text:s text:c="3"/>ae</text:span></text:span><text:span text:style-name="Default_20_Paragraph_20_Font"><text:span text:style-name="T47">s</text:span></text:span><text:span text:style-name="Default_20_Paragraph_20_Font"><text:span text:style-name="T36">_key=</text:span></text:span><text:span text:style-name="Default_20_Paragraph_20_Font"><text:span text:style-name="T49">aes_key,</text:span></text:span></text:p>
            <text:p text:style-name="P64"><text:s text:c="8"/>nonce=nonce )</text:p>
          </table:table-cell>
        </table:table-row>
      </table:table>
      <text:p text:style-name="P50"/>
      <text:p text:style-name="P8"><text:span text:style-name="Domyślna_20_czcionka_20_akapitu"><text:span text:style-name="T7">Listing 6. Metody wykorzystywane przez decrypt_dispatcher().</text:span></text:span></text:p>
      <table:table table:name="Table6" table:style-name="Table6">
        <table:table-column table:style-name="Table6.A"/>
        <table:table-row>
          <table:table-cell table:style-name="Table6.A1" office:value-type="string">
            <text:p text:style-name="P61"><text:span text:style-name="Default_20_Paragraph_20_Font"><text:span text:style-name="T35">def</text:span></text:span><text:span text:style-name="Default_20_Paragraph_20_Font"><text:span text:style-name="T36"> </text:span></text:span><text:span text:style-name="Default_20_Paragraph_20_Font"><text:span text:style-name="T37">decrypt_aes_key_with_rsa</text:span></text:span><text:span text:style-name="Default_20_Paragraph_20_Font"><text:span text:style-name="T36">(encrypted_key_path, private_key_path):</text:span></text:span></text:p>
            <text:p text:style-name="P61"><text:span text:style-name="Default_20_Paragraph_20_Font"><text:span text:style-name="T36"><text:s text:c="3"/></text:span></text:span><text:span text:style-name="Default_20_Paragraph_20_Font"><text:span text:style-name="T35"><text:s/>wit</text:span></text:span><text:span text:style-name="Default_20_Paragraph_20_Font"><text:span text:style-name="T36">h</text:span></text:span><text:span text:style-name="Default_20_Paragraph_20_Font"><text:span text:style-name="T38"> ope</text:span></text:span><text:span text:style-name="Default_20_Paragraph_20_Font"><text:span text:style-name="T36">n(private_key_path,</text:span></text:span><text:span text:style-name="Default_20_Paragraph_20_Font"><text:span text:style-name="T44"> "rb</text:span></text:span><text:span text:style-name="Default_20_Paragraph_20_Font"><text:span text:style-name="T36">")</text:span></text:span><text:span text:style-name="Default_20_Paragraph_20_Font"><text:span text:style-name="T35"> a</text:span></text:span><text:span text:style-name="Default_20_Paragraph_20_Font"><text:span text:style-name="T36">s f</text:span></text:span><text:span text:style-name="Default_20_Paragraph_20_Font"><text:span text:style-name="T47">:</text:span></text:span><text:span text:style-name="Default_20_Paragraph_20_Font"><text:span text:style-name="T36"> private_ke</text:span></text:span><text:span text:style-name="Default_20_Paragraph_20_Font"><text:span text:style-name="T40">y</text:span></text:span><text:span text:style-name="Default_20_Paragraph_20_Font"><text:span text:style-name="T36"> = load_pem_private_key</text:span></text:span><text:span text:style-name="Default_20_Paragraph_20_Font"><text:span text:style-name="T40">(</text:span></text:span><text:span text:style-name="Default_20_Paragraph_20_Font"><text:span text:style-name="T36">f.read(), passwo</text:span></text:span><text:span text:style-name="Default_20_Paragraph_20_Font"><text:span text:style-name="T40">r</text:span></text:span><text:span text:style-name="Default_20_Paragraph_20_Font"><text:span text:style-name="T35">d=No</text:span></text:span><text:span text:style-name="Default_20_Paragraph_20_Font"><text:span text:style-name="T36">n</text:span></text:span><text:span text:style-name="Default_20_Paragraph_20_Font"><text:span text:style-name="T47">e)</text:span></text:span></text:p>
            <text:p text:style-name="P61"><text:span text:style-name="Default_20_Paragraph_20_Font"><text:span text:style-name="T35"><text:s text:c="4"/></text:span></text:span><text:span text:style-name="Default_20_Paragraph_20_Font"><text:span text:style-name="T36">w</text:span></text:span><text:span text:style-name="Default_20_Paragraph_20_Font"><text:span text:style-name="T38">ith </text:span></text:span><text:span text:style-name="Default_20_Paragraph_20_Font"><text:span text:style-name="T36">open(encrypted_key_pa</text:span></text:span><text:span text:style-name="Default_20_Paragraph_20_Font"><text:span text:style-name="T44">th, </text:span></text:span><text:span text:style-name="Default_20_Paragraph_20_Font"><text:span text:style-name="T36">"r</text:span></text:span><text:span text:style-name="Default_20_Paragraph_20_Font"><text:span text:style-name="T35">b"</text:span></text:span><text:span text:style-name="Default_20_Paragraph_20_Font"><text:span text:style-name="T36">) a</text:span></text:span><text:span text:style-name="Default_20_Paragraph_20_Font"><text:span text:style-name="T47">s</text:span></text:span><text:span text:style-name="Default_20_Paragraph_20_Font"><text:span text:style-name="T36"> f:</text:span></text:span></text:p>
            <text:p text:style-name="P61"><text:span text:style-name="Default_20_Paragraph_20_Font"><text:span text:style-name="T36"><text:s text:c="8"/>encrypted</text:span></text:span><text:span text:style-name="Default_20_Paragraph_20_Font"><text:span text:style-name="T40">_</text:span></text:span><text:span text:style-name="Default_20_Paragraph_20_Font"><text:span text:style-name="T36">ke</text:span></text:span><text:span text:style-name="Default_20_Paragraph_20_Font"><text:span text:style-name="T40">y</text:span></text:span><text:span text:style-name="Default_20_Paragraph_20_Font"><text:span text:style-name="T36"> = f.r</text:span></text:span><text:span text:style-name="Default_20_Paragraph_20_Font"><text:span text:style-name="T47">ea</text:span></text:span><text:span text:style-name="Default_20_Paragraph_20_Font"><text:span text:style-name="T36">d()</text:span></text:span></text:p>
            <text:p text:style-name="P62"/>
            <text:p text:style-name="P61"><text:span text:style-name="Default_20_Paragraph_20_Font"><text:span text:style-name="T36"><text:s text:c="4"/>a</text:span></text:span><text:span text:style-name="Default_20_Paragraph_20_Font"><text:span text:style-name="T40">e</text:span></text:span><text:span text:style-name="Default_20_Paragraph_20_Font"><text:span text:style-name="T36">s_key = priv</text:span></text:span><text:span text:style-name="Default_20_Paragraph_20_Font"><text:span text:style-name="T40">a</text:span></text:span><text:span text:style-name="Default_20_Paragraph_20_Font"><text:span text:style-name="T36">te_key.d</text:span></text:span><text:span text:style-name="Default_20_Paragraph_20_Font"><text:span text:style-name="T47">e</text:span></text:span><text:span text:style-name="Default_20_Paragraph_20_Font"><text:span text:style-name="T36">crypt( encryp</text:span></text:span><text:span text:style-name="Default_20_Paragraph_20_Font"><text:span text:style-name="T47">t</text:span></text:span><text:span text:style-name="Default_20_Paragraph_20_Font"><text:span text:style-name="T36">ed_key,</text:span></text:span></text:p>
            <text:p text:style-name="P61"><text:span text:style-name="Default_20_Paragraph_20_Font"><text:span text:style-name="T36"><text:s text:c="6"/></text:span></text:span><text:span text:style-name="Default_20_Paragraph_20_Font"><text:span text:style-name="T40"><text:s/></text:span></text:span><text:span text:style-name="Default_20_Paragraph_20_Font"><text:span text:style-name="T36"><text:s/>padd</text:span></text:span><text:span text:style-name="Default_20_Paragraph_20_Font"><text:span text:style-name="T47">i</text:span></text:span><text:span text:style-name="Default_20_Paragraph_20_Font"><text:span text:style-name="T36">ng.OAEP( m</text:span></text:span><text:span text:style-name="Default_20_Paragraph_20_Font"><text:span text:style-name="T40">g</text:span></text:span><text:span text:style-name="Default_20_Paragraph_20_Font"><text:span text:style-name="T36">f=padding.MGF1</text:span></text:span><text:span text:style-name="Default_20_Paragraph_20_Font"><text:span text:style-name="T40">(</text:span></text:span><text:span text:style-name="Default_20_Paragraph_20_Font"><text:span text:style-name="T36">algori</text:span></text:span><text:span text:style-name="Default_20_Paragraph_20_Font"><text:span text:style-name="T40">t</text:span></text:span><text:span text:style-name="Default_20_Paragraph_20_Font"><text:span text:style-name="T36">hm=hashes.</text:span></text:span><text:span text:style-name="Default_20_Paragraph_20_Font"><text:span text:style-name="T47">S</text:span></text:span><text:span text:style-name="Default_20_Paragraph_20_Font"><text:span text:style-name="T36">HA256()), algor</text:span></text:span><text:span text:style-name="Default_20_Paragraph_20_Font"><text:span text:style-name="T40">i</text:span></text:span><text:span text:style-name="Default_20_Paragraph_20_Font"><text:span text:style-name="T36">thm=hashe</text:span></text:span><text:span text:style-name="Default_20_Paragraph_20_Font"><text:span text:style-name="T47">s</text:span></text:span><text:span text:style-name="Default_20_Paragraph_20_Font"><text:span text:style-name="T36">.SHA256(), label=No</text:span></text:span><text:span text:style-name="Default_20_Paragraph_20_Font"><text:span text:style-name="T47">n</text:span></text:span><text:span text:style-name="Default_20_Paragraph_20_Font"><text:span text:style-name="T36">e </text:span></text:span><text:span text:style-name="Default_20_Paragraph_20_Font"><text:span text:style-name="T35">) </text:span></text:span><text:span text:style-name="Default_20_Paragraph_20_Font"><text:span text:style-name="T36">)</text:span></text:span></text:p>
            <text:p text:style-name="P61"><text:span text:style-name="Default_20_Paragraph_20_Font"><text:span text:style-name="T36"><text:s text:c="2"/></text:span></text:span><text:span text:style-name="Default_20_Paragraph_20_Font"><text:span text:style-name="T47"><text:s text:c="2"/></text:span></text:span><text:span text:style-name="Default_20_Paragraph_20_Font"><text:span text:style-name="T35">ret</text:span></text:span><text:span text:style-name="Default_20_Paragraph_20_Font"><text:span text:style-name="T36">u</text:span></text:span><text:span text:style-name="Default_20_Paragraph_20_Font"><text:span text:style-name="T37">rn aes_key</text:span></text:span></text:p>
            <text:p text:style-name="P65"/>
            <text:p text:style-name="P61"><text:span text:style-name="Default_20_Paragraph_20_Font"><text:span text:style-name="T37">def de</text:span></text:span><text:span text:style-name="Default_20_Paragraph_20_Font"><text:span text:style-name="T36">crypt_file_aes_gcm(input_file, output_file</text:span></text:span><text:span text:style-name="Default_20_Paragraph_20_Font"><text:span text:style-name="T47">,</text:span></text:span><text:span text:style-name="Default_20_Paragraph_20_Font"><text:span text:style-name="T36"> aes</text:span></text:span><text:span text:style-name="Default_20_Paragraph_20_Font"><text:span text:style-name="T35">_ke</text:span></text:span><text:span text:style-name="Default_20_Paragraph_20_Font"><text:span text:style-name="T36">y</text:span></text:span><text:span text:style-name="Default_20_Paragraph_20_Font"><text:span text:style-name="T47">,</text:span></text:span><text:span text:style-name="Default_20_Paragraph_20_Font"><text:span text:style-name="T36"> nonce):</text:span></text:span></text:p>
            <text:p text:style-name="P61"><text:span text:style-name="Default_20_Paragraph_20_Font"><text:span text:style-name="T35"><text:s text:c="2"/></text:span></text:span><text:span text:style-name="Default_20_Paragraph_20_Font"><text:span text:style-name="T36"><text:s/></text:span></text:span><text:span text:style-name="Default_20_Paragraph_20_Font"><text:span text:style-name="T38"><text:s/>try</text:span></text:span><text:span text:style-name="Default_20_Paragraph_20_Font"><text:span text:style-name="T36">:</text:span></text:span></text:p>
            <text:p text:style-name="P61"><text:span text:style-name="Default_20_Paragraph_20_Font"><text:span text:style-name="T36"><text:s text:c="8"/>wi</text:span></text:span><text:span text:style-name="Default_20_Paragraph_20_Font"><text:span text:style-name="T44">th o</text:span></text:span><text:span text:style-name="Default_20_Paragraph_20_Font"><text:span text:style-name="T36">pe</text:span></text:span><text:span text:style-name="Default_20_Paragraph_20_Font"><text:span text:style-name="T35">n(</text:span></text:span><text:span text:style-name="Default_20_Paragraph_20_Font"><text:span text:style-name="T36">inp</text:span></text:span><text:span text:style-name="Default_20_Paragraph_20_Font"><text:span text:style-name="T47">u</text:span></text:span><text:span text:style-name="Default_20_Paragraph_20_Font"><text:span text:style-name="T36">t_file, "rb") as f:</text:span></text:span></text:p>
            <text:p text:style-name="P61"><text:span text:style-name="Default_20_Paragraph_20_Font"><text:span text:style-name="T36"><text:s text:c="2"/></text:span></text:span><text:span text:style-name="Default_20_Paragraph_20_Font"><text:span text:style-name="T40"><text:s/></text:span></text:span><text:span text:style-name="Default_20_Paragraph_20_Font"><text:span text:style-name="T36"><text:s text:c="2"/></text:span></text:span><text:span text:style-name="Default_20_Paragraph_20_Font"><text:span text:style-name="T40"><text:s/></text:span></text:span><text:span text:style-name="Default_20_Paragraph_20_Font"><text:span text:style-name="T36"><text:s text:c="6"/></text:span></text:span><text:span text:style-name="Default_20_Paragraph_20_Font"><text:span text:style-name="T47">ci</text:span></text:span><text:span text:style-name="Default_20_Paragraph_20_Font"><text:span text:style-name="T36">phertext = f.re</text:span></text:span><text:span text:style-name="Default_20_Paragraph_20_Font"><text:span text:style-name="T40">a</text:span></text:span><text:span text:style-name="Default_20_Paragraph_20_Font"><text:span text:style-name="T36">d()</text:span></text:span></text:p>
            <text:p text:style-name="P61"><text:span text:style-name="Default_20_Paragraph_20_Font"><text:span text:style-name="T36"><text:s text:c="8"/>a</text:span></text:span><text:span text:style-name="Default_20_Paragraph_20_Font"><text:span text:style-name="T47">es</text:span></text:span><text:span text:style-name="Default_20_Paragraph_20_Font"><text:span text:style-name="T36">gcm = AESGCM(aes_k</text:span></text:span><text:span text:style-name="Default_20_Paragraph_20_Font"><text:span text:style-name="T40">e</text:span></text:span><text:span text:style-name="Default_20_Paragraph_20_Font"><text:span text:style-name="T36">y)</text:span></text:span></text:p>
            <text:p text:style-name="P61"><text:span text:style-name="Default_20_Paragraph_20_Font"><text:span text:style-name="T36"><text:s/></text:span></text:span><text:span text:style-name="Default_20_Paragraph_20_Font"><text:span text:style-name="T40"><text:s/></text:span></text:span><text:span text:style-name="Default_20_Paragraph_20_Font"><text:span text:style-name="T36"><text:s text:c="6"/>pl</text:span></text:span><text:span text:style-name="Default_20_Paragraph_20_Font"><text:span text:style-name="T47">a</text:span></text:span><text:span text:style-name="Default_20_Paragraph_20_Font"><text:span text:style-name="T36">intext = aesgcm.de</text:span></text:span><text:span text:style-name="Default_20_Paragraph_20_Font"><text:span text:style-name="T47">c</text:span></text:span><text:span text:style-name="Default_20_Paragraph_20_Font"><text:span text:style-name="T36">rypt(nonc</text:span></text:span><text:span text:style-name="Default_20_Paragraph_20_Font"><text:span text:style-name="T47">e</text:span></text:span><text:span text:style-name="Default_20_Paragraph_20_Font"><text:span text:style-name="T36">, </text:span></text:span><text:span text:style-name="Default_20_Paragraph_20_Font"><text:span text:style-name="T35">c</text:span></text:span><text:span text:style-name="Default_20_Paragraph_20_Font"><text:span text:style-name="T47">i</text:span></text:span><text:span text:style-name="Default_20_Paragraph_20_Font"><text:span text:style-name="T36">phertext,</text:span></text:span><text:span text:style-name="Default_20_Paragraph_20_Font"><text:span text:style-name="T47"> </text:span></text:span><text:span text:style-name="Default_20_Paragraph_20_Font"><text:span text:style-name="T36">N</text:span></text:span><text:span text:style-name="Default_20_Paragraph_20_Font"><text:span text:style-name="T38">one </text:span></text:span><text:span text:style-name="Default_20_Paragraph_20_Font"><text:span text:style-name="T36">)</text:span></text:span></text:p>
            <text:p text:style-name="P62"/>
            <text:p text:style-name="P61"><text:span text:style-name="Default_20_Paragraph_20_Font"><text:span text:style-name="T44"><text:s text:c="4"/></text:span></text:span><text:span text:style-name="Default_20_Paragraph_20_Font"><text:span text:style-name="T36"><text:s text:c="2"/></text:span></text:span><text:span text:style-name="Default_20_Paragraph_20_Font"><text:span text:style-name="T35"><text:s text:c="2"/></text:span></text:span><text:span text:style-name="Default_20_Paragraph_20_Font"><text:span text:style-name="T36">wit</text:span></text:span><text:span text:style-name="Default_20_Paragraph_20_Font"><text:span text:style-name="T47">h</text:span></text:span><text:span text:style-name="Default_20_Paragraph_20_Font"><text:span text:style-name="T36"> open(output_</text:span></text:span><text:span text:style-name="Default_20_Paragraph_20_Font"><text:span text:style-name="T40">f</text:span></text:span><text:span text:style-name="Default_20_Paragraph_20_Font"><text:span text:style-name="T36">ile, "wb") as f:</text:span></text:span></text:p>
            <text:p text:style-name="P61"><text:span text:style-name="Default_20_Paragraph_20_Font"><text:span text:style-name="T36"><text:s text:c="4"/></text:span></text:span><text:span text:style-name="Default_20_Paragraph_20_Font"><text:span text:style-name="T35"><text:s text:c="6"/></text:span></text:span><text:span text:style-name="Default_20_Paragraph_20_Font"><text:span text:style-name="T36"><text:s/></text:span></text:span><text:span text:style-name="Default_20_Paragraph_20_Font"><text:span text:style-name="T45"><text:s/>f.write(</text:span></text:span><text:span text:style-name="Default_20_Paragraph_20_Font"><text:span text:style-name="T36">p</text:span></text:span><text:span text:style-name="Default_20_Paragraph_20_Font"><text:span text:style-name="T35">la</text:span></text:span><text:span text:style-name="Default_20_Paragraph_20_Font"><text:span text:style-name="T36">int</text:span></text:span><text:span text:style-name="Default_20_Paragraph_20_Font"><text:span text:style-name="T47">e</text:span></text:span><text:span text:style-name="Default_20_Paragraph_20_Font"><text:span text:style-name="T36">xt)</text:span></text:span></text:p>
            <text:p text:style-name="P61"><text:span text:style-name="Default_20_Paragraph_20_Font"><text:span text:style-name="T36"><text:s/></text:span></text:span><text:span text:style-name="Default_20_Paragraph_20_Font"><text:span text:style-name="T35"><text:s text:c="3"/>ex</text:span></text:span><text:span text:style-name="Default_20_Paragraph_20_Font"><text:span text:style-name="T36">cept Exception as</text:span></text:span><text:span text:style-name="Default_20_Paragraph_20_Font"><text:span text:style-name="T44"> e:</text:span></text:span></text:p>
            <text:p text:style-name="P61"><text:span text:style-name="Default_20_Paragraph_20_Font"><text:span text:style-name="T44"><text:s text:c="8"/>raise EncryptionE</text:span></text:span><text:span text:style-name="Default_20_Paragraph_20_Font"><text:span text:style-name="T50">r</text:span></text:span><text:span text:style-name="Default_20_Paragraph_20_Font"><text:span text:style-name="T38">ror</text:span></text:span><text:span text:style-name="Default_20_Paragraph_20_Font"><text:span text:style-name="T36">(f"</text:span></text:span><text:span text:style-name="Default_20_Paragraph_20_Font"><text:span text:style-name="T50">B</text:span></text:span><text:span text:style-name="Default_20_Paragraph_20_Font"><text:span text:style-name="T44">ł</text:span></text:span><text:span text:style-name="Default_20_Paragraph_20_Font"><text:span text:style-name="T36">ą</text:span></text:span><text:span text:style-name="Default_20_Paragraph_20_Font"><text:span text:style-name="T49">d odszyfrowania AES-GCM: {str(e)}")</text:span></text:span></text:p>
          </table:table-cell>
        </table:table-row>
      </table:table>
      <text:h text:style-name="P66" text:outline-level="3"/>
      <text:h text:style-name="P24" text:outline-level="3"><text:bookmark-start text:name="__RefHeading___Toc6707_3721631286"/>5.2.3. Moduł podpisu cyfrowego<text:bookmark-end text:name="__RefHeading___Toc6707_3721631286"/></text:h>
      <text:p text:style-name="P8"><text:tab/>Moduł podpisu cyfrowego odpowiada za generowanie oraz weryfikację podpisów z wykorzystaniem algorytmu <text:span text:style-name="T1">RSA</text:span> oraz funkcji <text:span text:style-name="T1">SHA-256</text:span>.</text:p>
      <text:p text:style-name="P8"><text:tab/>Interfejs modułu został zaimplementowany w pliku „<text:span text:style-name="Default_20_Paragraph_20_Font"><text:span text:style-name="T1">sign.py”</text:span></text:span> jako klasa <text:span text:style-name="Default_20_Paragraph_20_Font"><text:span text:style-name="T1">SignFrame</text:span></text:span>, dziedzicząca z klasy bazowej <text:span text:style-name="Default_20_Paragraph_20_Font"><text:span text:style-name="T1">tk.Frame</text:span></text:span>. Odpowiada ona za utworzenie elementów graficznych widocznych w zakładce <text:span text:style-name="Default_20_Paragraph_20_Font"><text:span text:style-name="T1">Sign. </text:span></text:span>Struktura ekranu modułu przedstawiona została na poniższym rysunku.</text:p>
      <text:p text:style-name="P45"><text:span text:style-name="Strong_20_Emphasis"><text:span text:style-name="T5">Rys. 4. Okno modułu podpisu cyfrowego i weryfikacji podpisu.</text:span></text:span></text:p>
      <text:p text:style-name="P8"><text:tab/>W części odpowiedzialnej za podpisywanie użytkownik wskazuje plik przeznaczony do podpisania, klucz prywatny <text:span text:style-name="T1">RSA</text:span> nadawcy oraz lokalizację pliku podpisu. Aplikacja umożliwia podpisywanie dowolnych typów plików. Wygenerowany podpis zapisywany jest jako osobny plik binarny.</text:p>
      <text:p text:style-name="P8"><text:tab/>Po kliknięciu przycisku Podpisz uruchamiana jest metoda <text:span text:style-name="Default_20_Paragraph_20_Font"><text:span text:style-name="T1">sign() (Listing 7.)</text:span></text:span>, która sprawdza poprawność wprowadzonych danych (obecność pliku przeznaczonego do podpisania, klucza prywatnego <text:span text:style-name="T1">RSA</text:span> oraz lokalizacji pliku podpisu). W przypadku braku wymaganych danych wyświetlany jest odpowiedni komunikat w polu statusu.</text:p>
      <text:p text:style-name="P8"><text:tab/>Proces podpisywania realizowany jest przez funkcję <text:span text:style-name="Default_20_Paragraph_20_Font"><text:span text:style-name="T1">sign_file() (Listing 8.)</text:span></text:span> znajdującą się w module „<text:span text:style-name="Default_20_Paragraph_20_Font"><text:span text:style-name="T1">rsa_signature.py”</text:span></text:span>. Funkcja odczytuje klucz prywatny RSA zapisany w formacie <text:span text:style-name="Default_20_Paragraph_20_Font"><text:span text:style-name="T1">PEM</text:span></text:span>, a <text:soft-page-break/>następnie pobiera zawartość wskazanego pliku. Kolejnym krokiem jest wygenerowanie podpisu cyfrowego przy użyciu metody <text:span text:style-name="Default_20_Paragraph_20_Font"><text:span text:style-name="T1">private_key.sign() (Listing 8.)</text:span></text:span>. W procesie tym wykorzystywany jest algorytm <text:span text:style-name="T1">RSA</text:span> wraz z mechanizmem dopełniania <text:span text:style-name="T1">PSS (Probabilistic Signature Scheme)</text:span> oraz funkcją skrótu <text:span text:style-name="T1">SHA-256</text:span>.</text:p>
      <text:p text:style-name="P8"><text:tab/>Druga część modułu odpowiada za weryfikację podpisu cyfrowego. W tym celu poprawnej weryfikacji podpisu użytkownik wskazuje plik do weryfikacji, klucz publiczny <text:span text:style-name="T1">RSA</text:span> nadawcy oraz plik zawierający podpis cyfrowy. Po wybraniu przycisku „<text:span text:style-name="Default_20_Paragraph_20_Font"><text:span text:style-name="T1">Zweryfikuj”</text:span></text:span> uruchamiana jest metoda <text:span text:style-name="Default_20_Paragraph_20_Font"><text:span text:style-name="T1">verify_signature() (Listing 7.)</text:span></text:span>, która sprawdza kompletność wymaganych danych, a następnie wywołuje funkcję <text:span text:style-name="Default_20_Paragraph_20_Font"><text:span text:style-name="T1">verify_signature() (Listing 8.)</text:span></text:span> znajdującą się w module „<text:span text:style-name="Default_20_Paragraph_20_Font"><text:span text:style-name="T1">rsa_signature.py”</text:span></text:span>.</text:p>
      <text:p text:style-name="P8"><text:tab/>Proces weryfikacji polega na odczytaniu klucza publicznego <text:span text:style-name="Default_20_Paragraph_20_Font"><text:span text:style-name="T1">RSA</text:span></text:span>, danych z pliku oraz podpisu cyfrowego. Następnie wykonywana jest operacja <text:span text:style-name="Default_20_Paragraph_20_Font"><text:span text:style-name="T1">public_key.verify()</text:span></text:span>, wykorzystująca ten sam schemat <text:span text:style-name="Default_20_Paragraph_20_Font"><text:span text:style-name="T1">RSA-PSS</text:span></text:span> oraz funkcję <text:span text:style-name="Default_20_Paragraph_20_Font"><text:span text:style-name="T1">SHA-256</text:span></text:span>, które zostały użyte podczas podpisywania. Jeżeli podpis jest poprawny użytkownik otrzymuje komunikat <text:span text:style-name="T1">„Podpis poprawny”</text:span>. W przeciwnym przypadku zgłaszany jest wyjątek, a aplikacja informuje użytkownika o niepoprawnym podpisie.</text:p>
      <text:p text:style-name="P8">Zastosowane rozwiązanie pozwala wykryć każdą modyfikację podpisanego pliku (niewielka zmiana zawartości powoduje wygenerowanie innego skrótu). Dzięki temu moduł zapewnia integralność danych oraz umożliwia potwierdzenie tożsamości nadawcy.</text:p>
      <text:p text:style-name="P8"><text:span text:style-name="Domyślna_20_czcionka_20_akapitu"><text:span text:style-name="T16">Listing 7. Metody sign() i verify_signature().</text:span></text:span></text:p>
      <table:table table:name="Table7" table:style-name="Table7">
        <table:table-column table:style-name="Table7.A"/>
        <table:table-row>
          <table:table-cell table:style-name="Table7.A1" office:value-type="string">
            <text:p text:style-name="P61"><text:span text:style-name="Default_20_Paragraph_20_Font"><text:span text:style-name="T36"><text:s text:c="3"/></text:span></text:span><text:span text:style-name="Default_20_Paragraph_20_Font"><text:span text:style-name="T35">def</text:span></text:span><text:span text:style-name="Default_20_Paragraph_20_Font"><text:span text:style-name="T36"> </text:span></text:span><text:span text:style-name="Default_20_Paragraph_20_Font"><text:span text:style-name="T37">sign</text:span></text:span><text:span text:style-name="Default_20_Paragraph_20_Font"><text:span text:style-name="T36">(</text:span></text:span><text:span text:style-name="Default_20_Paragraph_20_Font"><text:span text:style-name="T38">self</text:span></text:span><text:span text:style-name="Default_20_Paragraph_20_Font"><text:span text:style-name="T36">):</text:span></text:span></text:p>
            <text:p text:style-name="P61"><text:span text:style-name="Default_20_Paragraph_20_Font"><text:span text:style-name="T36"><text:s text:c="8"/></text:span></text:span><text:span text:style-name="Default_20_Paragraph_20_Font"><text:span text:style-name="T35">try</text:span></text:span><text:span text:style-name="Default_20_Paragraph_20_Font"><text:span text:style-name="T36">:</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sign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lik"</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private_rsa_key_file:</text:span></text:span></text:p>
            <text:p text:style-name="P61"><text:span text:style-name="Default_20_Paragraph_20_Font"><text:span text:style-name="T36"><text:s text:c="16"/></text:span></text:span><text:span text:style-name="Default_20_Paragraph_20_Font"><text:span text:style-name="T46">self</text:span></text:span><text:span text:style-name="Default_20_Paragraph_20_Font"><text:span text:style-name="T42">.</text:span></text:span><text:span text:style-name="Default_20_Paragraph_20_Font"><text:span text:style-name="T41">busy_status_label_1</text:span></text:span><text:span text:style-name="Default_20_Paragraph_20_Font"><text:span text:style-name="T42">.</text:span></text:span><text:span text:style-name="Default_20_Paragraph_20_Font"><text:span text:style-name="T41">config(text</text:span></text:span><text:span text:style-name="Default_20_Paragraph_20_Font"><text:span text:style-name="T42">=</text:span></text:span><text:span text:style-name="Default_20_Paragraph_20_Font"><text:span text:style-name="T43">"Wybierz klucz prywatny"</text:span></text:span><text:span text:style-name="Default_20_Paragraph_20_Font"><text:span text:style-name="T41">)</text:span></text:span></text:p>
            <text:p text:style-name="P61"><text:span text:style-name="Default_20_Paragraph_20_Font"><text:span text:style-name="T41"><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lik podpisu"</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sign_file(</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sign_file, </text:span></text:span><text:span text:style-name="Default_20_Paragraph_20_Font"><text:span text:style-name="T38">self</text:span></text:span><text:span text:style-name="Default_20_Paragraph_20_Font"><text:span text:style-name="T40">.</text:span></text:span><text:span text:style-name="Default_20_Paragraph_20_Font"><text:span text:style-name="T36">private_rsa_key_file, </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P61"><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Plik podpisany"</text:span></text:span><text:span text:style-name="Default_20_Paragraph_20_Font"><text:span text:style-name="T36">)</text:span></text:span></text:p>
            <text:p text:style-name="P67"/>
            <text:p text:style-name="P61"><text:span text:style-name="Default_20_Paragraph_20_Font"><text:span text:style-name="T36"><text:s text:c="8"/></text:span></text:span><text:span text:style-name="Default_20_Paragraph_20_Font"><text:span text:style-name="T35">except</text:span></text:span><text:span text:style-name="Default_20_Paragraph_20_Font"><text:span text:style-name="T36"> </text:span></text:span><text:span text:style-name="Default_20_Paragraph_20_Font"><text:span text:style-name="T45">Exception</text:span></text:span><text:span text:style-name="Default_20_Paragraph_20_Font"><text:span text:style-name="T36"> </text:span></text:span><text:span text:style-name="Default_20_Paragraph_20_Font"><text:span text:style-name="T35">as</text:span></text:span><text:span text:style-name="Default_20_Paragraph_20_Font"><text:span text:style-name="T36"> e:</text:span></text:span></text:p>
            <text:p text:style-name="P61"><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f"Błąd: </text:span></text:span><text:span text:style-name="Default_20_Paragraph_20_Font"><text:span text:style-name="T50">{</text:span></text:span><text:span text:style-name="Default_20_Paragraph_20_Font"><text:span text:style-name="T36">e</text:span></text:span><text:span text:style-name="Default_20_Paragraph_20_Font"><text:span text:style-name="T50">}</text:span></text:span><text:span text:style-name="Default_20_Paragraph_20_Font"><text:span text:style-name="T44">"</text:span></text:span><text:span text:style-name="Default_20_Paragraph_20_Font"><text:span text:style-name="T36">)</text:span></text:span></text:p>
            <text:p text:style-name="P67"/>
            <text:p text:style-name="P61"><text:span text:style-name="Default_20_Paragraph_20_Font"><text:span text:style-name="T36"><text:s text:c="4"/></text:span></text:span><text:span text:style-name="Default_20_Paragraph_20_Font"><text:span text:style-name="T35">def</text:span></text:span><text:span text:style-name="Default_20_Paragraph_20_Font"><text:span text:style-name="T36"> </text:span></text:span><text:span text:style-name="Default_20_Paragraph_20_Font"><text:span text:style-name="T37">verify_signature</text:span></text:span><text:span text:style-name="Default_20_Paragraph_20_Font"><text:span text:style-name="T36">(</text:span></text:span><text:span text:style-name="Default_20_Paragraph_20_Font"><text:span text:style-name="T38">self</text:span></text:span><text:span text:style-name="Default_20_Paragraph_20_Font"><text:span text:style-name="T36">):</text:span></text:span></text:p>
            <text:p text:style-name="P61"><text:span text:style-name="Default_20_Paragraph_20_Font"><text:span text:style-name="T36"><text:s text:c="8"/></text:span></text:span><text:span text:style-name="Default_20_Paragraph_20_Font"><text:span text:style-name="T35">try</text:span></text:span><text:span text:style-name="Default_20_Paragraph_20_Font"><text:span text:style-name="T36">:</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verify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lik"</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ublic:</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klucz publiczny"</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signature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odpis"</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result </text:span></text:span><text:span text:style-name="Default_20_Paragraph_20_Font"><text:span text:style-name="T40">=</text:span></text:span><text:span text:style-name="Default_20_Paragraph_20_Font"><text:span text:style-name="T36"> verify_signature(</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verify_file, </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ublic, </text:span></text:span><text:span text:style-name="Default_20_Paragraph_20_Font"><text:span text:style-name="T38">self</text:span></text:span><text:span text:style-name="Default_20_Paragraph_20_Font"><text:span text:style-name="T40">.</text:span></text:span><text:span text:style-name="Default_20_Paragraph_20_Font"><text:span text:style-name="T36">signature_file)</text:span></text:span></text:p>
            <text:p text:style-name="P67"/>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result:</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Podpis poprawny"</text:span></text:span><text:span text:style-name="Default_20_Paragraph_20_Font"><text:span text:style-name="T36">)</text:span></text:span></text:p>
            <text:p text:style-name="P61"><text:span text:style-name="Default_20_Paragraph_20_Font"><text:span text:style-name="T36"><text:s text:c="12"/></text:span></text:span><text:span text:style-name="Default_20_Paragraph_20_Font"><text:span text:style-name="T35">else</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Podpis NIEPOPRAWNY"</text:span></text:span><text:span text:style-name="Default_20_Paragraph_20_Font"><text:span text:style-name="T36">)</text:span></text:span></text:p>
            <text:p text:style-name="P67"/>
            <text:p text:style-name="P61"><text:span text:style-name="Default_20_Paragraph_20_Font"><text:span text:style-name="T36"><text:s text:c="8"/></text:span></text:span><text:span text:style-name="Default_20_Paragraph_20_Font"><text:span text:style-name="T35">except</text:span></text:span><text:span text:style-name="Default_20_Paragraph_20_Font"><text:span text:style-name="T36"> </text:span></text:span><text:span text:style-name="Default_20_Paragraph_20_Font"><text:span text:style-name="T45">Exception</text:span></text:span><text:span text:style-name="Default_20_Paragraph_20_Font"><text:span text:style-name="T36"> </text:span></text:span><text:span text:style-name="Default_20_Paragraph_20_Font"><text:span text:style-name="T35">as</text:span></text:span><text:span text:style-name="Default_20_Paragraph_20_Font"><text:span text:style-name="T36"> e:</text:span></text:span></text:p>
            <text:p text:style-name="P61"><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f"Błąd: </text:span></text:span><text:span text:style-name="Default_20_Paragraph_20_Font"><text:span text:style-name="T50">{</text:span></text:span><text:span text:style-name="Default_20_Paragraph_20_Font"><text:span text:style-name="T36">e</text:span></text:span><text:span text:style-name="Default_20_Paragraph_20_Font"><text:span text:style-name="T50">}</text:span></text:span><text:span text:style-name="Default_20_Paragraph_20_Font"><text:span text:style-name="T44">"</text:span></text:span><text:span text:style-name="Default_20_Paragraph_20_Font"><text:span text:style-name="T36">)</text:span></text:span></text:p>
          </table:table-cell>
        </table:table-row>
      </table:table>
      <text:p text:style-name="P50"/>
      <text:p text:style-name="P8"><text:soft-page-break/><text:span text:style-name="Domyślna_20_czcionka_20_akapitu"><text:span text:style-name="T16">Listing 7. Metody verify_signature() i sign_file().</text:span></text:span></text:p>
      <table:table table:name="Table8" table:style-name="Table8">
        <table:table-column table:style-name="Table8.A"/>
        <table:table-row>
          <table:table-cell table:style-name="Table8.A1" office:value-type="string">
            <text:p text:style-name="P61"><text:span text:style-name="Default_20_Paragraph_20_Font"><text:span text:style-name="T36">def sign_file(file_path, private_k</text:span></text:span><text:span text:style-name="Default_20_Paragraph_20_Font"><text:span text:style-name="T47">ey</text:span></text:span><text:span text:style-name="Default_20_Paragraph_20_Font"><text:span text:style-name="T36">_pat</text:span></text:span><text:span text:style-name="Default_20_Paragraph_20_Font"><text:span text:style-name="T35">h, o</text:span></text:span><text:span text:style-name="Default_20_Paragraph_20_Font"><text:span text:style-name="T36">u</text:span></text:span><text:span text:style-name="Default_20_Paragraph_20_Font"><text:span text:style-name="T38">tput</text:span></text:span><text:span text:style-name="Default_20_Paragraph_20_Font"><text:span text:style-name="T36">_signature_path):</text:span></text:span></text:p>
            <text:p text:style-name="P61"><text:span text:style-name="Default_20_Paragraph_20_Font"><text:span text:style-name="T44"><text:s text:c="2"/></text:span></text:span><text:span text:style-name="Default_20_Paragraph_20_Font"><text:span text:style-name="T36"><text:s text:c="2"/></text:span></text:span><text:span text:style-name="Default_20_Paragraph_20_Font"><text:span text:style-name="T35">wi</text:span></text:span><text:span text:style-name="Default_20_Paragraph_20_Font"><text:span text:style-name="T36">th </text:span></text:span><text:span text:style-name="Default_20_Paragraph_20_Font"><text:span text:style-name="T47">o</text:span></text:span><text:span text:style-name="Default_20_Paragraph_20_Font"><text:span text:style-name="T36">pen(private_key_path</text:span></text:span><text:span text:style-name="Default_20_Paragraph_20_Font"><text:span text:style-name="T40">,</text:span></text:span><text:span text:style-name="Default_20_Paragraph_20_Font"><text:span text:style-name="T36"> "rb") as f:</text:span></text:span></text:p>
            <text:p text:style-name="P61"><text:span text:style-name="Default_20_Paragraph_20_Font"><text:span text:style-name="T40"><text:s/></text:span></text:span><text:span text:style-name="Default_20_Paragraph_20_Font"><text:span text:style-name="T36"><text:s text:c="7"/>private_key = </text:span></text:span><text:span text:style-name="Default_20_Paragraph_20_Font"><text:span text:style-name="T47">s</text:span></text:span><text:span text:style-name="Default_20_Paragraph_20_Font"><text:span text:style-name="T36">erialization.</text:span></text:span><text:span text:style-name="Default_20_Paragraph_20_Font"><text:span text:style-name="T40">l</text:span></text:span><text:span text:style-name="Default_20_Paragraph_20_Font"><text:span text:style-name="T36">oad_pem</text:span></text:span><text:span text:style-name="Default_20_Paragraph_20_Font"><text:span text:style-name="T47">_</text:span></text:span><text:span text:style-name="Default_20_Paragraph_20_Font"><text:span text:style-name="T36">private_key( f.read(),</text:span></text:span><text:span text:style-name="Default_20_Paragraph_20_Font"><text:span text:style-name="T38"> p</text:span></text:span><text:span text:style-name="Default_20_Paragraph_20_Font"><text:span text:style-name="T36">assword=None</text:span></text:span><text:span text:style-name="Default_20_Paragraph_20_Font"><text:span text:style-name="T44"> </text:span></text:span><text:span text:style-name="Default_20_Paragraph_20_Font"><text:span text:style-name="T36">)</text:span></text:span></text:p>
            <text:p text:style-name="P62"/>
            <text:p text:style-name="P61"><text:span text:style-name="Default_20_Paragraph_20_Font"><text:span text:style-name="T36"><text:s text:c="4"/>with o</text:span></text:span><text:span text:style-name="Default_20_Paragraph_20_Font"><text:span text:style-name="T40">p</text:span></text:span><text:span text:style-name="Default_20_Paragraph_20_Font"><text:span text:style-name="T36">en</text:span></text:span><text:span text:style-name="Default_20_Paragraph_20_Font"><text:span text:style-name="T40">(</text:span></text:span><text:span text:style-name="Default_20_Paragraph_20_Font"><text:span text:style-name="T36">file_p</text:span></text:span><text:span text:style-name="Default_20_Paragraph_20_Font"><text:span text:style-name="T47">at</text:span></text:span><text:span text:style-name="Default_20_Paragraph_20_Font"><text:span text:style-name="T36">h, "rb") as f:</text:span></text:span></text:p>
            <text:p text:style-name="P61"><text:span text:style-name="Default_20_Paragraph_20_Font"><text:span text:style-name="T36"><text:s text:c="8"/>dat</text:span></text:span><text:span text:style-name="Default_20_Paragraph_20_Font"><text:span text:style-name="T40">a</text:span></text:span><text:span text:style-name="Default_20_Paragraph_20_Font"><text:span text:style-name="T36"> = f.</text:span></text:span><text:span text:style-name="Default_20_Paragraph_20_Font"><text:span text:style-name="T47">r</text:span></text:span><text:span text:style-name="Default_20_Paragraph_20_Font"><text:span text:style-name="T36">ead()</text:span></text:span></text:p>
            <text:p text:style-name="P62"/>
            <text:p text:style-name="P61"><text:span text:style-name="Default_20_Paragraph_20_Font"><text:span text:style-name="T36"><text:s text:c="4"/></text:span></text:span><text:span text:style-name="Default_20_Paragraph_20_Font"><text:span text:style-name="T47">s</text:span></text:span><text:span text:style-name="Default_20_Paragraph_20_Font"><text:span text:style-name="T36">ignature = priv</text:span></text:span><text:span text:style-name="Default_20_Paragraph_20_Font"><text:span text:style-name="T40">a</text:span></text:span><text:span text:style-name="Default_20_Paragraph_20_Font"><text:span text:style-name="T36">te_k</text:span></text:span><text:span text:style-name="Default_20_Paragraph_20_Font"><text:span text:style-name="T47">e</text:span></text:span><text:span text:style-name="Default_20_Paragraph_20_Font"><text:span text:style-name="T36">y.sign(</text:span></text:span></text:p>
            <text:p text:style-name="P61"><text:span text:style-name="Default_20_Paragraph_20_Font"><text:span text:style-name="T36"><text:s text:c="6"/></text:span></text:span><text:span text:style-name="Default_20_Paragraph_20_Font"><text:span text:style-name="T40"><text:s/></text:span></text:span><text:span text:style-name="Default_20_Paragraph_20_Font"><text:span text:style-name="T36"><text:s/>data,</text:span></text:span></text:p>
            <text:p text:style-name="P61"><text:span text:style-name="Default_20_Paragraph_20_Font"><text:span text:style-name="T36"><text:s text:c="8"/>pad</text:span></text:span><text:span text:style-name="Default_20_Paragraph_20_Font"><text:span text:style-name="T40">d</text:span></text:span><text:span text:style-name="Default_20_Paragraph_20_Font"><text:span text:style-name="T36">ing.PSS( mgf=padding.</text:span></text:span><text:span text:style-name="Default_20_Paragraph_20_Font"><text:span text:style-name="T40">M</text:span></text:span><text:span text:style-name="Default_20_Paragraph_20_Font"><text:span text:style-name="T36">GF1(has</text:span></text:span><text:span text:style-name="Default_20_Paragraph_20_Font"><text:span text:style-name="T40">h</text:span></text:span><text:span text:style-name="Default_20_Paragraph_20_Font"><text:span text:style-name="T36">es.</text:span></text:span><text:span text:style-name="Default_20_Paragraph_20_Font"><text:span text:style-name="T40">S</text:span></text:span><text:span text:style-name="Default_20_Paragraph_20_Font"><text:span text:style-name="T36">HA256()), salt_length=p</text:span></text:span><text:span text:style-name="Default_20_Paragraph_20_Font"><text:span text:style-name="T40">a</text:span></text:span><text:span text:style-name="Default_20_Paragraph_20_Font"><text:span text:style-name="T36">dding.PS</text:span></text:span><text:span text:style-name="Default_20_Paragraph_20_Font"><text:span text:style-name="T47">S</text:span></text:span><text:span text:style-name="Default_20_Paragraph_20_Font"><text:span text:style-name="T36">.MAX_</text:span></text:span><text:span text:style-name="Default_20_Paragraph_20_Font"><text:span text:style-name="T47">LE</text:span></text:span><text:span text:style-name="Default_20_Paragraph_20_Font"><text:span text:style-name="T36">NGTH</text:span></text:span><text:span text:style-name="Default_20_Paragraph_20_Font"><text:span text:style-name="T35"> </text:span></text:span><text:span text:style-name="Default_20_Paragraph_20_Font"><text:span text:style-name="T36">), hashes.SHA2</text:span></text:span><text:span text:style-name="Default_20_Paragraph_20_Font"><text:span text:style-name="T44">56()</text:span></text:span><text:span text:style-name="Default_20_Paragraph_20_Font"><text:span text:style-name="T36"> )</text:span></text:span></text:p>
            <text:p text:style-name="P62"/>
            <text:p text:style-name="P61"><text:span text:style-name="Default_20_Paragraph_20_Font"><text:span text:style-name="T36"><text:s text:c="4"/>wi</text:span></text:span><text:span text:style-name="Default_20_Paragraph_20_Font"><text:span text:style-name="T40">t</text:span></text:span><text:span text:style-name="Default_20_Paragraph_20_Font"><text:span text:style-name="T36">h open(output_si</text:span></text:span><text:span text:style-name="Default_20_Paragraph_20_Font"><text:span text:style-name="T47">gna</text:span></text:span><text:span text:style-name="Default_20_Paragraph_20_Font"><text:span text:style-name="T35">tur</text:span></text:span><text:span text:style-name="Default_20_Paragraph_20_Font"><text:span text:style-name="T36">e</text:span></text:span><text:span text:style-name="Default_20_Paragraph_20_Font"><text:span text:style-name="T37">_path, "wb") as </text:span></text:span><text:span text:style-name="Default_20_Paragraph_20_Font"><text:span text:style-name="T36">f:</text:span></text:span></text:p>
            <text:p text:style-name="P61"><text:span text:style-name="Default_20_Paragraph_20_Font"><text:span text:style-name="T36"><text:s text:c="8"/>f.write(signature)</text:span></text:span></text:p>
            <text:p text:style-name="P61"><text:span text:style-name="Default_20_Paragraph_20_Font"><text:span text:style-name="T36">def verif</text:span></text:span><text:span text:style-name="Default_20_Paragraph_20_Font"><text:span text:style-name="T47">y_</text:span></text:span><text:span text:style-name="Default_20_Paragraph_20_Font"><text:span text:style-name="T36">sign</text:span></text:span><text:span text:style-name="Default_20_Paragraph_20_Font"><text:span text:style-name="T35">atur</text:span></text:span><text:span text:style-name="Default_20_Paragraph_20_Font"><text:span text:style-name="T36">e</text:span></text:span><text:span text:style-name="Default_20_Paragraph_20_Font"><text:span text:style-name="T38">(fil</text:span></text:span><text:span text:style-name="Default_20_Paragraph_20_Font"><text:span text:style-name="T36">e_path, public_key</text:span></text:span><text:span text:style-name="Default_20_Paragraph_20_Font"><text:span text:style-name="T44">_pat</text:span></text:span><text:span text:style-name="Default_20_Paragraph_20_Font"><text:span text:style-name="T36">h,</text:span></text:span><text:span text:style-name="Default_20_Paragraph_20_Font"><text:span text:style-name="T35"> s</text:span></text:span><text:span text:style-name="Default_20_Paragraph_20_Font"><text:span text:style-name="T36">ign</text:span></text:span><text:span text:style-name="Default_20_Paragraph_20_Font"><text:span text:style-name="T47">a</text:span></text:span><text:span text:style-name="Default_20_Paragraph_20_Font"><text:span text:style-name="T36">ture_path):</text:span></text:span></text:p>
            <text:p text:style-name="P61"><text:span text:style-name="Default_20_Paragraph_20_Font"><text:span text:style-name="T36"><text:s text:c="3"/></text:span></text:span><text:span text:style-name="Default_20_Paragraph_20_Font"><text:span text:style-name="T40">w</text:span></text:span><text:span text:style-name="Default_20_Paragraph_20_Font"><text:span text:style-name="T36">ith open(publi</text:span></text:span><text:span text:style-name="Default_20_Paragraph_20_Font"><text:span text:style-name="T40">c</text:span></text:span><text:span text:style-name="Default_20_Paragraph_20_Font"><text:span text:style-name="T36">_key_path, "rb") as f</text:span></text:span><text:span text:style-name="Default_20_Paragraph_20_Font"><text:span text:style-name="T40">:</text:span></text:span></text:p>
            <text:p text:style-name="P61"><text:span text:style-name="Default_20_Paragraph_20_Font"><text:span text:style-name="T36"><text:s text:c="5"/></text:span></text:span><text:span text:style-name="Default_20_Paragraph_20_Font"><text:span text:style-name="T47"><text:s text:c="2"/></text:span></text:span><text:span text:style-name="Default_20_Paragraph_20_Font"><text:span text:style-name="T36"><text:s/>pub</text:span></text:span><text:span text:style-name="Default_20_Paragraph_20_Font"><text:span text:style-name="T35">lic_</text:span></text:span><text:span text:style-name="Default_20_Paragraph_20_Font"><text:span text:style-name="T36">k</text:span></text:span><text:span text:style-name="Default_20_Paragraph_20_Font"><text:span text:style-name="T38">ey =</text:span></text:span><text:span text:style-name="Default_20_Paragraph_20_Font"><text:span text:style-name="T36"> serializati</text:span></text:span><text:span text:style-name="Default_20_Paragraph_20_Font"><text:span text:style-name="T44">on.l</text:span></text:span><text:span text:style-name="Default_20_Paragraph_20_Font"><text:span text:style-name="T36">oa</text:span></text:span><text:span text:style-name="Default_20_Paragraph_20_Font"><text:span text:style-name="T35">d_</text:span></text:span><text:span text:style-name="Default_20_Paragraph_20_Font"><text:span text:style-name="T36">pem</text:span></text:span><text:span text:style-name="Default_20_Paragraph_20_Font"><text:span text:style-name="T47">_</text:span></text:span><text:span text:style-name="Default_20_Paragraph_20_Font"><text:span text:style-name="T36">public_key(f.</text:span></text:span><text:span text:style-name="Default_20_Paragraph_20_Font"><text:span text:style-name="T40">r</text:span></text:span><text:span text:style-name="Default_20_Paragraph_20_Font"><text:span text:style-name="T36">ea</text:span></text:span><text:span text:style-name="Default_20_Paragraph_20_Font"><text:span text:style-name="T40">d</text:span></text:span><text:span text:style-name="Default_20_Paragraph_20_Font"><text:span text:style-name="T36">())</text:span></text:span></text:p>
            <text:p text:style-name="P62"/>
            <text:p text:style-name="P61"><text:span text:style-name="Default_20_Paragraph_20_Font"><text:span text:style-name="T47"><text:s/></text:span></text:span><text:span text:style-name="Default_20_Paragraph_20_Font"><text:span text:style-name="T36"><text:s text:c="3"/>w</text:span></text:span><text:span text:style-name="Default_20_Paragraph_20_Font"><text:span text:style-name="T35">ith </text:span></text:span><text:span text:style-name="Default_20_Paragraph_20_Font"><text:span text:style-name="T36">o</text:span></text:span><text:span text:style-name="Default_20_Paragraph_20_Font"><text:span text:style-name="T38">pen(</text:span></text:span><text:span text:style-name="Default_20_Paragraph_20_Font"><text:span text:style-name="T36">file_path, "rb") </text:span></text:span><text:span text:style-name="Default_20_Paragraph_20_Font"><text:span text:style-name="T44">as f</text:span></text:span><text:span text:style-name="Default_20_Paragraph_20_Font"><text:span text:style-name="T36">:</text:span></text:span></text:p>
            <text:p text:style-name="P61"><text:span text:style-name="Default_20_Paragraph_20_Font"><text:span text:style-name="T35"><text:s/></text:span></text:span><text:span text:style-name="Default_20_Paragraph_20_Font"><text:span text:style-name="T36"><text:s text:c="3"/></text:span></text:span><text:span text:style-name="Default_20_Paragraph_20_Font"><text:span text:style-name="T47"><text:s/></text:span></text:span><text:span text:style-name="Default_20_Paragraph_20_Font"><text:span text:style-name="T36"><text:s text:c="3"/>data = f.read()</text:span></text:span></text:p>
            <text:p text:style-name="P62"/>
            <text:p text:style-name="P61"><text:span text:style-name="Default_20_Paragraph_20_Font"><text:span text:style-name="T36"><text:s text:c="4"/>wi</text:span></text:span><text:span text:style-name="Default_20_Paragraph_20_Font"><text:span text:style-name="T47">th</text:span></text:span><text:span text:style-name="Default_20_Paragraph_20_Font"><text:span text:style-name="T36"> ope</text:span></text:span><text:span text:style-name="Default_20_Paragraph_20_Font"><text:span text:style-name="T35">n(s</text:span></text:span><text:span text:style-name="Default_20_Paragraph_20_Font"><text:span text:style-name="T36">i</text:span></text:span><text:span text:style-name="Default_20_Paragraph_20_Font"><text:span text:style-name="T47">g</text:span></text:span><text:span text:style-name="Default_20_Paragraph_20_Font"><text:span text:style-name="T36">nature_path, "rb")</text:span></text:span><text:span text:style-name="Default_20_Paragraph_20_Font"><text:span text:style-name="T40"> </text:span></text:span><text:span text:style-name="Default_20_Paragraph_20_Font"><text:span text:style-name="T36">as f:</text:span></text:span></text:p>
            <text:p text:style-name="P61"><text:span text:style-name="Default_20_Paragraph_20_Font"><text:span text:style-name="T47"><text:s/></text:span></text:span><text:span text:style-name="Default_20_Paragraph_20_Font"><text:span text:style-name="T36"><text:s text:c="7"/>signature = f.r</text:span></text:span><text:span text:style-name="Default_20_Paragraph_20_Font"><text:span text:style-name="T47">e</text:span></text:span><text:span text:style-name="Default_20_Paragraph_20_Font"><text:span text:style-name="T36">ad()</text:span></text:span></text:p>
            <text:p text:style-name="P62"/>
            <text:p text:style-name="P61"><text:span text:style-name="Default_20_Paragraph_20_Font"><text:span text:style-name="T36"><text:s text:c="4"/>try:</text:span></text:span></text:p>
            <text:p text:style-name="P61"><text:span text:style-name="Default_20_Paragraph_20_Font"><text:span text:style-name="T36"><text:s text:c="8"/>public_key.</text:span></text:span><text:span text:style-name="Default_20_Paragraph_20_Font"><text:span text:style-name="T40">v</text:span></text:span><text:span text:style-name="Default_20_Paragraph_20_Font"><text:span text:style-name="T36">erif</text:span></text:span><text:span text:style-name="Default_20_Paragraph_20_Font"><text:span text:style-name="T47">y</text:span></text:span><text:span text:style-name="Default_20_Paragraph_20_Font"><text:span text:style-name="T36">( sign</text:span></text:span><text:span text:style-name="Default_20_Paragraph_20_Font"><text:span text:style-name="T40">a</text:span></text:span><text:span text:style-name="Default_20_Paragraph_20_Font"><text:span text:style-name="T36">ture,</text:span></text:span><text:span text:style-name="Default_20_Paragraph_20_Font"><text:span text:style-name="T40">d</text:span></text:span><text:span text:style-name="Default_20_Paragraph_20_Font"><text:span text:style-name="T36">ata,padding.PSS(mg</text:span></text:span><text:span text:style-name="Default_20_Paragraph_20_Font"><text:span text:style-name="T40">f</text:span></text:span><text:span text:style-name="Default_20_Paragraph_20_Font"><text:span text:style-name="T36">=padding.M</text:span></text:span><text:span text:style-name="Default_20_Paragraph_20_Font"><text:span text:style-name="T47">G</text:span></text:span><text:span text:style-name="Default_20_Paragraph_20_Font"><text:span text:style-name="T36">F1(hashes.SHA2</text:span></text:span><text:span text:style-name="Default_20_Paragraph_20_Font"><text:span text:style-name="T47">5</text:span></text:span><text:span text:style-name="Default_20_Paragraph_20_Font"><text:span text:style-name="T36">6()),</text:span></text:span></text:p>
            <text:p text:style-name="P61"><text:span text:style-name="Default_20_Paragraph_20_Font"><text:span text:style-name="T36"><text:s text:c="11"/></text:span></text:span><text:span text:style-name="Default_20_Paragraph_20_Font"><text:span text:style-name="T40"><text:s/></text:span></text:span><text:span text:style-name="Default_20_Paragraph_20_Font"><text:span text:style-name="T36">salt</text:span></text:span><text:span text:style-name="Default_20_Paragraph_20_Font"><text:span text:style-name="T47">_</text:span></text:span><text:span text:style-name="Default_20_Paragraph_20_Font"><text:span text:style-name="T36">length=pa</text:span></text:span><text:span text:style-name="Default_20_Paragraph_20_Font"><text:span text:style-name="T47">dd</text:span></text:span><text:span text:style-name="Default_20_Paragraph_20_Font"><text:span text:style-name="T36">ing.PSS.</text:span></text:span><text:span text:style-name="Default_20_Paragraph_20_Font"><text:span text:style-name="T35">MAX_LE</text:span></text:span><text:span text:style-name="Default_20_Paragraph_20_Font"><text:span text:style-name="T36">N</text:span></text:span><text:span text:style-name="Default_20_Paragraph_20_Font"><text:span text:style-name="T35">GTH </text:span></text:span><text:span text:style-name="Default_20_Paragraph_20_Font"><text:span text:style-name="T36">), h</text:span></text:span><text:span text:style-name="Default_20_Paragraph_20_Font"><text:span text:style-name="T47">a</text:span></text:span><text:span text:style-name="Default_20_Paragraph_20_Font"><text:span text:style-name="T36">shes.SHA</text:span></text:span><text:span text:style-name="Default_20_Paragraph_20_Font"><text:span text:style-name="T35">256() </text:span></text:span><text:span text:style-name="Default_20_Paragraph_20_Font"><text:span text:style-name="T49">)</text:span></text:span></text:p>
            <text:p text:style-name="P64"><text:s text:c="8"/>return True</text:p>
            <text:p text:style-name="P64"/>
            <text:p text:style-name="P64"><text:s text:c="4"/>except InvalidSignature:</text:p>
            <text:p text:style-name="P64"><text:s text:c="8"/>return False</text:p>
          </table:table-cell>
        </table:table-row>
      </table:table>
      <text:h text:style-name="P68" text:outline-level="3"/>
      <text:h text:style-name="Nagłówek_20_3" text:outline-level="3"><text:bookmark-start text:name="__RefHeading___Toc6709_3721631286"/>5.2.5. Moduł generowania kluczy<text:bookmark-end text:name="__RefHeading___Toc6709_3721631286"/></text:h>
      <text:p text:style-name="P8"><text:tab/>Moduł generowania kluczy odpowiada za tworzenie par kluczy <text:span text:style-name="T51">RSA</text:span>, które są następnie wykorzystywane w pozostałych częściach aplikacji. Klucz publiczny może być używany do szyfrowania klucza <text:span text:style-name="T1">AES</text:span> oraz do weryfikacji podpisu cyfrowego. Klucz prywatny służy natomiast do odszyfrowywania klucza <text:span text:style-name="T1">AES</text:span> oraz tworzenia podpisów cyfrowych.</text:p>
      <text:p text:style-name="P8"><text:tab/>Interfejs modułu generowania kluczy został zaimplementowany w pliku „<text:span text:style-name="Default_20_Paragraph_20_Font"><text:span text:style-name="T1">keys.py”</text:span></text:span> jako klasa <text:span text:style-name="Default_20_Paragraph_20_Font"><text:span text:style-name="T1">KeysFrame</text:span></text:span>, dziedzicząca z klasy bazowej <text:span text:style-name="Default_20_Paragraph_20_Font"><text:span text:style-name="T1">tk.Frame</text:span></text:span>. Odpowiada ona za utworzenie elementów graficznych widocznych w zakładce Keys, takich jak lista wyboru rozmiaru klucza, przyciski wskazania lokalizacji oraz przycisk uruchamiający proces generowania kluczy. Struktura ekranu modułu przedstawiona została na poniższym rysunku <text:span text:style-name="Default_20_Paragraph_20_Font"><text:span text:style-name="T1">(Rys. 5)</text:span></text:span>.</text:p>
      <text:p text:style-name="P8"><text:tab/>Użytkownik wybiera rozmiar klucza <text:span text:style-name="Default_20_Paragraph_20_Font"><text:span text:style-name="T1">RSA</text:span></text:span> z dostępnej listy, wskazuje lokalizację zapisu pliku klucza prywatnego oraz pliku klucza publicznego. W prezentowanym module dostępny jest m.in. 1024 i 2048 bitowy rozmiar klucza, jednak konstrukcja interfejsu pozwala na rozszerzenie listy o kolejne wartości.</text:p>
      <text:p text:style-name="P8"><text:tab/>Po kliknięciu przycisku <text:span text:style-name="T1">„Generuj klucze”</text:span> uruchamiana jest metoda <text:span text:style-name="Default_20_Paragraph_20_Font"><text:span text:style-name="T1">generate_keys(</text:span></text:span>) <text:span text:style-name="Default_20_Paragraph_20_Font"><text:span text:style-name="T1">(Listing 8.)</text:span></text:span>, która w sprawdza, czy użytkownik wskazał lokalizacje obu plików wyjściowych. Jeżeli nie wybrano pliku klucza prywatnego lub publicznego, w polu statusu wyświetlany jest stosowny komunikat.</text:p>
      <text:p text:style-name="P69"><text:span text:style-name="Strong_20_Emphasis"><text:span text:style-name="T5">Rys. 5. Okno modułu zarządzania kluczami.</text:span></text:span></text:p>
      <text:p text:style-name="P8"><text:tab/>Właściwe generowanie kluczy realizowane jest przez funkcję <text:span text:style-name="Default_20_Paragraph_20_Font"><text:span text:style-name="T1">generate_keys() (Listing 9.)</text:span></text:span> znajdującą się w module „<text:span text:style-name="Default_20_Paragraph_20_Font"><text:span text:style-name="T1">rsa_signature.py”</text:span></text:span>. Funkcja ta wykorzystuje metodę <text:span text:style-name="Default_20_Paragraph_20_Font"><text:span text:style-name="T1">rsa.generate_private_key()</text:span></text:span> z biblioteki <text:span text:style-name="Default_20_Paragraph_20_Font"><text:span text:style-name="T1">cryptography</text:span></text:span>, przyjmując wykładnik publiczny <text:span text:style-name="Default_20_Paragraph_20_Font"><text:span text:style-name="T1">65537</text:span></text:span> oraz rozmiar klucza wybrany przez użytkownika. Kolejno na podstawie wygenerowanego klucza prywatnego tworzony jest odpowiadający mu klucz publiczny.</text:p>
      <text:p text:style-name="P8">Wynikiem działania modułu są dwa pliki:</text:p>
      <text:list text:style-name="L31">
        <text:list-item>
          <text:p text:style-name="P70">plik klucza prywatnego <text:span text:style-name="T1">RSA</text:span> – zapisany jest w formacie <text:span text:style-name="Default_20_Paragraph_20_Font"><text:span text:style-name="T1">PKCS8</text:span></text:span>,</text:p>
        </text:list-item>
        <text:list-item>
          <text:p text:style-name="P70">plik klucza publicznego <text:span text:style-name="T1">RSA</text:span> – zapisany w formacie <text:span text:style-name="Default_20_Paragraph_20_Font"><text:span text:style-name="T1">SubjectPublicKeyInfo</text:span></text:span>.</text:p>
        </text:list-item>
      </text:list>
      <text:p text:style-name="P8"><text:span text:style-name="Domyślna_20_czcionka_20_akapitu"><text:span text:style-name="T7">Listing 8. Metoda generate_ketys().</text:span></text:span></text:p>
      <table:table table:name="Table9" table:style-name="Table9">
        <table:table-column table:style-name="Table9.A"/>
        <table:table-row>
          <table:table-cell table:style-name="Table9.A1" office:value-type="string">
            <text:p text:style-name="P48"><text:span text:style-name="Default_20_Paragraph_20_Font"><text:span text:style-name="T8"><text:s text:c="4"/></text:span></text:span><text:span text:style-name="Default_20_Paragraph_20_Font"><text:span text:style-name="T9">def</text:span></text:span><text:span text:style-name="Default_20_Paragraph_20_Font"><text:span text:style-name="T8"> </text:span></text:span><text:span text:style-name="Default_20_Paragraph_20_Font"><text:span text:style-name="T10">generate_keys</text:span></text:span><text:span text:style-name="Default_20_Paragraph_20_Font"><text:span text:style-name="T8">(</text:span></text:span><text:span text:style-name="Default_20_Paragraph_20_Font"><text:span text:style-name="T11">self</text:span></text:span><text:span text:style-name="Default_20_Paragraph_20_Font"><text:span text:style-name="T8">):</text:span></text:span></text:p>
            <text:p text:style-name="P48"><text:span text:style-name="Default_20_Paragraph_20_Font"><text:span text:style-name="T8"><text:s text:c="8"/></text:span></text:span><text:span text:style-name="Default_20_Paragraph_20_Font"><text:span text:style-name="T9">try</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if</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rivate_key_file </text:span></text:span><text:span text:style-name="Default_20_Paragraph_20_Font"><text:span text:style-name="T12">or</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ublic_key_file:</text:span></text:span></text:p>
            <text:p text:style-name="P48"><text:span text:style-name="Default_20_Paragraph_20_Font"><text:span text:style-name="T8"><text:s text:c="16"/></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Wybierz pliki wyjściowe"</text:span></text:span><text:span text:style-name="Default_20_Paragraph_20_Font"><text:span text:style-name="T8">)</text:span></text:span></text:p>
            <text:p text:style-name="P48"><text:span text:style-name="Default_20_Paragraph_20_Font"><text:span text:style-name="T8"><text:s text:c="16"/></text:span></text:span><text:span text:style-name="Default_20_Paragraph_20_Font"><text:span text:style-name="T9">return</text:span></text:span></text:p>
            <text:p text:style-name="P48"><text:span text:style-name="Default_20_Paragraph_20_Font"><text:span text:style-name="T8"><text:s text:c="12"/>key_size </text:span></text:span><text:span text:style-name="Default_20_Paragraph_20_Font"><text:span text:style-name="T13">=</text:span></text:span><text:span text:style-name="Default_20_Paragraph_20_Font"><text:span text:style-name="T8"> </text:span></text:span><text:span text:style-name="Default_20_Paragraph_20_Font"><text:span text:style-name="T11">int</text:span></text:span><text:span text:style-name="Default_20_Paragraph_20_Font"><text:span text:style-name="T8">(</text:span></text:span><text:span text:style-name="Default_20_Paragraph_20_Font"><text:span text:style-name="T11">self</text:span></text:span><text:span text:style-name="Default_20_Paragraph_20_Font"><text:span text:style-name="T13">.</text:span></text:span><text:span text:style-name="Default_20_Paragraph_20_Font"><text:span text:style-name="T8">selected_key_size</text:span></text:span><text:span text:style-name="Default_20_Paragraph_20_Font"><text:span text:style-name="T13">.</text:span></text:span><text:span text:style-name="Default_20_Paragraph_20_Font"><text:span text:style-name="T8">get())</text:span></text:span></text:p>
            <text:p text:style-name="P48"><text:span text:style-name="Default_20_Paragraph_20_Font"><text:span text:style-name="T8"><text:s text:c="12"/>generate_keys(</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rivate_key_file,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ublic_key_file, key_size)</text:span></text:span></text:p>
            <text:p text:style-name="P49"/>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Klucze wygenerowane"</text:span></text:span><text:span text:style-name="Default_20_Paragraph_20_Font"><text:span text:style-name="T8">)</text:span></text:span></text:p>
            <text:p text:style-name="P49"/>
            <text:p text:style-name="P48"><text:span text:style-name="Default_20_Paragraph_20_Font"><text:span text:style-name="T8"><text:s text:c="8"/></text:span></text:span><text:span text:style-name="Default_20_Paragraph_20_Font"><text:span text:style-name="T9">except</text:span></text:span><text:span text:style-name="Default_20_Paragraph_20_Font"><text:span text:style-name="T8"> </text:span></text:span><text:span text:style-name="Default_20_Paragraph_20_Font"><text:span text:style-name="T15">Exception</text:span></text:span><text:span text:style-name="Default_20_Paragraph_20_Font"><text:span text:style-name="T8"> </text:span></text:span><text:span text:style-name="Default_20_Paragraph_20_Font"><text:span text:style-name="T9">as</text:span></text:span><text:span text:style-name="Default_20_Paragraph_20_Font"><text:span text:style-name="T8"> e:</text:span></text:span></text:p>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f"Błąd: </text:span></text:span><text:span text:style-name="Default_20_Paragraph_20_Font"><text:span text:style-name="T52">{</text:span></text:span><text:span text:style-name="Default_20_Paragraph_20_Font"><text:span text:style-name="T8">e</text:span></text:span><text:span text:style-name="Default_20_Paragraph_20_Font"><text:span text:style-name="T52">}</text:span></text:span><text:span text:style-name="Default_20_Paragraph_20_Font"><text:span text:style-name="T14">"</text:span></text:span><text:span text:style-name="Default_20_Paragraph_20_Font"><text:span text:style-name="T8">)</text:span></text:span></text:p>
          </table:table-cell>
        </table:table-row>
      </table:table>
      <text:p text:style-name="P50"/>
      <text:p text:style-name="P8"><text:soft-page-break/><text:span text:style-name="Domyślna_20_czcionka_20_akapitu"><text:span text:style-name="T16">Listing 9. Metoda generate_ketys() modułu rsa_signature.py.</text:span></text:span></text:p>
      <table:table table:name="Table10" table:style-name="Table10">
        <table:table-column table:style-name="Table10.A"/>
        <table:table-row>
          <table:table-cell table:style-name="Table10.A1" office:value-type="string">
            <text:p text:style-name="P48"><text:span text:style-name="Default_20_Paragraph_20_Font"><text:span text:style-name="T9">def</text:span></text:span><text:span text:style-name="Default_20_Paragraph_20_Font"><text:span text:style-name="T8"> </text:span></text:span><text:span text:style-name="Default_20_Paragraph_20_Font"><text:span text:style-name="T10">generate_keys</text:span></text:span><text:span text:style-name="Default_20_Paragraph_20_Font"><text:span text:style-name="T8">(private_key_path, public_key_path, key_size</text:span></text:span><text:span text:style-name="Default_20_Paragraph_20_Font"><text:span text:style-name="T13">=2048</text:span></text:span><text:span text:style-name="Default_20_Paragraph_20_Font"><text:span text:style-name="T8">):</text:span></text:span></text:p>
            <text:p text:style-name="P49"/>
            <text:p text:style-name="P48"><text:span text:style-name="Default_20_Paragraph_20_Font"><text:span text:style-name="T8"><text:s text:c="4"/>private_key </text:span></text:span><text:span text:style-name="Default_20_Paragraph_20_Font"><text:span text:style-name="T13">=</text:span></text:span><text:span text:style-name="Default_20_Paragraph_20_Font"><text:span text:style-name="T8"> rsa</text:span></text:span><text:span text:style-name="Default_20_Paragraph_20_Font"><text:span text:style-name="T13">.</text:span></text:span><text:span text:style-name="Default_20_Paragraph_20_Font"><text:span text:style-name="T8">generate_private_key(</text:span></text:span></text:p>
            <text:p text:style-name="P48"><text:span text:style-name="Default_20_Paragraph_20_Font"><text:span text:style-name="T8"><text:s text:c="8"/>public_exponent</text:span></text:span><text:span text:style-name="Default_20_Paragraph_20_Font"><text:span text:style-name="T13">=65537</text:span></text:span><text:span text:style-name="Default_20_Paragraph_20_Font"><text:span text:style-name="T8">,</text:span></text:span></text:p>
            <text:p text:style-name="P48"><text:span text:style-name="Default_20_Paragraph_20_Font"><text:span text:style-name="T8"><text:s text:c="8"/>key_size</text:span></text:span><text:span text:style-name="Default_20_Paragraph_20_Font"><text:span text:style-name="T13">=</text:span></text:span><text:span text:style-name="Default_20_Paragraph_20_Font"><text:span text:style-name="T8">key_size</text:span></text:span></text:p>
            <text:p text:style-name="P48"><text:span text:style-name="Default_20_Paragraph_20_Font"><text:span text:style-name="T8"><text:s text:c="4"/>)</text:span></text:span></text:p>
            <text:p text:style-name="P49"/>
            <text:p text:style-name="P48"><text:span text:style-name="Default_20_Paragraph_20_Font"><text:span text:style-name="T8"><text:s text:c="4"/>public_key </text:span></text:span><text:span text:style-name="Default_20_Paragraph_20_Font"><text:span text:style-name="T13">=</text:span></text:span><text:span text:style-name="Default_20_Paragraph_20_Font"><text:span text:style-name="T8"> private_key</text:span></text:span><text:span text:style-name="Default_20_Paragraph_20_Font"><text:span text:style-name="T13">.</text:span></text:span><text:span text:style-name="Default_20_Paragraph_20_Font"><text:span text:style-name="T8">public_key(</text:span></text:span><text:span text:style-name="Default_20_Paragraph_20_Font"><text:span text:style-name="T53">)</text:span></text:span></text:p>
            <text:p text:style-name="P71"/>
            <text:p text:style-name="P48"><text:span text:style-name="Default_20_Paragraph_20_Font"><text:span text:style-name="T8"><text:s text:c="4"/></text:span></text:span><text:span text:style-name="Default_20_Paragraph_20_Font"><text:span text:style-name="T54">with</text:span></text:span><text:span text:style-name="Default_20_Paragraph_20_Font"><text:span text:style-name="T8"> </text:span></text:span><text:span text:style-name="Default_20_Paragraph_20_Font"><text:span text:style-name="T11">open</text:span></text:span><text:span text:style-name="Default_20_Paragraph_20_Font"><text:span text:style-name="T8">(private_key_pat</text:span></text:span><text:span text:style-name="Default_20_Paragraph_20_Font"><text:span text:style-name="T53">h,</text:span></text:span><text:span text:style-name="Default_20_Paragraph_20_Font"><text:span text:style-name="T8"> </text:span></text:span><text:span text:style-name="Default_20_Paragraph_20_Font"><text:span text:style-name="T14">"wb"</text:span></text:span><text:span text:style-name="Default_20_Paragraph_20_Font"><text:span text:style-name="T8">) </text:span></text:span><text:span text:style-name="Default_20_Paragraph_20_Font"><text:span text:style-name="T54">as</text:span></text:span><text:span text:style-name="Default_20_Paragraph_20_Font"><text:span text:style-name="T8"> f:</text:span></text:span></text:p>
            <text:p text:style-name="P48"><text:span text:style-name="Default_20_Paragraph_20_Font"><text:span text:style-name="T8"><text:s text:c="8"/>f</text:span></text:span><text:span text:style-name="Default_20_Paragraph_20_Font"><text:span text:style-name="T13">.</text:span></text:span><text:span text:style-name="Default_20_Paragraph_20_Font"><text:span text:style-name="T8">write(</text:span></text:span></text:p>
            <text:p text:style-name="P48"><text:span text:style-name="Default_20_Paragraph_20_Font"><text:span text:style-name="T8"><text:s text:c="12"/>private_key</text:span></text:span><text:span text:style-name="Default_20_Paragraph_20_Font"><text:span text:style-name="T13">.</text:span></text:span><text:span text:style-name="Default_20_Paragraph_20_Font"><text:span text:style-name="T8">private_bytes(</text:span></text:span></text:p>
            <text:p text:style-name="P48"><text:span text:style-name="Default_20_Paragraph_20_Font"><text:span text:style-name="T8"><text:s text:c="16"/>encoding</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Encoding</text:span></text:span><text:span text:style-name="Default_20_Paragraph_20_Font"><text:span text:style-name="T13">.</text:span></text:span><text:span text:style-name="Default_20_Paragraph_20_Font"><text:span text:style-name="T8">PEM,</text:span></text:span></text:p>
            <text:p text:style-name="P48"><text:span text:style-name="Default_20_Paragraph_20_Font"><text:span text:style-name="T8"><text:s text:c="16"/></text:span></text:span><text:span text:style-name="Default_20_Paragraph_20_Font"><text:span text:style-name="T11">format</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PrivateFormat</text:span></text:span><text:span text:style-name="Default_20_Paragraph_20_Font"><text:span text:style-name="T13">.</text:span></text:span><text:span text:style-name="Default_20_Paragraph_20_Font"><text:span text:style-name="T8">PKCS8,</text:span></text:span></text:p>
            <text:p text:style-name="P48"><text:span text:style-name="Default_20_Paragraph_20_Font"><text:span text:style-name="T8"><text:s text:c="16"/>encryption_algorithm</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NoEncryption()</text:span></text:span></text:p>
            <text:p text:style-name="P48"><text:span text:style-name="Default_20_Paragraph_20_Font"><text:span text:style-name="T8"><text:s text:c="12"/>)</text:span></text:span></text:p>
            <text:p text:style-name="P48"><text:span text:style-name="Default_20_Paragraph_20_Font"><text:span text:style-name="T53"><text:s text:c="3"/></text:span></text:span><text:span text:style-name="Default_20_Paragraph_20_Font"><text:span text:style-name="T8"><text:s text:c="5"/>)</text:span></text:span></text:p>
            <text:p text:style-name="P49"/>
            <text:p text:style-name="P48"><text:span text:style-name="Default_20_Paragraph_20_Font"><text:span text:style-name="T8"><text:s text:c="4"/></text:span></text:span><text:span text:style-name="Default_20_Paragraph_20_Font"><text:span text:style-name="T54">with</text:span></text:span><text:span text:style-name="Default_20_Paragraph_20_Font"><text:span text:style-name="T8"> </text:span></text:span><text:span text:style-name="Default_20_Paragraph_20_Font"><text:span text:style-name="T11">open</text:span></text:span><text:span text:style-name="Default_20_Paragraph_20_Font"><text:span text:style-name="T8">(publi</text:span></text:span><text:span text:style-name="Default_20_Paragraph_20_Font"><text:span text:style-name="T53">c_</text:span></text:span><text:span text:style-name="Default_20_Paragraph_20_Font"><text:span text:style-name="T8">key_path, </text:span></text:span><text:span text:style-name="Default_20_Paragraph_20_Font"><text:span text:style-name="T14">"wb"</text:span></text:span><text:span text:style-name="Default_20_Paragraph_20_Font"><text:span text:style-name="T8">) </text:span></text:span><text:span text:style-name="Default_20_Paragraph_20_Font"><text:span text:style-name="T54">as</text:span></text:span><text:span text:style-name="Default_20_Paragraph_20_Font"><text:span text:style-name="T8"> f:</text:span></text:span></text:p>
            <text:p text:style-name="P48"><text:span text:style-name="Default_20_Paragraph_20_Font"><text:span text:style-name="T8"><text:s text:c="8"/>f</text:span></text:span><text:span text:style-name="Default_20_Paragraph_20_Font"><text:span text:style-name="T13">.</text:span></text:span><text:span text:style-name="Default_20_Paragraph_20_Font"><text:span text:style-name="T8">write(</text:span></text:span></text:p>
            <text:p text:style-name="P48"><text:span text:style-name="Default_20_Paragraph_20_Font"><text:span text:style-name="T8"><text:s text:c="12"/>public_key</text:span></text:span><text:span text:style-name="Default_20_Paragraph_20_Font"><text:span text:style-name="T13">.</text:span></text:span><text:span text:style-name="Default_20_Paragraph_20_Font"><text:span text:style-name="T8">public_bytes(</text:span></text:span></text:p>
            <text:p text:style-name="P48"><text:span text:style-name="Default_20_Paragraph_20_Font"><text:span text:style-name="T8"><text:s text:c="16"/>encoding</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Encoding</text:span></text:span><text:span text:style-name="Default_20_Paragraph_20_Font"><text:span text:style-name="T13">.</text:span></text:span><text:span text:style-name="Default_20_Paragraph_20_Font"><text:span text:style-name="T8">PEM,</text:span></text:span></text:p>
            <text:p text:style-name="P48"><text:span text:style-name="Default_20_Paragraph_20_Font"><text:span text:style-name="T8"><text:s text:c="16"/></text:span></text:span><text:span text:style-name="Default_20_Paragraph_20_Font"><text:span text:style-name="T11">format</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PublicFormat</text:span></text:span><text:span text:style-name="Default_20_Paragraph_20_Font"><text:span text:style-name="T13">.</text:span></text:span><text:span text:style-name="Default_20_Paragraph_20_Font"><text:span text:style-name="T8">SubjectPublicKeyInfo</text:span></text:span></text:p>
            <text:p text:style-name="P48"><text:span text:style-name="Default_20_Paragraph_20_Font"><text:span text:style-name="T8"><text:s text:c="12"/>)</text:span></text:span></text:p>
            <text:p text:style-name="P72"><text:s text:c="8"/>)</text:p>
          </table:table-cell>
        </table:table-row>
      </table:table>
      <text:h text:style-name="Nagłówek_20_1" text:outline-level="1"><text:bookmark-start text:name="__RefHeading___Toc5562_1844702946"/>6. <text:tab/>Bezpieczeństwo systemu i możliwe zagrożenia<text:bookmark-end text:name="__RefHeading___Toc5562_1844702946"/></text:h>
      <text:p text:style-name="P8"><text:span text:style-name="Strong_20_Emphasis"><text:span text:style-name="T2"><text:tab/>Bezpieczeństwo zaprojektowanego systemu/programu opiera się na zastosowaniu mechanizmów kryptograficznych, których zadaniem jest ochrona danych przed nieautoryzowanym dostępem opraz modyfikacją. W celu osiągnięcia tego zadania wykorzystane zostało połączenie kryptografii symetrycznej, asymetrycznej oraz funkcji skrótu.</text:span></text:span></text:p>
      <text:p text:style-name="P8"><text:span text:style-name="Strong_20_Emphasis"><text:span text:style-name="T2"><text:tab/>Należy jednak zaznaczyć, że samo zastosowanie silnych algorytmów kryptograficznych nie jest w stanie zapewnić pełnego bezpieczeństwa systemu. Równie ważne są sposóby przechowywania kluczy, odpowiednie procedury organizacyjne oraz w głównej mierze świadomość użytkownika.</text:span></text:span></text:p>
      <text:p text:style-name="P8"><text:span text:style-name="Strong_20_Emphasis"><text:span text:style-name="T2"><text:tab/>W związku z powyższym konieczne jest rozpatrywanie kwestii bezpieczeństwa proponowanego rozwiązania pod kątem zarówno technicznym jak i użytkowym, czy organizacyjnym.</text:span></text:span></text:p>
      <text:h text:style-name="Nagłówek_20_2" text:outline-level="2"><text:bookmark-start text:name="__RefHeading___Toc14504_1844702946"/><text:span text:style-name="Strong_20_Emphasis">6.1. Założenia bezpieczeństwa systemu</text:span><text:bookmark-end text:name="__RefHeading___Toc14504_1844702946"/></text:h>
      <text:p text:style-name="P8"><text:span text:style-name="Strong_20_Emphasis"><text:span text:style-name="T2"><text:tab/>System zakłada, że użytkownik korzysta z aplikacji w bezpiecznym środowisku, czyli na urządzeniu wolnym od złośliwego oprogramowania i niedostępnym dla osób nieupoważnionych. Zakłada się również, że użytkownik świadomie zarządza wygenerowanymi przez siebie kluczami i nie udostępnia ich osobom nieuprawnionym.</text:span></text:span></text:p>
      <text:p text:style-name="P8">Podstawowe założenia bezpieczeństwa systemu są następujące:</text:p>
      <text:list text:style-name="L32">
        <text:list-item>
          <text:p text:style-name="P73">klucz prywatny <text:span text:style-name="T1">RSA</text:span> powinien być znany wyłącznie jego właścicielowi,</text:p>
        </text:list-item>
        <text:list-item>
          <text:p text:style-name="P73">klucz publiczny może być udostępniany innym użytkownikom,</text:p>
        </text:list-item>
        <text:list-item>
          <text:p text:style-name="P73">pliki zawierające klucze powinny być przechowywane w bezpiecznej lokalizacji,</text:p>
        </text:list-item>
        <text:list-item>
          <text:p text:style-name="P73"><text:soft-page-break/>zaszyfrowane dane mogą być przesyłane kanałami mniej zaufanymi, pod warunkiem że klucz <text:span text:style-name="T1">AES</text:span> został odpowiednio zabezpieczony,</text:p>
        </text:list-item>
        <text:list-item>
          <text:p text:style-name="P73">podpis cyfrowy powinien być stosowany wtedy, gdy odbiorca musi mieć pewność, że plik pochodzi od właściwego nadawcy i nie został zmodyfikowany.</text:p>
        </text:list-item>
      </text:list>
      <text:h text:style-name="Nagłówek_20_2" text:outline-level="2"><text:bookmark-start text:name="__RefHeading___Toc14506_1844702946"/><text:span text:style-name="Strong_20_Emphasis">6.2. Ochrona poufności danych</text:span><text:bookmark-end text:name="__RefHeading___Toc14506_1844702946"/></text:h>
      <text:p text:style-name="P8"><text:span text:style-name="Strong_20_Emphasis"><text:span text:style-name="T2"><text:tab/>Poufność danych w systemie polega na uniemożliwieniu odczytania zawartości pliku przez osoby postronne. Program zabezpiecza dane poprzez przekształcenie ich do postaci zaszyfrowanej, przy pomocy zastosowanych algorytmów, która bez odpowiedniego klucza jest nieczytelna.</text:span></text:span></text:p>
      <text:p text:style-name="P8"><text:tab/>Takie rozwiązanie pozwala bezpieczniej przechowywać pliki na komputerze, nośniku zewnętrznym lub przesyłać je przez mniej zaufane kanały komunikacji. Nawet w przypadku przechwycenia zaszyfrowanego pliku osoba nieuprawniona nie powinna uzyskać dostępu do jego treści bez posiadania właściwego klucza.</text:p>
      <text:h text:style-name="Nagłówek_20_2" text:outline-level="2"><text:bookmark-start text:name="__RefHeading___Toc14508_1844702946"/><text:span text:style-name="Strong_20_Emphasis">6.3. Bezpieczna wymiana kluczy</text:span><text:bookmark-end text:name="__RefHeading___Toc14508_1844702946"/></text:h>
      <text:p text:style-name="P8"><text:span text:style-name="Strong_20_Emphasis"><text:span text:style-name="T2"><text:tab/>Jednym z ważniejszych, jak nie najważniejszym, elementem bezpieczeństwa systemu jest sposób przekazywania danych pomiędzy użytkownikami. Samo zaszyfrowanie pliku zwiększa bezpieczeństwo, jednak konieczne jest również odpowiednie zabezpieczenie klucza potrzebnego do jego odszyfrowania.</text:span></text:span></text:p>
      <text:p text:style-name="P8"><text:tab/>Program umożliwia zabezpieczenie klucza szyfrującego w taki sposób, aby mógł go odczytać wyłącznie właściwy odbiorca. Dzięki temu zaszyfrowany plik oraz zabezpieczony klucz mogą zostać przekazane odbiorcy bez ujawniania treści.</text:p>
      <text:h text:style-name="Nagłówek_20_2" text:outline-level="2"><text:bookmark-start text:name="__RefHeading___Toc9793_1844702946"/><text:span text:style-name="Strong_20_Emphasis">6.4. Integralność i autentyczność danych</text:span><text:bookmark-end text:name="__RefHeading___Toc9793_1844702946"/></text:h>
      <text:p text:style-name="P8"><text:span text:style-name="Strong_20_Emphasis"><text:span text:style-name="T2"><text:tab/>System może również kontrolę integralności i autentyczności plików. Integralność oznacza możliwość sprawdzenia, czy plik nie został zmodyfikowany po jego utworzeniu lub podpisaniu. Autentyczność pozwala natomiast upewnić się, że plik pochodzi od właściwego nadawcy.</text:span></text:span></text:p>
      <text:p text:style-name="P8"><text:tab/>W praktyce mechanizm podpisu cyfrowego może być wykorzystany w sytuacjach, w których odbiorca chce mieć pewność, że dokument nie został zmieniony podczas przesyłania. Dotyczy to na przykład umów, raportów oraz dokumentów firmowych, których ew. zmiana mogłaby wpłynąć np.: na finanse organizacji.</text:p>
      <text:p text:style-name="P8"><text:tab/>Jeżeli podpis nie przejdzie poprawnej weryfikacji, użytkownik powinien uznać plik za potencjalnie zmieniony lub pochodzący z niepewnego źródła i zgłosić to do odpowiedniego działu.</text:p>
      <text:h text:style-name="Nagłówek_20_2" text:outline-level="2"><text:bookmark-start text:name="__RefHeading___Toc9797_1844702946_Copy_1"/><text:span text:style-name="Strong_20_Emphasis">6.5. Możliwe zagrożenia</text:span><text:bookmark-end text:name="__RefHeading___Toc9797_1844702946_Copy_1"/></text:h>
      <text:p text:style-name="P8"><text:span text:style-name="Strong_20_Emphasis"><text:span text:style-name="T2"><text:tab/>Pomimo zastosowania mechanizmów kryptograficznych system nie jest całkowicie odporny na zagrożenia. Możliwe naruszenia mogą wynikać z błędów użytkownika, niewłaściwego przechowywania plików lub zagrożeń występujących poza samą aplikacją.</text:span></text:span></text:p>
      <text:p text:style-name="P8"/>
      <text:p text:style-name="P74">Do najważniejszych zagrożeń należą:</text:p>
      <text:list text:style-name="L33">
        <text:list-item>
          <text:p text:style-name="P75"><text:span text:style-name="Source_20_Text"><text:span text:style-name="T34">przejęcie klucza prywatnego przez osobę nieuprawnioną,</text:span></text:span></text:p>
        </text:list-item>
        <text:list-item>
          <text:p text:style-name="P75"><text:span text:style-name="Source_20_Text"><text:span text:style-name="T34">zapisanie kluczy w niezabezpieczonej lokalizacji,</text:span></text:span></text:p>
        </text:list-item>
        <text:list-item>
          <text:p text:style-name="P75"><text:span text:style-name="Source_20_Text"><text:span text:style-name="T34">przesyłanie klucza prywatnego innym osobom,</text:span></text:span></text:p>
        </text:list-item>
        <text:list-item>
          <text:p text:style-name="P75"><text:span text:style-name="Source_20_Text"><text:span text:style-name="T34">utrata pliku klucza lub pliku potrzebnego do odszyfrowania danych,</text:span></text:span></text:p>
        </text:list-item>
        <text:list-item>
          <text:p text:style-name="P75"><text:span text:style-name="Source_20_Text"><text:span text:style-name="T34">zainfekowanie komputera złośliwym oprogramowaniem,</text:span></text:span></text:p>
        </text:list-item>
        <text:list-item>
          <text:p text:style-name="P75"><text:span text:style-name="Source_20_Text"><text:span text:style-name="T34">używanie programu na niezaufanym urządzeniu,</text:span></text:span></text:p>
        </text:list-item>
        <text:list-item>
          <text:p text:style-name="P75"><text:span text:style-name="Source_20_Text"><text:span text:style-name="T34">błędne wskazanie plików podczas szyfrowania lub odszyfrowywania,</text:span></text:span></text:p>
        </text:list-item>
        <text:list-item>
          <text:p text:style-name="P75"><text:span text:style-name="Source_20_Text"><text:span text:style-name="T34">ataki socjotechniczne prowadzące do ujawnienia kluczy lub poufnych danych.</text:span></text:span></text:p>
        </text:list-item>
      </text:list>
      <text:p text:style-name="P8"><text:tab/>Szczególnie niebezpieczne jest przejęcie klucza prywatnego, ponieważ może ono umożliwić nieuprawnione odszyfrowywanie danych lub podszywanie się pod właściciela klucza podczas tworzenia podpisów cyfrowych.</text:p>
      <text:p text:style-name="P8"><text:tab/>System nie chroni również przed sytuacją, w której osoba atakująca ma dostęp do danych przed ich zaszyfrowaniem lub po ich odszyfrowaniu. Dlatego (jak podano w rozdziale <text:span text:style-name="T1">7.2</text:span>) ważne jest, aby korzystać z programu wyłącznie na urządzeniach, które są odpowiednio zabezpieczone.</text:p>
      <text:h text:style-name="Nagłówek_20_2" text:outline-level="2"><text:bookmark-start text:name="__RefHeading___Toc14510_1844702946"/><text:span text:style-name="Strong_20_Emphasis">6.7. Metody ograniczania ryzyka</text:span><text:bookmark-end text:name="__RefHeading___Toc14510_1844702946"/></text:h>
      <text:p text:style-name="P8"><text:span text:style-name="Strong_20_Emphasis"><text:span text:style-name="T2"><text:tab/>W celu zapewnienia jak największego poziomu bezpieczeństwa systemu należy stosować odpowiednie praktyki użytkowe. Najważniejszą zasadą jest ochrona klucza prywatnego oraz niedopuszczanie do sytuacji, w której osoba nieuprawniona uzyska dostęp do plików umożliwiających odszyfrowanie danych wrażliwych.</text:span></text:span></text:p>
      <text:p text:style-name="P8">W celu ograniczenia ryzyka zaleca się:</text:p>
      <text:list text:style-name="L34">
        <text:list-item>
          <text:p text:style-name="P76"><text:span text:style-name="Source_20_Text"><text:span text:style-name="T34">przechowywanie kluczy prywatnych w bezpiecznej lokalizacji,</text:span></text:span></text:p>
        </text:list-item>
        <text:list-item>
          <text:p text:style-name="P76"><text:span text:style-name="Source_20_Text"><text:span text:style-name="T34">niewysyłanie kluczy prywatnych przez pocztę elektroniczną lub komunikatory,</text:span></text:span></text:p>
        </text:list-item>
        <text:list-item>
          <text:p text:style-name="P76"><text:span text:style-name="Source_20_Text"><text:span text:style-name="T34">stosowanie kopii zapasowych kluczy,</text:span></text:span></text:p>
        </text:list-item>
        <text:list-item>
          <text:p text:style-name="P76"><text:span text:style-name="Source_20_Text"><text:span text:style-name="T34">oddzielne przechowywanie zaszyfrowanych plików i kluczy,</text:span></text:span></text:p>
        </text:list-item>
        <text:list-item>
          <text:p text:style-name="P76"><text:span text:style-name="Source_20_Text"><text:span text:style-name="T34">regularne aktualizowanie systemu operacyjnego i oprogramowania,</text:span></text:span></text:p>
        </text:list-item>
        <text:list-item>
          <text:p text:style-name="P76"><text:span text:style-name="Source_20_Text"><text:span text:style-name="T34">korzystanie z programu wyłącznie na zaufanych urządzeniach,</text:span></text:span></text:p>
        </text:list-item>
        <text:list-item>
          <text:p text:style-name="P76"><text:span text:style-name="Source_20_Text"><text:span text:style-name="T34">sprawdzanie poprawności podpisu cyfrowego przy ważnych dokumentach,</text:span></text:span></text:p>
        </text:list-item>
        <text:list-item>
          <text:p text:style-name="P76"><text:span text:style-name="Source_20_Text"><text:span text:style-name="T34">zachowanie ostrożności przy odbieraniu plików z nieznanych źródeł.</text:span></text:span></text:p>
        </text:list-item>
      </text:list>
      <text:p text:style-name="P8"><text:tab/>Innymi słowy, kluczowym będzie odpowiednie przeszkolenie personelu wykorzystującego oprogramowanie w zakresie <text:span text:style-name="Strong_20_Emphasis"><text:span text:style-name="T2">bezpiecznego podstaw cyberbezpieczeństwa, rozpoznawania potencjalnych zagrożeń oraz prawidłowego przekazywania plików wrażliwych. Użytkownicy </text:span></text:span><text:soft-page-break/><text:span text:style-name="Strong_20_Emphasis"><text:span text:style-name="T2">powinni wiedzieć, które elementy mogą być udostępniane innym osobom, a które muszą pozostać poufne, na przykład klucz prywatny.</text:span></text:span></text:p>
      <text:p text:style-name="P8"><text:tab/>Istotne jest również określenie procedur postępowania w sytuacjach awaryjnych, takich jak utrata klucza prywatnego, podejrzenie jego przejęcia lub przypadkowe usunięcie plików potrzebnych do odszyfrowania danych.</text:p>
      <text:h text:style-name="Nagłówek_20_1" text:outline-level="1"><text:bookmark-start text:name="__RefHeading___Toc9134_1844702946"/>7. <text:tab/>Możliwości wdrożenia i zastosowania systemu<text:bookmark-end text:name="__RefHeading___Toc9134_1844702946"/></text:h>
      <text:p text:style-name="P8"><text:tab/>System, ze względu na prostą budowę i niepełnie uwzględnienie wygody i łątwości wykorzystania nie powinien być traktowany jako kompletne rozwiązanie, lecz jako aplikacja demonstrująca praktyczne zastosowanie wybranych mechanizmów kryptograficznych. W przypadku wdrożenia w organizacji konieczne byłoby uzupełnienie go o dodatkowe procedury, takie jak polityka zarządzania kluczami, kopie zapasowe czy kontrola dostępu.</text:p>
      <text:p text:style-name="P8"><text:tab/>Ze względu na prostą budowę aplikacja może być przydatna w celach edukacyjnych, testowych lub jako wsparcie przy zabezpieczaniu pojedynczych plików. Może również posłużyć jako punkt wyjścia do dalszego rozwoju bardziej rozbudowanego systemu ochrony danych.</text:p>
      <text:h text:style-name="Heading_20_2" text:outline-level="2"><text:bookmark-start text:name="__RefHeading___Toc14512_1844702946"/><text:span text:style-name="Strong_20_Emphasis">7.1. Zastosowanie systemu i przykładowa wymiana plików</text:span><text:bookmark-end text:name="__RefHeading___Toc14512_1844702946"/></text:h>
      <text:p text:style-name="P8"><text:tab/>System mógłby zostać wykorzystany w niewielkiej organizacji jako narzędzie wspierające bezpieczną wymianę pojedycznych dokumentów pomiędzy pracownikami.</text:p>
      <text:p text:style-name="P8"><text:tab/>W praktycznym zastosowaniu użytkownik mógłby zaszyfrować plik przed wysłaniem go pocztą elektroniczną.</text:p>
      <text:p text:style-name="P8">Przykładowa wymiana pliku w organizacji mogłaby przebiegać w następujący sposób:</text:p>
      <text:list text:style-name="L35">
        <text:list-item>
          <text:p text:style-name="P77">Odbiorca udostępnia nadawcy swój klucz publiczny.</text:p>
        </text:list-item>
        <text:list-item>
          <text:p text:style-name="P77">Nadawca wybiera dokument, który chce zabezpieczyć.</text:p>
        </text:list-item>
        <text:list-item>
          <text:p text:style-name="P77">Program szyfruje plik oraz zabezpiecza klucz potrzebny do jego odszyfrowania.</text:p>
        </text:list-item>
        <text:list-item>
          <text:p text:style-name="P77">Nadawca opcjonalnie podpisuje dokument swoim kluczem prywatnym.</text:p>
        </text:list-item>
        <text:list-item>
          <text:p text:style-name="P77">Nadawca przesyła odbiorcy zaszyfrowany plik, zabezpieczony klucz oraz ewentualny podpis.</text:p>
        </text:list-item>
        <text:list-item>
          <text:p text:style-name="P77">Odbiorca odszyfrowuje plik przy użyciu swojego klucza prywatnego.</text:p>
        </text:list-item>
        <text:list-item>
          <text:p text:style-name="P78">Odbiorca może dodatkowo zweryfikować podpis cyfrowy nadawcy.</text:p>
        </text:list-item>
      </text:list>
      <text:p text:style-name="P8"><text:tab/>Obecna wersja programu najlepiej sprawdziałby się jako narzędzie do szyfrowania plików przed przechowaniem ich w chmurze.</text:p>
      <text:h text:style-name="P79" text:outline-level="2"><text:bookmark-start text:name="__RefHeading___Toc14514_1844702946"/>7.2. Ograniczenia obecnej wersji systemu<text:bookmark-end text:name="__RefHeading___Toc14514_1844702946"/></text:h>
      <text:p text:style-name="P8"><text:tab/>Obecna wersja programu wymaga od użytkownika ręcznego wskazywania plików, kluczy oraz lokalizacji zapisu wyników. Może to prowadzić do pomyłek, szczególnie w przypadku osób, które nie mają doświadczenia z obsługą plików kluczy lub szeroko pojętego sprzetu elektronicznego.</text:p>
      <text:p text:style-name="P8"><text:soft-page-break/><text:tab/>Ograniczeniem jest również brak centralnego katalogu użytkowników i kluczy publicznych. W praktycznym zastosowaniu organizacja musiałaby samodzielnie ustalić, w jaki sposób użytkownicy przekazują sobie klucze publiczne oraz jak upewniają się, że korzystają z właściwego klucza odbiorcy.</text:p>
      <text:h text:style-name="P79" text:outline-level="2"><text:bookmark-start text:name="__RefHeading___Toc14516_1844702946"/>7.3. Możliwości dalszego rozwoju<text:bookmark-end text:name="__RefHeading___Toc14516_1844702946"/></text:h>
      <text:p text:style-name="P8"><text:tab/>W przyszłości system mógłby zostać rozbudowany o funkcje zwiększające wygodę i bezpieczeństwo użytkowania. Przydatne byłoby między innymi automatyczne pakowanie zaszyfrowanego pliku, zabezpieczonego klucza oraz plików pomocniczych do jednego archiwum.</text:p>
      <text:p text:style-name="P8"><text:tab/>Usprawnieniem byłoby dodanie katalogu użytkowników i kluczy publicznych, dzięki któremu nadawca mógłby wybrać odbiorcę z listy, a program automatycznie używałby właściwego klucza. Zmniejszyłoby to ryzyko pomyłki podczas szyfrowania pliku.</text:p>
      <text:p text:style-name="P8"><text:tab/>Oprogramowanie mógłoby zostać również rozbudowane o bardziej przyjazny interfejs prowadzący użytkownika krok po kroku przez proces szyfrowania, podpisywania i odszyfrowywania danych, który ograniczał by możliwe wystąpienia błędów spowodwanych elementem ludzkim.</text:p>
      <text:h text:style-name="Nagłówek_20_1" text:outline-level="1"><text:bookmark-start text:name="__RefHeading___Toc5888_1672344883"/><text:span text:style-name="Strong_20_Emphasis">8. <text:tab/>Przykłady użycia i testowanie systemu</text:span><text:bookmark-end text:name="__RefHeading___Toc5888_1672344883"/></text:h>
      <text:h text:style-name="Nagłówek_20_2" text:outline-level="2"><text:bookmark-start text:name="__RefHeading___Toc5890_1672344883"/><text:span text:style-name="Strong_20_Emphasis">8.1. Generowanie kluczy RSA</text:span><text:bookmark-end text:name="__RefHeading___Toc5890_1672344883"/></text:h>
      <text:p text:style-name="P8"><text:bookmark-start text:name="__RefHeading___Toc5892_1672344883"/><text:span text:style-name="Strong_20_Emphasis"><text:tab/></text:span><text:span text:style-name="Strong_20_Emphasis"><text:span text:style-name="T2">Pierwszym etapem testowania systemu było sprawdzenie poprawności działania modułu generowania kluczy </text:span></text:span><text:span text:style-name="Strong_20_Emphasis"><text:span text:style-name="T3">RSA</text:span></text:span><text:span text:style-name="Strong_20_Emphasis"><text:span text:style-name="T2">. Użytkownik wybrał rozmiar klucza 2048 bitów oraz wskazał lokalizacje zapisania klucza publicznego i prywatnego.</text:span></text:span><text:bookmark-end text:name="__RefHeading___Toc5892_1672344883"/></text:p>
      <text:p text:style-name="P8"><text:bookmark-start text:name="__RefHeading___Toc5894_1672344883"/><text:span text:style-name="Strong_20_Emphasis"><draw:frame draw:style-name="fr3" draw:name="Picture 1" text:anchor-type="as-char" svg:y="0cm" svg:width="17cm" style:rel-width="scale" svg:height="5.528cm" style:rel-height="scale" draw:z-index="1"><draw:image xlink:href="Pictures/100000010000028F000000D54CE9C8B2.png" xlink:type="simple" xlink:show="embed" xlink:actuate="onLoad" draw:mime-type="image/png"/></draw:frame></text:span><text:bookmark-end text:name="__RefHeading___Toc5894_1672344883"/></text:p>
      <text:p text:style-name="P45"><text:span text:style-name="Strong_20_Emphasis"><text:span text:style-name="T5">Rys. </text:span></text:span><text:span text:style-name="Strong_20_Emphasis"><text:span text:style-name="T55">6</text:span></text:span><text:span text:style-name="Strong_20_Emphasis"><text:span text:style-name="T5">: Wygenerowanie kluczy prywatnych i publicznych.</text:span></text:span></text:p>
      <text:p text:style-name="P8"/>
      <text:p text:style-name="P8">Po uruchomieniu procesu aplikacja wygenerowała parę kluczy kryptograficznych:</text:p>
      <text:list text:style-name="L36">
        <text:list-item>
          <text:p text:style-name="P80">klucz prywatny <text:span text:style-name="T1">RSA</text:span> zapisany w formacie <text:span text:style-name="T1">PEM (PKCS8)</text:span>, </text:p>
        </text:list-item>
        <text:list-item>
          <text:p text:style-name="P80">klucz publiczny RSA zapisany w formacie <text:span text:style-name="T51">PEM (SubjectPublicKeyInfo)</text:span>. </text:p>
        </text:list-item>
      </text:list>
      <text:p text:style-name="P8"><text:soft-page-break/>Wygenerowane klucze zostały następnie wykorzystane podczas kolejnych testów obejmujących szyfrowanie hybrydowe oraz podpis cyfrowy. Program poprawnie odczytał oba pliki, co potwierdziło prawidłowość procesu generowania oraz zapisu kluczy.</text:p>
      <text:h text:style-name="Heading_20_2" text:outline-level="2"><text:bookmark-start text:name="__RefHeading___Toc5896_1672344883"/><text:span text:style-name="Strong_20_Emphasis">8.2. Szyfrowanie i odszyfrowanie dokumentu</text:span><text:bookmark-end text:name="__RefHeading___Toc5896_1672344883"/></text:h>
      <text:p text:style-name="P81">W ramach testów przeprowadzono proces szyfrowania oraz odszyfrowania dokumentu tekstowego. Użytkownik wskazał plik wejściowy, wybrał lokalizację pliku wynikowego, a następnie uruchomił proces szyfrowania przy użyciu algorytmu <text:span text:style-name="T1">AES-256-GCM</text:span>.</text:p>
      <text:p text:style-name="P45"><draw:frame draw:style-name="fr3" draw:name="Image2" text:anchor-type="as-char" svg:y="0cm" svg:width="17cm" style:rel-width="scale" svg:height="13.301cm" style:rel-height="scale" draw:z-index="2"><draw:image xlink:href="Pictures/100000010000031B0000026E1E0A3211.png" xlink:type="simple" xlink:show="embed" xlink:actuate="onLoad" draw:mime-type="image/png"/></draw:frame></text:p>
      <text:p text:style-name="P45"><text:span text:style-name="Strong_20_Emphasis"><text:span text:style-name="T5">Rys. 7: Zaszyfrowanie pliku tekstowego.</text:span></text:span></text:p>
      <text:p text:style-name="Text_20_body">W wyniku działania programu utworzono:</text:p>
      <text:list text:style-name="L37">
        <text:list-item>
          <text:p text:style-name="P82">zaszyfrowany plik danych, </text:p>
        </text:list-item>
        <text:list-item>
          <text:p text:style-name="P82">plik zawierający klucz <text:span text:style-name="T1">AES</text:span>, </text:p>
        </text:list-item>
        <text:list-item>
          <text:p text:style-name="P82">plik zawierający wartość <text:span text:style-name="T1">Nonce</text:span>. </text:p>
        </text:list-item>
      </text:list>
      <text:p text:style-name="P83">Następnie przeprowadzono proces odszyfrowania przy użyciu wygenerowanych wcześniej parametrów. Otrzymany plik był identyczny z oryginałem, co potwierdziło poprawność działania mechanizmu szyfrowania i deszyfrowania.</text:p>
      <text:p text:style-name="P45"><text:soft-page-break/><draw:frame draw:style-name="fr3" draw:name="Image3" text:anchor-type="as-char" svg:y="0cm" svg:width="17cm" style:rel-width="scale" svg:height="13.351cm" style:rel-height="scale" draw:z-index="3"><draw:image xlink:href="Pictures/10000001000003180000026E4600DD65.png" xlink:type="simple" xlink:show="embed" xlink:actuate="onLoad" draw:mime-type="image/png"/></draw:frame></text:p>
      <text:p text:style-name="P45"><text:span text:style-name="Strong_20_Emphasis"><text:span text:style-name="T5">Rys. 8: Odszyfrowanie pliku tekstowego.</text:span></text:span></text:p>
      <text:p text:style-name="P45"><draw:frame draw:style-name="fr4" draw:name="Image4" text:anchor-type="as-char" svg:y="-0.018cm" svg:width="15.522cm" style:rel-width="scale" svg:height="8.273cm" style:rel-height="scale" draw:z-index="4"><draw:image xlink:href="Pictures/1000000100000371000002C960B2AFFE.png" xlink:type="simple" xlink:show="embed" xlink:actuate="onLoad" draw:mime-type="image/png"/></draw:frame></text:p>
      <text:p text:style-name="P45"><text:span text:style-name="Strong_20_Emphasis"><text:span text:style-name="T5">Rys. </text:span></text:span><text:span text:style-name="Strong_20_Emphasis"><text:span text:style-name="T55">9</text:span></text:span><text:span text:style-name="Strong_20_Emphasis"><text:span text:style-name="T5">: Prezentacja procesu szyfrowania/odszyfrowania na podstawie plików.</text:span></text:span><text:span text:style-name="T56"><text:line-break/></text:span></text:p>
      <text:h text:style-name="Nagłówek_20_2" text:outline-level="2"><text:bookmark-start text:name="__RefHeading___Toc15643_1844702946"/><text:soft-page-break/><text:span text:style-name="Strong_20_Emphasis">8.3. </text:span><text:span text:style-name="Strong_20_Emphasis"><text:span text:style-name="T57">Szyfrowanie hybrydowe</text:span></text:span><text:bookmark-end text:name="__RefHeading___Toc15643_1844702946"/></text:h>
      <text:p text:style-name="P81">W drugim scenariuszu wykorzystano szyfrowanie hybrydowe. Dane zostały zaszyfrowane przy użyciu algorytmu <text:span text:style-name="T1">AES-256-GCM</text:span>, natomiast klucz <text:span text:style-name="T1">AES</text:span> został dodatkowo zabezpieczony przy użyciu klucza publicznego <text:span text:style-name="T1">RSA</text:span> odbiorcy.</text:p>
      <text:p text:style-name="P45"><draw:frame draw:style-name="fr3" draw:name="Image5" text:anchor-type="as-char" svg:y="0cm" svg:width="17cm" style:rel-width="scale" svg:height="13.227cm" style:rel-height="scale" draw:z-index="5"><draw:image xlink:href="Pictures/100000010000032200000270D6FFB418.png" xlink:type="simple" xlink:show="embed" xlink:actuate="onLoad" draw:mime-type="image/png"/></draw:frame></text:p>
      <text:p text:style-name="P45"><text:span text:style-name="Strong_20_Emphasis"><text:span text:style-name="T5">Rys. 10: Przykład szyfrowania wielowarstwowego przy użyciu klucza publicznego RSA.</text:span></text:span></text:p>
      <text:p text:style-name="P8">W celu odszyfrowania pliku wykorzystano:</text:p>
      <text:list text:style-name="L38">
        <text:list-item>
          <text:p text:style-name="P84">klucz prywatnego <text:span text:style-name="T1">RSA</text:span>, </text:p>
        </text:list-item>
        <text:list-item>
          <text:p text:style-name="P84">zaszyfrowany klucz <text:span text:style-name="T1">AES</text:span>, </text:p>
        </text:list-item>
        <text:list-item>
          <text:p text:style-name="P84">plik Nonce, </text:p>
        </text:list-item>
        <text:list-item>
          <text:p text:style-name="P84">zaszyfrowane dane. </text:p>
        </text:list-item>
      </text:list>
      <text:p text:style-name="P8"><text:tab/>Test wykazał poprawne odzyskanie danych oraz skuteczne zabezpieczenie klucza szyfrującego przed dostępem osób nieuprawnionych.</text:p>
      <text:p text:style-name="Text_20_body"/>
      <text:p text:style-name="P45"><text:soft-page-break/><draw:frame draw:style-name="fr3" draw:name="Image6" text:anchor-type="as-char" svg:y="0cm" svg:width="17cm" style:rel-width="scale" svg:height="13.344cm" style:rel-height="scale" draw:z-index="6"><draw:image xlink:href="Pictures/100000010000031B00000270B3B5B453.png" xlink:type="simple" xlink:show="embed" xlink:actuate="onLoad" draw:mime-type="image/png"/></draw:frame></text:p>
      <text:p text:style-name="P45"><text:span text:style-name="Strong_20_Emphasis"><text:span text:style-name="T5">Rys. 11: Odszyfrowanie pliku tekstowego przy pomocy klucza prywatnego.</text:span></text:span></text:p>
      <text:p text:style-name="P45"><draw:frame draw:style-name="fr5" draw:name="Image7" text:anchor-type="as-char" svg:y="0cm" svg:width="17cm" style:rel-width="scale" svg:height="6.913cm" style:rel-height="scale" draw:z-index="7"><draw:image xlink:href="Pictures/100000010000042E000002C693DCDE50.png" xlink:type="simple" xlink:show="embed" xlink:actuate="onLoad" draw:mime-type="image/png"/></draw:frame></text:p>
      <text:p text:style-name="P85"><text:span text:style-name="Strong_20_Emphasis"><text:span text:style-name="T5">Rys. 1</text:span></text:span><text:span text:style-name="Strong_20_Emphasis"><text:span text:style-name="T58">2</text:span></text:span><text:span text:style-name="Strong_20_Emphasis"><text:span text:style-name="T5">: Odszyfrowanie pliku tekstowego przy pomocy klucza prywatnego.</text:span></text:span></text:p>
      <text:p text:style-name="Text_20_body"/>
      <text:h text:style-name="Nagłówek_20_2" text:outline-level="2"><text:bookmark-start text:name="__RefHeading___Toc15645_1844702946"/><text:soft-page-break/><text:span text:style-name="Strong_20_Emphasis">8.4. Podpisanie dokumentu i weryfikacja podpisu</text:span><text:bookmark-end text:name="__RefHeading___Toc15645_1844702946"/></text:h>
      <text:p text:style-name="P8"><text:tab/>W celu sprawdzenia poprawności działania podpisu cyfrowego podpisano dokument tekstowy przy użyciu klucza prywatnego <text:span text:style-name="T1">RSA</text:span>.</text:p>
      <text:p text:style-name="P45"><draw:frame draw:style-name="fr3" draw:name="Image8" text:anchor-type="as-char" svg:y="0cm" svg:width="12.19cm" style:rel-width="scale" svg:height="7.595cm" style:rel-height="scale" draw:z-index="8"><draw:image xlink:href="Pictures/10000001000002A7000001A7A4770449.png" xlink:type="simple" xlink:show="embed" xlink:actuate="onLoad" draw:mime-type="image/png"/></draw:frame></text:p>
      <text:p text:style-name="P85"><text:span text:style-name="Strong_20_Emphasis"><text:span text:style-name="T5">Rys. </text:span></text:span><text:span text:style-name="Strong_20_Emphasis"><text:span text:style-name="T58">13</text:span></text:span><text:span text:style-name="Strong_20_Emphasis"><text:span text:style-name="T5">: Podpisanie pliku, oraz jego weryfikacja.</text:span></text:span></text:p>
      <text:p text:style-name="P8"><text:tab/>Po wygenerowaniu podpisu wykonano jego weryfikację z wykorzystaniem odpowiadającego klucza publicznego. Program poprawnie potwierdził autentyczność dokumentu.</text:p>
      <text:p text:style-name="P8"><text:tab/>Dodatkowo zmodyfikowano zawartość podpisanego pliku poprzez dopisanie pojedynczego znaku. Po ponownej weryfikacji aplikacja zgłosiła niepoprawny podpis, co potwierdziło skuteczność mechanizmu kontroli integralności danych.</text:p>
      <text:p text:style-name="P45"><draw:frame draw:style-name="fr3" draw:name="Image9" text:anchor-type="as-char" svg:y="0cm" svg:width="17cm" style:rel-width="scale" svg:height="3.367cm" style:rel-height="scale" draw:z-index="9"><draw:image xlink:href="Pictures/10000001000004DF000000F7EE70C626.png" xlink:type="simple" xlink:show="embed" xlink:actuate="onLoad" draw:mime-type="image/png"/></draw:frame></text:p>
      <text:p text:style-name="P85"><text:span text:style-name="Strong_20_Emphasis"><text:span text:style-name="T5">Rys. </text:span></text:span><text:span text:style-name="Strong_20_Emphasis"><text:span text:style-name="T58">14</text:span></text:span><text:span text:style-name="Strong_20_Emphasis"><text:span text:style-name="T5">: Weryfikacja poprawności mechanizmu kontroli integralności danych.</text:span></text:span></text:p>
      <text:h text:style-name="P86" text:outline-level="2"><text:span text:style-name="Strong_20_Emphasis"/></text:h>
      <text:h text:style-name="P87" text:outline-level="2"><text:bookmark-start text:name="__RefHeading___Toc15647_1844702946"/><text:span text:style-name="Strong_20_Emphasis">8.5. Kompatybilność z innymi programami</text:span><text:bookmark-end text:name="__RefHeading___Toc15647_1844702946"/></text:h>
      <text:p text:style-name="P8"><text:span text:style-name="Strong_20_Emphasis"><text:span text:style-name="T59"><text:tab/></text:span></text:span><text:span text:style-name="Strong_20_Emphasis"><text:span text:style-name="T2">Kompatybilność rozwiązania, a tym samym potwierdzenie działania oprogramowania zgodnie z założonym algorytmem, zweryfikowano przy użyciu narzędzia online </text:span></text:span><text:span text:style-name="Strong_20_Emphasis"><text:span text:style-name="T3">CyberChef</text:span></text:span><text:span text:style-name="Strong_20_Emphasis"><text:span text:style-name="T2">.</text:span></text:span></text:p>
      <text:p text:style-name="P8"><text:span text:style-name="T2"><text:tab/>Ze względu na różnice w sposobie realizacji, głównie dotyczące formatów plików, konieczne było wcześniejsze przygotowanie danych wejściowych. W projekcie pliki zapisywane są w postaci binarnej, natomiast </text:span><text:span text:style-name="T3">CyberChef </text:span><text:span text:style-name="T2">wymaga danych w formacie szesnastkowym — lub innym obsługiwanym formacie tekstowym. W związku z tym wygenerowane pliki zostały najpierw przekonwertowane do postaci </text:span><text:span text:style-name="Strong_20_Emphasis"><text:span text:style-name="T3">hex</text:span></text:span><text:span text:style-name="T2">. Treść pliku przeznaczonego do zaszyfrowania przedstawiono na poniższym </text:span>rysunku.</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88"><text:span text:style-name="Strong_20_Emphasis"><text:tab/><text:tab/><text:tab/></text:span></text:p>
      <text:p text:style-name="P89"><text:span text:style-name="Strong_20_Emphasis"><text:span text:style-name="T5">Rys. </text:span></text:span><text:span text:style-name="Strong_20_Emphasis"><text:span text:style-name="T58">1</text:span></text:span><text:span text:style-name="Strong_20_Emphasis"><text:span text:style-name="T60">5</text:span></text:span><text:span text:style-name="Strong_20_Emphasis"><text:span text:style-name="T5">: </text:span></text:span><text:span text:style-name="Strong_20_Emphasis"><text:span text:style-name="T60">Zawartość pliku zaszyfrowanego przez zaprojektowany program.</text:span></text:span></text:p>
      <text:p text:style-name="P8"><text:span text:style-name="Strong_20_Emphasis"><text:span text:style-name="T2"><text:tab/>Na kolejnym rysunku przedstawiono pliki wygenerowane przez zaprojektowany program szyfrujący:</text:span></text:span></text:p>
      <text:list text:style-name="L39">
        <text:list-item>
          <text:p text:style-name="P90"><text:span text:style-name="Strong_20_Emphasis"><text:span text:style-name="T3">„Plik_tekstowy.txt”</text:span></text:span><text:span text:style-name="T2"> – pierwotny plik zawierający treść do zaszyfrowania, </text:span></text:p>
        </text:list-item>
        <text:list-item>
          <text:p text:style-name="P90"><text:span text:style-name="Strong_20_Emphasis"><text:span text:style-name="T3">„szyfrogram”</text:span></text:span><text:span text:style-name="T2"> – plik zawierający zaszyfrowane dane, </text:span></text:p>
        </text:list-item>
        <text:list-item>
          <text:p text:style-name="P90"><text:span text:style-name="Strong_20_Emphasis"><text:span text:style-name="T3">„szyfrogram.key”</text:span></text:span><text:span text:style-name="T2"> – plik zawierający klucz AES, </text:span></text:p>
        </text:list-item>
        <text:list-item>
          <text:p text:style-name="P91"><text:span text:style-name="Strong_20_Emphasis"><text:span text:style-name="T3">„szyfrogram.nonce”</text:span></text:span><text:span text:style-name="T3"> </text:span><text:span text:style-name="T2">– plik zawierający wartość nonce wymaganą do odszyfrowania danych. </text:span></text:p>
        </text:list-item>
      </text:list>
      <text:p text:style-name="P92"><text:span text:style-name="Strong_20_Emphasis"/></text:p>
      <text:p text:style-name="P92"><text:span text:style-name="Strong_20_Emphasis"/></text:p>
      <text:p text:style-name="P92"><text:span text:style-name="Strong_20_Emphasis"/></text:p>
      <text:p text:style-name="P92"><text:span text:style-name="Strong_20_Emphasis"/></text:p>
      <text:p text:style-name="P89"><text:span text:style-name="Strong_20_Emphasis"><text:span text:style-name="T5">Rys. </text:span></text:span><text:span text:style-name="Strong_20_Emphasis"><text:span text:style-name="T58">1</text:span></text:span><text:span text:style-name="Strong_20_Emphasis"><text:span text:style-name="T60">6</text:span></text:span><text:span text:style-name="Strong_20_Emphasis"><text:span text:style-name="T5">: </text:span></text:span><text:span text:style-name="Strong_20_Emphasis"><text:span text:style-name="T60">Pliki wygenerowane poprzez prodecurę szyfrowania.</text:span></text:span></text:p>
      <text:p text:style-name="P8"><text:span text:style-name="Strong_20_Emphasis"><text:span text:style-name="T2">Zawartość plików po konwersji do formatu szesnastkowego </text:span></text:span><text:span text:style-name="Strong_20_Emphasis"><text:span text:style-name="T61">przedstawiono w tabeli poniżej.</text:span></text:span></text:p>
      <text:p text:style-name="P93"><text:span text:style-name="Domyślna_20_czcionka_20_akapitu"><text:span text:style-name="T62">Tabela 1. </text:span></text:span><text:span text:style-name="Domyślna_20_czcionka_20_akapitu"><text:span text:style-name="T63">Dane po konwersji do formatu .hex.</text:span></text:span></text:p>
      <table:table table:name="Table13" table:style-name="Table13">
        <table:table-column table:style-name="Table13.A"/>
        <table:table-column table:style-name="Table13.B"/>
        <table:table-row table:style-name="Table13.1">
          <table:table-cell table:style-name="Table13.A1" office:value-type="string">
            <text:p text:style-name="P94">Plik</text:p>
          </table:table-cell>
          <table:table-cell table:style-name="Table13.B1" office:value-type="string">
            <text:p text:style-name="P94">Wartość po konwersji na typ .hex</text:p>
          </table:table-cell>
        </table:table-row>
        <table:table-row>
          <table:table-cell table:style-name="Table13.A2" office:value-type="string">
            <text:p text:style-name="P95"><text:span text:style-name="Strong_20_Emphasis"><text:span text:style-name="T2">szyfrogram</text:span></text:span></text:p>
          </table:table-cell>
          <table:table-cell table:style-name="Table13.B2" office:value-type="string">
            <text:p text:style-name="P96">87610adbd87a68fce770c4f8610598225e49da58945ef9ef1ae56847bf29d731dba9914a8c79333ad8937f3516f6ee022b06c446d0ee559ab1fbadd4b0dde768c4aed122ac31fa447e84366911c91cfc086cfe842e1e5903a8d741012a51d6b9f0f580cdfa87ce52faf201e667e77bb787217d32cf910153101023ec918a8000bb0fca2bb7553b2bae5019947af25d553bb60bf0c9157ab812e8876e4dd223d80b48a32aa966db7f048276f2be03836ebc2962734bdeabf6c29e90827c2465bf7ec593baaf7cb9500e61225982b1e3b6195df8630fb7eee0f16a73a29bb0abd512972f280a0113456c858e5741d8d7819cebf07d1c7282a2adf1810e85180ad2</text:p>
          </table:table-cell>
        </table:table-row>
        <table:table-row table:style-name="Table13.3">
          <table:table-cell table:style-name="Table13.A2" office:value-type="string">
            <text:p text:style-name="P95"><text:span text:style-name="Strong_20_Emphasis"><text:span text:style-name="T2">szyfrogram.nonce</text:span></text:span></text:p>
          </table:table-cell>
          <table:table-cell table:style-name="Table13.B3" office:value-type="string">
            <text:p text:style-name="P96">2cf4262141121bc6f5bb5e6f</text:p>
          </table:table-cell>
        </table:table-row>
        <table:table-row table:style-name="Table13.4">
          <table:table-cell table:style-name="Table13.A2" office:value-type="string">
            <text:p text:style-name="P95"><text:span text:style-name="Strong_20_Emphasis"><text:span text:style-name="T2">szyfrogram.key</text:span></text:span></text:p>
          </table:table-cell>
          <table:table-cell table:style-name="Table13.B4" office:value-type="string">
            <text:p text:style-name="P96">9676e663d6a2c217bab5598af5487b772d2ca99c4380fb1aa20eb7aaf2dc2fce</text:p>
          </table:table-cell>
        </table:table-row>
      </table:table>
      <text:p text:style-name="Text_20_body"><text:span text:style-name="Strong_20_Emphasis"><text:span text:style-name="T2"/></text:span></text:p>
      <text:p text:style-name="P8"><text:span text:style-name="Strong_20_Emphasis"><text:span text:style-name="T64"><text:tab/></text:span></text:span><text:span text:style-name="Strong_20_Emphasis"><text:span text:style-name="T2">W celu poprawnego odszyfrowania danych </text:span></text:span><text:span text:style-name="Strong_20_Emphasis"><text:span text:style-name="T3">CyberChef</text:span></text:span><text:span text:style-name="Strong_20_Emphasis"><text:span text:style-name="T2"> wymaga również podania wartości </text:span></text:span><text:span text:style-name="Strong_20_Emphasis"><text:span text:style-name="T3">GCM Tag</text:span></text:span><text:span text:style-name="Strong_20_Emphasis"><text:span text:style-name="T2">, generowanej przez algorytm </text:span></text:span><text:span text:style-name="Strong_20_Emphasis"><text:span text:style-name="T3">AES</text:span></text:span><text:span text:style-name="Strong_20_Emphasis"><text:span text:style-name="T2"> pracujący w trybie </text:span></text:span><text:span text:style-name="Strong_20_Emphasis"><text:span text:style-name="T3">GCM</text:span></text:span><text:span text:style-name="Strong_20_Emphasis"><text:span text:style-name="T2">. W zaprojektowanym rozwiązaniu znacznik ten jest dołączany na końcu szyfrogramu jako ostatnie 16 bajtów. Z tego powodu przed wprowadzeniem danych do </text:span></text:span><text:span text:style-name="Strong_20_Emphasis"><text:span text:style-name="T3">CyberChef</text:span></text:span><text:span text:style-name="Strong_20_Emphasis"><text:span text:style-name="T2"> konieczne było oddzielenie właściwego szyfrogramu od wartości </text:span></text:span><text:span text:style-name="Strong_20_Emphasis"><text:span text:style-name="T3">GCM Tag</text:span></text:span><text:span text:style-name="Strong_20_Emphasis"><text:span text:style-name="T2">.</text:span></text:span></text:p>
      <text:p text:style-name="P97"><text:span text:style-name="Strong_20_Emphasis"><text:span text:style-name="T2"><text:tab/>Końcowe dane wprowadzone do programu </text:span></text:span><text:span text:style-name="Strong_20_Emphasis"><text:span text:style-name="T3">CyberChef </text:span></text:span><text:span text:style-name="Strong_20_Emphasis"><text:span text:style-name="T2">miały postać </text:span></text:span><text:span text:style-name="Strong_20_Emphasis"><text:span text:style-name="T61">przedstawioną w tabeli poniżej</text:span></text:span><text:span text:style-name="Strong_20_Emphasis"><text:span text:style-name="T2">:</text:span></text:span></text:p>
      <text:p text:style-name="P97"><text:span text:style-name="Domyślna_20_czcionka_20_akapitu"><text:span text:style-name="T5">Tabela </text:span></text:span><text:span text:style-name="Domyślna_20_czcionka_20_akapitu"><text:span text:style-name="T63">2</text:span></text:span><text:span text:style-name="Domyślna_20_czcionka_20_akapitu"><text:span text:style-name="T5">. </text:span></text:span><text:span text:style-name="Domyślna_20_czcionka_20_akapitu"><text:span text:style-name="T63">Dane wejściowe dla programu </text:span></text:span><text:span text:style-name="Domyślna_20_czcionka_20_akapitu"><text:span text:style-name="T65">CyberChef</text:span></text:span><text:span text:style-name="Domyślna_20_czcionka_20_akapitu"><text:span text:style-name="T63">.</text:span></text:span></text:p>
      <table:table table:name="Table14" table:style-name="Table14">
        <table:table-column table:style-name="Table14.A"/>
        <table:table-column table:style-name="Table14.B"/>
        <table:table-row>
          <table:table-cell table:style-name="Table14.A1" office:value-type="string">
            <text:p text:style-name="P98">Parametr</text:p>
          </table:table-cell>
          <table:table-cell table:style-name="Table14.B1" office:value-type="string">
            <text:p text:style-name="P98">Wartość</text:p>
          </table:table-cell>
        </table:table-row>
        <table:table-row>
          <table:table-cell table:style-name="Table14.A2" office:value-type="string">
            <text:p text:style-name="P99">Key</text:p>
          </table:table-cell>
          <table:table-cell table:style-name="Table14.B2" office:value-type="string">
            <text:p text:style-name="Table_20_Contents">9676e663d6a2c217bab5598af5487b772d2ca99c4380fb1aa20eb7aaf2dc2fce</text:p>
          </table:table-cell>
        </table:table-row>
        <table:table-row>
          <table:table-cell table:style-name="Table14.A2" office:value-type="string">
            <text:p text:style-name="P99">IV/Nonce</text:p>
          </table:table-cell>
          <table:table-cell table:style-name="Table14.B3" office:value-type="string">
            <text:p text:style-name="Table_20_Contents">2cf4262141121bc6f5bb5e6f</text:p>
          </table:table-cell>
        </table:table-row>
        <table:table-row>
          <table:table-cell table:style-name="Table14.A2" office:value-type="string">
            <text:p text:style-name="P99">GCM Tag</text:p>
          </table:table-cell>
          <table:table-cell table:style-name="Table14.B4" office:value-type="string">
            <text:p text:style-name="Table_20_Contents">9cebf07d1c7282a2adf1810e85180ad2</text:p>
          </table:table-cell>
        </table:table-row>
        <table:table-row>
          <table:table-cell table:style-name="Table14.A2" office:value-type="string">
            <text:p text:style-name="P99">Input</text:p>
          </table:table-cell>
          <table:table-cell table:style-name="Table14.B5" office:value-type="string">
            <text:p text:style-name="Table_20_Contents">87610adbd87a68fce770c4f8610598225e49da58945ef9ef1ae56847bf29d731dba9914a8c79333ad8937f3516f6ee022b06c446d0ee559ab1fbadd4b0dde768c4aed122ac31fa447e84366911c91cfc086cfe842e1e5903a8d741012a51d6b9f0f580cdfa87ce52faf201e667e77bb787217d32cf910153101023ec918a8000bb0fca2bb7553b2bae5019947af25d55<text:soft-page-break/>3bb60bf0c9157ab812e8876e4dd223d80b48a32aa966db7f048276f2be03836ebc2962734bdeabf6c29e90827c2465bf7ec593baaf7cb9500e61225982b1e3b6195df8630fb7eee0f16a73a29bb0abd512972f280a0113456c858e5741d8d781</text:p>
          </table:table-cell>
        </table:table-row>
      </table:table>
      <text:p text:style-name="Text_20_body"><text:span text:style-name="Strong_20_Emphasis"><text:span text:style-name="T2"/></text:span></text:p>
      <text:p text:style-name="P100"><text:span text:style-name="Strong_20_Emphasis"><text:span text:style-name="T2"><text:tab/>Wynik działania programu </text:span></text:span><text:span text:style-name="Strong_20_Emphasis"><text:span text:style-name="T3">CyberChef</text:span></text:span><text:span text:style-name="Strong_20_Emphasis"><text:span text:style-name="T2"> przedstawiono na poniższym rysunku. Uzyskany rezultat potwierdza poprawność działania zaimplementowanego rozwiązania - odszyfrowana zawartość odpowiada pierwotnej treści pliku wejściowego </text:span></text:span><text:span text:style-name="Strong_20_Emphasis"><text:span text:style-name="T66">zaszyfrowanego przy pomocy zaproponowanego programu</text:span></text:span><text:span text:style-name="Strong_20_Emphasis"><text:span text:style-name="T2">.</text:span></text:span></text:p>
      <text:p text:style-name="P101"><text:span text:style-name="Strong_20_Emphasis"><text:span text:style-name="T5">Rys. </text:span></text:span><text:span text:style-name="Strong_20_Emphasis"><text:span text:style-name="T58">1</text:span></text:span><text:span text:style-name="Strong_20_Emphasis"><text:span text:style-name="T67">7</text:span></text:span><text:span text:style-name="Strong_20_Emphasis"><text:span text:style-name="T5">: </text:span></text:span><text:span text:style-name="Strong_20_Emphasis"><text:span text:style-name="T67">Wynik działania programu </text:span></text:span><text:span text:style-name="Strong_20_Emphasis"><text:span text:style-name="T68">CyberChef </text:span></text:span><text:span text:style-name="Strong_20_Emphasis"><text:span text:style-name="T67">na plikach wejściowych wygenerowanych przez zaprojektowane rozwiązanie</text:span></text:span><text:span text:style-name="Strong_20_Emphasis"><text:span text:style-name="T60">.</text:span></text:span></text:p>
      <text:h text:style-name="P102" text:outline-level="2" text:is-list-header="true"><text:bookmark-start text:name="__RefHeading___Toc15649_1844702946 Copy 1"/><text:span text:style-name="Strong_20_Emphasis">8.6. <text:tab/></text:span><text:span text:style-name="Strong_20_Emphasis"><text:span text:style-name="T69">Szyfrowanie wielowarstwowe</text:span></text:span><text:bookmark-end text:name="__RefHeading___Toc15649_1844702946 Copy 1"/></text:h>
      <text:p text:style-name="P103"><text:span text:style-name="Strong_20_Emphasis"><text:span text:style-name="T2"><text:tab/>W celu weryfikacji poprawności działania algorytmu szyfrowania przeprowadzono również test wielowarstwowego szyfrowania danych. Polegał on na dwukrotnym zaszyfrowaniu pliku </text:span></text:span><text:span text:style-name="Strong_20_Emphasis"><text:span text:style-name="T3">„wielo_test.txt”</text:span></text:span><text:span text:style-name="Strong_20_Emphasis"><text:span text:style-name="T2">, którego zawartość przedstawiono na poniższym rysunku. Proces przebiegał według schematu: plik pierwotny </text:span></text:span><text:span text:style-name="Strong_20_Emphasis"><text:span text:style-name="T70">(</text:span></text:span><text:span text:style-name="Strong_20_Emphasis"><text:span text:style-name="T71">Rys. 18</text:span></text:span><text:span text:style-name="Strong_20_Emphasis"><text:span text:style-name="T70">)</text:span></text:span><text:span text:style-name="Strong_20_Emphasis"><text:span text:style-name="T2"> → plik zaszyfrowany </text:span></text:span><text:span text:style-name="Strong_20_Emphasis"><text:span text:style-name="T70">(proces szyfrowania na </text:span></text:span><text:span text:style-name="Strong_20_Emphasis"><text:span text:style-name="T71">Rys. 19</text:span></text:span><text:span text:style-name="Strong_20_Emphasis"><text:span text:style-name="T70">)</text:span></text:span><text:span text:style-name="Strong_20_Emphasis"><text:span text:style-name="T2"> → plik zaszyfrowany ponownie </text:span></text:span><text:span text:style-name="Strong_20_Emphasis"><text:span text:style-name="T70">(proces szyfrowania ponownego na </text:span></text:span><text:span text:style-name="Strong_20_Emphasis"><text:span text:style-name="T71">Rys. 20</text:span></text:span><text:span text:style-name="Strong_20_Emphasis"><text:span text:style-name="T70">)</text:span></text:span><text:span text:style-name="Strong_20_Emphasis"><text:span text:style-name="T2">.</text:span></text:span></text:p>
      <text:p text:style-name="P104"><text:span text:style-name="Strong_20_Emphasis"/></text:p>
      <text:p text:style-name="P104"><text:span text:style-name="Strong_20_Emphasis"/></text:p>
      <text:p text:style-name="P104"><text:span text:style-name="Strong_20_Emphasis"/></text:p>
      <text:p text:style-name="P104"><text:span text:style-name="Strong_20_Emphasis"/></text:p>
      <text:p text:style-name="P104"><text:span text:style-name="Strong_20_Emphasis"/></text:p>
      <text:p text:style-name="P105"><text:span text:style-name="Strong_20_Emphasis"><text:span text:style-name="T5">Rys. </text:span></text:span><text:span text:style-name="Strong_20_Emphasis"><text:span text:style-name="T58">1</text:span></text:span><text:span text:style-name="Strong_20_Emphasis"><text:span text:style-name="T72">8</text:span></text:span><text:span text:style-name="Strong_20_Emphasis"><text:span text:style-name="T5">: </text:span></text:span><text:span text:style-name="Strong_20_Emphasis"><text:span text:style-name="T73">Pierwotna zawartość</text:span></text:span><text:span text:style-name="Strong_20_Emphasis"><text:span text:style-name="T72"> pliku testowego.</text:span></text:span></text:p>
      <text:p text:style-name="P106"><text:span text:style-name="Strong_20_Emphasis"><text:span text:style-name="T5">Rys. </text:span></text:span><text:span text:style-name="Strong_20_Emphasis"><text:span text:style-name="T58">1</text:span></text:span><text:span text:style-name="Strong_20_Emphasis"><text:span text:style-name="T74">9</text:span></text:span><text:span text:style-name="Strong_20_Emphasis"><text:span text:style-name="T5">: </text:span></text:span><text:span text:style-name="Strong_20_Emphasis"><text:span text:style-name="T74">Proces szyfrowania: od lewej pierwszy stopień szyfrowania, kolejno drugi.</text:span></text:span></text:p>
      <text:p text:style-name="P107"><text:span text:style-name="Strong_20_Emphasis"><text:span text:style-name="T74"/></text:span></text:p>
      <text:p text:style-name="P107"><text:span text:style-name="Strong_20_Emphasis"><text:span text:style-name="T74">Rys. 20: Proces deszyfrowania: od lewej pierwszy stopień deszyfrowania, kolejno drugi.</text:span></text:span></text:p>
      <text:p text:style-name="P107"><text:span text:style-name="Strong_20_Emphasis"><text:span text:style-name="T74">Rys. 21: Wynik deszyfrowania wielowarstwowego.</text:span></text:span></text:p>
      <text:p text:style-name="P103"><text:span text:style-name="Strong_20_Emphasis"><text:span text:style-name="T2"><text:tab/>Proces deszyfrowania przebiegł pomyślnie. Plik zaszyfrowany kilkukrotnie, po odszyfrowaniu w odpowiedniej kolejności, był możliwy do poprawnego odczytania. Wykonano również test polegający na próbie odszyfrowania pliku w niewłaściwej kolejności, który zakończył się niepowodzeniem.</text:span></text:span></text:p>
      <text:p text:style-name="P103"><text:span text:style-name="Strong_20_Emphasis"><text:span text:style-name="T74"/></text:span></text:p>
      <text:h text:style-name="P87" text:outline-level="2"><text:bookmark-start text:name="__RefHeading___Toc15649_1844702946"/><text:span text:style-name="Strong_20_Emphasis">8.</text:span><text:span text:style-name="Strong_20_Emphasis"><text:span text:style-name="T75">7</text:span></text:span><text:span text:style-name="Strong_20_Emphasis">. Ocena poprawności działania systemu</text:span><text:bookmark-end text:name="__RefHeading___Toc15649_1844702946"/></text:h>
      <text:p text:style-name="P8"><text:tab/>Na podstawie przeprowadzonych testów stwierdzono, że aplikacja prawidłowo realizuje wszystkie założone funkcjonalności:</text:p>
      <text:list text:style-name="L40">
        <text:list-item>
          <text:p text:style-name="P108">szyfrowanie danych, </text:p>
        </text:list-item>
        <text:list-item>
          <text:p text:style-name="P108">odszyfrowywanie danych, </text:p>
        </text:list-item>
        <text:list-item>
          <text:p text:style-name="P108">generowanie kluczy <text:span text:style-name="T1">RSA</text:span>, </text:p>
        </text:list-item>
        <text:list-item>
          <text:p text:style-name="P108">tworzenie podpisów cyfrowych, </text:p>
        </text:list-item>
        <text:list-item>
          <text:p text:style-name="P108">weryfikację podpisów cyfrowych, </text:p>
        </text:list-item>
        <text:list-item>
          <text:p text:style-name="P108">szyfrowanie hybrydowe. </text:p>
        </text:list-item>
      </text:list>
      <text:p text:style-name="P109"><text:tab/>Nie stwierdzono utraty danych ani błędów wpływających na bezpieczeństwo działania systemu. Program poprawnie reagował również na sytuacje błędne, takie jak brak wymaganych plików lub użycie nieprawidłowego klucza. Uzyskane wyniki potwierdzają, że opracowane rozwiązanie spełnia założenia projektowe i może być wykorzystywane do demonstracji praktycznych zastosowań kryptografii symetrycznej i asymetrycznej.</text:p>
      <text:h text:style-name="P110" text:outline-level="1"><text:bookmark-start text:name="__RefHeading___Toc3006_1804544189"/><text:span text:style-name="Strong_20_Emphasis">9.<text:tab/>Podsumowanie i wnioski</text:span><text:bookmark-end text:name="__RefHeading___Toc3006_1804544189"/></text:h>
      <text:p text:style-name="P8"><text:tab/>Zrealizowany projekt aplikacji do szyfrowania plików i bezpiecznej wymiany danych spełnia założone cele funkcjonalne oraz projektowe. Udało się zaprojektować i zaimplementować system umożliwiający szyfrowanie oraz odszyfrowywanie danych, generowanie kluczy RSA, tworzenie i weryfikację podpisów cyfrowych, a także zastosowanie szyfrowania hybrydowego. Aplikacja została wykonana w języku <text:span text:style-name="T1">Python</text:span> z wykorzystaniem technologii opisanych w <text:span text:style-name="T1">rozdziale 4</text:span>, a jej modułowa budowa zwiększa czytelność kodu i ułatwia dalszy rozwój.</text:p>
      <text:p text:style-name="P8"><text:tab/>Przeprowadzone testy potwierdziły poprawność działania aplikacji. Program prawidłowo szyfruje i odszyfrowuje pliki, generuje pary kluczy <text:span text:style-name="T1">RSA</text:span>, obsługuje podpisy cyfrowe oraz wykrywa naruszenie integralności danych po modyfikacji pliku. Dodatkowa weryfikacja z wykorzystaniem narzędzia <text:span text:style-name="T1">CyberChef</text:span> potwierdziła zgodność działania zaimplementowanego szyfrowania <text:span text:style-name="T1">AES-GCM</text:span>.</text:p>
      <text:p text:style-name="P111"><text:tab/>Obecna wersja aplikacji dobrze sprawdza się jako narzędzie demonstracyjne pokazujące praktyczne zastosowanie mechanizmów kryptograficznych. Jednocześnie analiza projektu pozwala wskazać możliwe kierunki dalszego rozwoju systemu <text:span text:style-name="T76">w postaci</text:span> dodani<text:span text:style-name="T76">a</text:span> obsługi większej liczby algorytmów kryptograficznych, <text:span text:style-name="T76">czy automatyzacji zarządzania kluczami publicznymi użytkowników.</text:span></text:p>
      <text:p text:style-name="P8"><text:tab/>Na podstawie <text:span text:style-name="T76">zbadanych zagrożeń i metod zapobiegania zagrożeniom</text:span> można stwierdzić, że połączenie kryptografii symetrycznej i asymetrycznej jest skutecznym rozwiązaniem w bezpiecznej wymianie plików <text:span text:style-name="T76">przy odpowiednim przeszkoleniu personelu, który będzie się posługiwał zadysponowanymi</text:span>.</text:p>
      <text:p text:style-name="P8"><text:soft-page-break/><text:tab/><text:span text:style-name="T76">P</text:span>oprawne wykorzystanie mechanizmów kryptograficznych pozwala zwiększyć poufność, integralność i autentyczność danych. Należy jednak pamiętać, że bezpieczeństwo systemu zależy nie tylko od zastosowanych algorytmów, ale także od właściwego zarządzania kluczami oraz świadomego korzystania z aplikacji przez użytkownika.</text:p>
      <text:p text:style-name="P8"/>
      <text:p text:style-name="Text_20_body"/>
      <text:h text:style-name="P7" text:outline-level="1"><text:bookmark-start text:name="__RefHeading___Toc431_2443504791_Copy_1"/><text:span text:style-name="Strong_20_Emphasis">10.<text:tab/>Bibliografia</text:span><text:bookmark-end text:name="__RefHeading___Toc431_2443504791_Copy_1"/></text:h>
      <text:p text:style-name="Text_20_body"><text:span text:style-name="Strong_20_Emphasis">[1] </text:span><text:bookmark text:name="firstHeading"/><text:span text:style-name="Strong_20_Emphasis">Advanced Encryption Standard - Wikipedia</text:span></text:p>
      <text:p text:style-name="Text_20_body"><text:span text:style-name="Strong_20_Emphasis"><text:span text:style-name="T3"><text:tab/>https://pl.wikipedia.org/wiki/Advanced_Encryption_Standard</text:span></text:span></text:p>
      <text:p text:style-name="Text_20_body"><text:span text:style-name="Strong_20_Emphasis"><text:span text:style-name="T77">[2] SHA-2 – Wikipedia</text:span></text:span></text:p>
      <text:p text:style-name="Text_20_body"><text:span text:style-name="Strong_20_Emphasis"><text:span text:style-name="T78"><text:tab/>https://pl.wikipedia.org/wiki/SHA-2</text:span></text:span></text:p>
      <text:p text:style-name="Text_20_body"><text:span text:style-name="Strong_20_Emphasis"><text:span text:style-name="T77">[3] </text:span></text:span><text:bookmark text:name="firstHeading_Copy_1"/><text:span text:style-name="Strong_20_Emphasis"><text:span text:style-name="T77">Public-key cryptography – Wikipedia</text:span></text:span></text:p>
      <text:p text:style-name="Text_20_body"><text:span text:style-name="Strong_20_Emphasis"><text:span text:style-name="T78"><text:tab/>https://en.wikipedia.org/wiki/Public-key_cryptography</text:span></text:span></text:p>
      <text:p text:style-name="Text_20_body"><text:span text:style-name="Strong_20_Emphasis">[4] RSA Cryptosystem – Wikipedia</text:span></text:p>
      <text:p text:style-name="Text_20_body"><text:tab/><text:span text:style-name="Strong_20_Emphasis"><text:span text:style-name="T3">https://en.wikipedia.org/wiki/RSA_cryptosystem</text:span></text:span></text:p>
      <text:p text:style-name="Text_20_body"><text:span text:style-name="Strong_20_Emphasis">[5] Dokumentacja biblioteki Tkinter – Python.org</text:span></text:p>
      <text:p text:style-name="Text_20_body"><text:span text:style-name="Strong_20_Emphasis"><text:span text:style-name="T3"><text:tab/>https://docs.python.org/3/library/tkinter.html</text:span></text:span></text:p>
      <text:p text:style-name="Text_20_body"><text:span text:style-name="Strong_20_Emphasis">[6] Dokuentacja bilbioteki Cryptography – Cryptography.io</text:span></text:p>
      <text:p text:style-name="P112"><text:span text:style-name="Strong_20_Emphasis"><text:span text:style-name="T3"><text:tab/>https://cryptography.io/en/latest/</text:span></text:span></text:p>
      <text:p text:style-name="Text_20_body"><text:span text:style-name="Strong_20_Emphasis">[7] CyberChef – GitHub.com</text:span></text:p>
      <text:p text:style-name="P112"><text:span text:style-name="Strong_20_Emphasis"><text:span text:style-name="T79"><text:tab/>https://gchq.github.io/CyberChef</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Display" svg:font-family="'Aptos Display'" style:font-family-generic="swiss" style:font-pitch="variable"/>
    <style:font-face style:name="Courier New" svg:font-family="'Courier New'" style:font-family-generic="modern" style:font-pitch="fixed"/>
    <style:font-face style:name="JetBrains Mono" svg:font-family="'JetBrains Mono'" style:font-family-generic="system" style:font-pitch="fixed"/>
    <style:font-face style:name="JetBrains Mono ExtraLight" svg:font-family="'JetBrains Mono ExtraLight'"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top="0.423cm" fo:margin-bottom="0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tru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loext:hyphenation-keep-line="false"/>
      <style:text-properties fo:font-weight="bold" style:font-name-asian="Noto Serif CJK SC" style:font-family-asian="'Noto Serif CJK SC'" style:font-family-generic-asian="system" style:font-pitch-asian="variable" style:font-weight-asian="bold" style:font-name-complex="Noto Sans Devanagari" style:font-family-complex="'Noto Sans Devanagari'" style:font-family-generic-complex="swiss"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Nagłówek_20_1" style:display-name="Nagłówek 1" style:family="paragraph" style:parent-style-name="Heading" style:next-style-name="Text_20_body" style:default-outline-level="1" style:list-style-name="">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agłówek_20_2" style:display-name="Nagłówek 2" style:family="paragraph" style:parent-style-name="Heading" style:next-style-name="Text_20_body" style:default-outline-level="2" style:list-style-name="">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agłówek_20_3" style:display-name="Nagłówek 3" style:family="paragraph" style:parent-style-name="Heading" style:next-style-name="Text_20_body" style:default-outline-level="3" style:list-style-name="">
      <style:paragraph-properties fo:margin-top="0.247cm" fo:margin-bottom="0cm"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agłówek_20_4" style:display-name="Nagłówek 4" style:family="paragraph" style:parent-style-name="Heading" style:next-style-name="Text_20_body" style:default-outline-level="4">
      <style:paragraph-properties fo:margin-top="0.212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iberation Serif" style:font-family-complex="'Liberation Serif'"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Nagłówek_20_5" style:display-name="Nagłówek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loext:hyphenation-keep-line="false"/>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6" style:display-name="Nagłówek 6" style:family="paragraph" style:parent-style-name="Heading" style:next-style-name="Text_20_body" style:default-outline-level="6">
      <style:paragraph-properties fo:margin-top="0.106cm" fo:margin-bottom="0.106cm" style:contextual-spacing="false" fo:hyphenation-ladder-count="no-limit" fo:hyphenation-keep="auto" loext:hyphenation-keep-type="column" loext:hyphenation-keep-line="false"/>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Nagłówek_20_7" style:display-name="Nagłówek 7" style:family="paragraph" style:parent-style-name="Heading" style:next-style-name="Text_20_body" style:default-outline-level="7">
      <style:paragraph-properties fo:margin-top="0.106cm" fo:margin-bottom="0.106cm" style:contextual-spacing="false"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agłówek_20_8" style:display-name="Nagłówek 8" style:family="paragraph" style:parent-style-name="Heading" style:next-style-name="Text_20_body" style:default-outline-level="8">
      <style:paragraph-properties fo:margin-top="0.106cm" fo:margin-bottom="0.106cm" style:contextual-spacing="false" fo:hyphenation-ladder-count="no-limit" fo:hyphenation-keep="auto" loext:hyphenation-keep-type="column" loext:hyphenation-keep-line="false"/>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Nagłówek_20_9" style:display-name="Nagłówek 9" style:family="paragraph" style:parent-style-name="Heading" style:next-style-name="Text_20_body" style:default-outline-level="9">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ny"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egenda"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Stopka"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indeksu" style:display-name="Nagłówek indeksu"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Nagłówek_20_indeksu" style:class="index">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Appendix" style:family="paragraph" style:parent-style-name="Heading" style:next-style-name="Text_20_body" style:class="chapter">
      <style:paragraph-properties fo:text-align="center" style:justify-single-word="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loext:hyphenation-keep-line="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loext:hyphenation-keep-line="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fo:hyphenation-keep="auto" loext:hyphenation-keep-type="column" loext:hyphenation-keep-line="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2cm" fo:hyphenation-ladder-count="no-limit" fo:hyphenation-keep="auto" loext:hyphenation-keep-type="column" loext:hyphenation-keep-line="false">
        <style:tab-stops>
          <style:tab-stop style:position="1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chapter">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agłówek"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de" style:family="paragraph" style:parent-style-name="Standard">
      <loext:graphic-properties draw:fill="solid" draw:fill-color="#f8f8f8" draw:opacity="100%"/>
      <style:paragraph-properties style:line-height-at-least="0.503cm" fo:hyphenation-ladder-count="no-limit" fo:hyphenation-keep="auto" loext:hyphenation-keep-type="column" loext:hyphenation-keep-line="false" fo:background-color="#f8f8f8"/>
      <style:text-properties style:font-name="JetBrains Mono" fo:font-family="'JetBrains Mono'" style:font-family-generic="system" style:font-pitch="fixed" fo:font-size="10.5pt" style:font-name-asian="JetBrains Mono" style:font-family-asian="'JetBrains Mono'" style:font-family-generic-asian="system" style:font-pitch-asian="fixed" style:font-size-asian="10.5pt" style:font-name-complex="JetBrains Mono" style:font-family-complex="'JetBrains Mono'" style:font-family-generic-complex="system" style:font-pitch-complex="fixe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Akapit_20_z_20_listą" style:display-name="Akapit z listą" style:family="paragraph">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wydatnieni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cm" fo:margin-left="0cm" fo:margin-right="0cm" style:vertical-pos="middle" style:vertical-rel="text"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agłówek">
      <style:text-properties fo:font-size="6pt" style:font-size-asian="6pt" style:font-size-complex="6pt"/>
    </style:style>
    <style:style style:name="MP2" style:family="paragraph" style:parent-style-name="Stopka">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P. Torba, J.Lewandowski, Cyberbezpieczeństwo – Projekt, Szyfrowanie plików i bezpieczna wymiana kluczy</text:p>
      </style:header>
      <style:footer>
        <text:p text:style-name="MP2"><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7.3$Linux_X86_64 LibreOffice_project/580$Build-3</meta:generator>
    <meta:initial-creator>Jakub Lewandowski</meta:initial-creator>
    <meta:creation-date>2026-06-08T14:28:00Z</meta:creation-date>
    <dc:date>2026-06-20T21:19:00.853454995</dc:date>
    <meta:print-date>2026-06-20T21:17:28.464447564</meta:print-date>
    <meta:editing-cycles>63</meta:editing-cycles>
    <meta:editing-duration>PT4H1M15S</meta:editing-duration>
    <meta:printed-by>PDF files</meta:printed-by>
    <meta:document-statistic meta:table-count="12" meta:image-count="22" meta:object-count="6" meta:page-count="41" meta:paragraph-count="728" meta:word-count="6864" meta:character-count="60935" meta:non-whitespace-character-count="52352"/>
    <meta:template xlink:type="simple" xlink:actuate="onRequest" xlink:title="" xlink:href="../../../../../../Pobrane/dokumentacja_wip_17_06_2026.odt/Normal.dotm"/>
  </office:meta>
</office:document-meta>
</file>

<file path=Object 1/content.xml><?xml version="1.0" encoding="utf-8"?>
<math xmlns="http://www.w3.org/1998/Math/MathML" display="block">
  <semantics>
    <mrow>
      <mrow>
        <mi>n</mi>
        <mo stretchy="false">=</mo>
        <mi>p</mi>
      </mrow>
      <mi>⋅</mi>
      <mi>q</mi>
    </mrow>
    <annotation encoding="StarMath 5.0">n=p⋅q</annotation>
  </semantics>
</math>
</file>

<file path=Object 2/content.xml><?xml version="1.0" encoding="utf-8"?>
<math xmlns="http://www.w3.org/1998/Math/MathML" display="block">
  <semantics>
    <mrow>
      <mi>φ</mi>
      <mrow>
        <mrow>
          <mo fence="true" form="prefix" stretchy="false">(</mo>
          <mrow>
            <mi>n</mi>
          </mrow>
          <mo fence="true" form="postfix" stretchy="false">)</mo>
        </mrow>
        <mo stretchy="false">=</mo>
        <mrow>
          <mo fence="true" form="prefix" stretchy="false">(</mo>
          <mrow>
            <mrow>
              <mi>p</mi>
              <mi>−</mi>
              <mn>1</mn>
            </mrow>
          </mrow>
          <mo fence="true" form="postfix" stretchy="false">)</mo>
        </mrow>
      </mrow>
      <mrow>
        <mo fence="true" form="prefix" stretchy="false">(</mo>
        <mrow>
          <mrow>
            <mi>q</mi>
            <mi>−</mi>
            <mn>1</mn>
          </mrow>
        </mrow>
        <mo fence="true" form="postfix" stretchy="false">)</mo>
      </mrow>
    </mrow>
    <annotation encoding="StarMath 5.0">φ(n)=(p−1)(q−1)</annotation>
  </semantics>
</math>
</file>

<file path=Object 3/content.xml><?xml version="1.0" encoding="utf-8"?>
<math xmlns="http://www.w3.org/1998/Math/MathML" display="block">
  <semantics>
    <mrow>
      <mi>φ</mi>
      <mrow>
        <mo fence="true" form="prefix" stretchy="false">(</mo>
        <mrow>
          <mi>n</mi>
        </mrow>
        <mo fence="true" form="postfix" stretchy="false">)</mo>
      </mrow>
    </mrow>
    <annotation encoding="StarMath 5.0">φ(n)</annotation>
  </semantics>
</math>
</file>

<file path=Object 4/content.xml><?xml version="1.0" encoding="utf-8"?>
<math xmlns="http://www.w3.org/1998/Math/MathML" display="block">
  <semantics>
    <mrow>
      <mi>d</mi>
      <mi>⋅</mi>
      <mi>e</mi>
      <mi>≡</mi>
      <mn>1</mn>
      <mrow>
        <mo fence="true" form="prefix" stretchy="false">(</mo>
        <mrow>
          <mrow>
            <mi mathvariant="italic">modφ</mi>
            <mrow>
              <mo fence="true" form="prefix" stretchy="false">(</mo>
              <mrow>
                <mi>n</mi>
              </mrow>
              <mo fence="true" form="postfix" stretchy="false">)</mo>
            </mrow>
          </mrow>
        </mrow>
        <mo fence="true" form="postfix" stretchy="false">)</mo>
      </mrow>
    </mrow>
    <annotation encoding="StarMath 5.0">d⋅e≡1(modφ(n))</annotation>
  </semantics>
</math>
</file>

<file path=Object 5/content.xml><?xml version="1.0" encoding="utf-8"?>
<math xmlns="http://www.w3.org/1998/Math/MathML" display="block">
  <semantics>
    <mrow>
      <mrow>
        <mi>c</mi>
        <mo stretchy="false">=</mo>
        <mi mathvariant="italic">me</mi>
      </mrow>
      <mrow>
        <mo fence="true" form="prefix" stretchy="false">(</mo>
        <mrow>
          <mi mathvariant="italic">modn</mi>
        </mrow>
        <mo fence="true" form="postfix" stretchy="false">)</mo>
      </mrow>
    </mrow>
    <annotation encoding="StarMath 5.0">c=me(modn)</annotation>
  </semantics>
</math>
</file>

<file path=Object 6/content.xml><?xml version="1.0" encoding="utf-8"?>
<math xmlns="http://www.w3.org/1998/Math/MathML" display="block">
  <semantics>
    <mrow>
      <mrow>
        <mi>m</mi>
        <mo stretchy="false">=</mo>
        <mi mathvariant="italic">cd</mi>
      </mrow>
      <mrow>
        <mo fence="true" form="prefix" stretchy="false">(</mo>
        <mrow>
          <mi mathvariant="italic">modn</mi>
        </mrow>
        <mo fence="true" form="postfix" stretchy="false">)</mo>
      </mrow>
    </mrow>
    <annotation encoding="StarMath 5.0">m=cd(modn)</annotation>
  </semantics>
</math>
</file>